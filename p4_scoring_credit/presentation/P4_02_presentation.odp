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3000002590478D49A684ED170.png" manifest:media-type="image/png"/>
  <manifest:file-entry manifest:full-path="Pictures/10000000000001EA00000157819270BC13F8344A.png" manifest:media-type="image/png"/>
  <manifest:file-entry manifest:full-path="Pictures/100000000000019D0000017E37F49DC34B7E5B29.png" manifest:media-type="image/png"/>
  <manifest:file-entry manifest:full-path="Pictures/10000000000001AA000001D32E5B6DC6FC2F1153.png" manifest:media-type="image/png"/>
  <manifest:file-entry manifest:full-path="Pictures/10000000000002260000014ED9DC520208D4FB42.png" manifest:media-type="image/png"/>
  <manifest:file-entry manifest:full-path="Pictures/10000000000004B100000303B2F50366195A95D6.png" manifest:media-type="image/png"/>
  <manifest:file-entry manifest:full-path="Pictures/10000000000001A400000112C9E48CF23A111549.png" manifest:media-type="image/png"/>
  <manifest:file-entry manifest:full-path="Pictures/100000000000029D000001DAC78F80DDF96EF532.jpg" manifest:media-type="image/jpeg"/>
  <manifest:file-entry manifest:full-path="Pictures/10000000000002560000026463CE9AF3253FF245.png" manifest:media-type="image/png"/>
  <manifest:file-entry manifest:full-path="Pictures/1000000000000834000006909FE3B853162847E5.png" manifest:media-type="image/png"/>
  <manifest:file-entry manifest:full-path="Pictures/10000000000001C20000012AA399E86A5EBAE362.png" manifest:media-type="image/png"/>
  <manifest:file-entry manifest:full-path="Pictures/10000201000007EF0000055264C87EBCB57AB5A8.png" manifest:media-type="image/png"/>
  <manifest:file-entry manifest:full-path="Pictures/10000000000002D4000001C0E7B3033DB2DAC82A.png" manifest:media-type="image/png"/>
  <manifest:file-entry manifest:full-path="Pictures/10000000000002770000016DB36221F1F14FAF02.png" manifest:media-type="image/png"/>
  <manifest:file-entry manifest:full-path="Pictures/100000000000031400000180A269D79DECE68559.png" manifest:media-type="image/png"/>
  <manifest:file-entry manifest:full-path="Pictures/100000000000020E000002170BA942729AF57966.png" manifest:media-type="image/png"/>
  <manifest:file-entry manifest:full-path="Pictures/100000000000025F000000847FBE09A45BFA7950.png" manifest:media-type="image/png"/>
  <manifest:file-entry manifest:full-path="Pictures/1000020100000375000002651DC86600B27A978C.png" manifest:media-type="image/png"/>
  <manifest:file-entry manifest:full-path="Pictures/10000000000001EA000001575BE85E2FF2C99F40.png" manifest:media-type="image/png"/>
  <manifest:file-entry manifest:full-path="Pictures/10000000000001E10000015766EBDA04F12DC857.png" manifest:media-type="image/png"/>
  <manifest:file-entry manifest:full-path="Pictures/100000000000025F0000025A0D9626B63494EB8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objectwithoutfill">
      <style:graphic-properties draw:stroke="dash" draw:stroke-dash="Double_20_Dash" svg:stroke-color="#ff0000" draw:fill="none" draw:textarea-vertical-align="middl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2.63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style:writing-mode="lr-tb"/>
      <style:text-properties fo:font-size="18pt" style:text-underline-style="solid" style:text-underline-width="auto" style:text-underline-color="font-color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style:writing-mode="lr-tb"/>
      <style:text-properties fo:font-size="14pt" style:text-underline-style="none" style:font-size-asian="14pt" style:font-size-complex="14pt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text-underline-style="solid" style:text-underline-width="auto" style:text-underline-color="font-color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 presentation:user-transformed="true">
          <draw:text-box>
            <text:p>Construisez un modèle de scoring</text:p>
          </draw:text-box>
        </draw:frame>
        <draw:frame draw:style-name="gr1" draw:text-style-name="P2" draw:layer="layout" svg:width="6.828cm" svg:height="6.316cm" svg:x="0.672cm" svg:y="0.5cm">
          <draw:image xlink:href="Pictures/100000000000019D0000017E37F49DC34B7E5B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 presentation:user-transformed="true">
          <draw:text-box>
            <text:p text:style-name="P1">Sommaire</text:p>
          </draw:text-box>
        </draw:frame>
        <draw:frame presentation:style-name="pr4" draw:text-style-name="P1" draw:layer="layout" svg:width="24cm" svg:height="9.135cm" svg:x="2cm" svg:y="5.5cm" presentation:class="outline" presentation:user-transformed="true">
          <draw:text-box>
            <text:list text:style-name="L3">
              <text:list-item>
                <text:p text:style-name="P1">Contexte – problématique – données</text:p>
              </text:list-item>
              <text:list-item>
                <text:p text:style-name="P1">Modélisation</text:p>
              </text:list-item>
              <text:list-item>
                <text:p text:style-name="P1">Evaluation</text:p>
              </text:list-item>
              <text:list-item>
                <text:p text:style-name="P1">Importance des variables</text:p>
              </text:list-item>
              <text:list-item>
                <text:p text:style-name="P1"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 presentation:user-transformed="true">
          <draw:text-box>
            <text:p text:style-name="P1">Le contexte</text:p>
          </draw:text-box>
        </draw:frame>
        <draw:frame draw:style-name="gr1" draw:text-style-name="P2" draw:layer="layout" svg:width="5.946cm" svg:height="5.5cm" svg:x="2.054cm" svg:y="5.1cm">
          <draw:image xlink:href="Pictures/100000000000019D0000017E37F49DC34B7E5B29.png" xlink:type="simple" xlink:show="embed" xlink:actuate="onLoad" draw:mime-type="image/png">
            <text:p/>
          </draw:image>
        </draw:frame>
        <draw:frame draw:style-name="gr1" draw:text-style-name="P2" draw:layer="layout" svg:width="9.058cm" svg:height="5.5cm" svg:x="17.943cm" svg:y="5.1cm">
          <draw:image xlink:href="Pictures/10000000000002260000014ED9DC520208D4FB42.png" xlink:type="simple" xlink:show="embed" xlink:actuate="onLoad" draw:mime-type="image/png">
            <text:p/>
          </draw:image>
        </draw:frame>
        <draw:frame draw:style-name="gr1" draw:text-style-name="P2" draw:layer="layout" svg:width="8.899cm" svg:height="5.463cm" svg:x="8.657cm" svg:y="5.137cm">
          <draw:image xlink:href="Pictures/10000000000003D3000002590478D49A684ED170.png" xlink:type="simple" xlink:show="embed" xlink:actuate="onLoad" draw:mime-type="image/png">
            <text:p/>
          </draw:image>
        </draw:frame>
        <draw:frame draw:style-name="gr3" draw:text-style-name="P4" draw:layer="layout" svg:width="5.763cm" svg:height="0.961cm" svg:x="2cm" svg:y="11.1cm">
          <draw:text-box>
            <text:p>Société financière</text:p>
          </draw:text-box>
        </draw:frame>
        <draw:frame draw:style-name="gr3" draw:text-style-name="P4" draw:layer="layout" svg:width="8.5cm" svg:height="0.961cm" svg:x="9cm" svg:y="11.139cm">
          <draw:text-box>
            <text:p>Chargé de clientèle</text:p>
          </draw:text-box>
        </draw:frame>
        <draw:frame draw:style-name="gr3" draw:text-style-name="P4" draw:layer="layout" svg:width="8.5cm" svg:height="0.961cm" svg:x="9cm" svg:y="12.24cm">
          <draw:text-box>
            <text:p>Crédits à la consommation</text:p>
          </draw:text-box>
        </draw:frame>
        <draw:frame draw:style-name="gr3" draw:text-style-name="P4" draw:layer="layout" svg:width="2.6cm" svg:height="0.961cm" svg:x="21.4cm" svg:y="11.14cm">
          <draw:text-box>
            <text:p>Client</text:p>
          </draw:text-box>
        </draw:frame>
        <draw:frame draw:style-name="gr3" draw:text-style-name="P4" draw:layer="layout" svg:width="3.6cm" svg:height="0.961cm" svg:x="21.4cm" svg:y="12.241cm">
          <draw:text-box>
            <text:p>Score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 presentation:user-transformed="true">
          <draw:text-box>
            <text:p text:style-name="P1">Le projet</text:p>
          </draw:text-box>
        </draw:frame>
        <draw:frame draw:style-name="gr1" draw:text-style-name="P2" draw:layer="layout" svg:width="5.651cm" svg:height="4cm" svg:x="10.449cm" svg:y="2.2cm">
          <draw:image xlink:href="Pictures/100000000000029D000001DAC78F80DDF96EF532.jpg" xlink:type="simple" xlink:show="embed" xlink:actuate="onLoad" draw:mime-type="image/jpeg">
            <text:p/>
          </draw:image>
        </draw:frame>
        <draw:frame draw:style-name="gr3" draw:text-style-name="P5" draw:layer="layout" svg:width="8.5cm" svg:height="0.961cm" svg:x="9.1cm" svg:y="6.439cm">
          <draw:text-box>
            <text:p><text:span text:style-name="T1">Classification supervisée</text:span></text:p>
          </draw:text-box>
        </draw:frame>
        <draw:frame draw:style-name="gr3" draw:text-style-name="P5" draw:layer="layout" svg:width="3.5cm" svg:height="0.961cm" svg:x="5.6cm" svg:y="10.639cm">
          <draw:text-box>
            <text:p><text:span text:style-name="T1">Données</text:span></text:p>
          </draw:text-box>
        </draw:frame>
        <draw:frame draw:style-name="gr3" draw:text-style-name="P5" draw:layer="layout" svg:width="4.5cm" svg:height="0.961cm" svg:x="17.1cm" svg:y="10.639cm">
          <draw:text-box>
            <text:p><text:span text:style-name="T1">Prédictions</text:span></text:p>
          </draw:text-box>
        </draw:frame>
        <draw:frame draw:style-name="gr1" draw:text-style-name="P2" draw:layer="layout" svg:width="7cm" svg:height="7.674cm" svg:x="9.8cm" svg:y="7.426cm">
          <draw:image xlink:href="Pictures/10000000000001AA000001D32E5B6DC6FC2F11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 presentation:user-transformed="true">
          <draw:text-box>
            <text:p text:style-name="P1">La problématique métier</text:p>
          </draw:text-box>
        </draw:frame>
        <draw:frame draw:style-name="gr1" draw:text-style-name="P2" draw:layer="layout" svg:width="5.374cm" svg:height="5.5cm" svg:x="16.626cm" svg:y="3.5cm">
          <draw:image xlink:href="Pictures/10000000000002560000026463CE9AF3253FF245.png" xlink:type="simple" xlink:show="embed" xlink:actuate="onLoad" draw:mime-type="image/png">
            <text:p/>
          </draw:image>
        </draw:frame>
        <draw:frame draw:style-name="gr3" draw:text-style-name="P4" draw:layer="layout" svg:width="5.763cm" svg:height="0.961cm" svg:x="20.537cm" svg:y="3.039cm">
          <draw:text-box>
            <text:p>Défaut (1)</text:p>
          </draw:text-box>
        </draw:frame>
        <draw:frame draw:style-name="gr3" draw:text-style-name="P4" draw:layer="layout" svg:width="5.763cm" svg:height="0.999cm" svg:x="13.337cm" svg:y="8.2cm">
          <draw:text-box>
            <text:p>Pas défaut (0)</text:p>
          </draw:text-box>
        </draw:frame>
        <draw:frame draw:style-name="gr3" draw:text-style-name="P4" draw:layer="layout" svg:width="11.263cm" svg:height="0.999cm" svg:x="1.5cm" svg:y="4.301cm">
          <draw:text-box>
            <text:p><text:span text:style-name="T1">Limiter les faux négatifs : </text:span></text:p>
            <text:p><text:span text:style-name="T1"/></text:p>
            <text:p>Erreur de prédiction coûteuse </text:p>
            <text:p>Ne pas prédire 0 au lieu de 1</text:p>
          </draw:text-box>
        </draw:frame>
        <draw:frame draw:style-name="gr3" draw:text-style-name="P5" draw:layer="layout" svg:width="11.263cm" svg:height="0.999cm" svg:x="13.5cm" svg:y="10cm">
          <draw:text-box>
            <text:p><text:span text:style-name="T1">Classes déséquilibrées :</text:span></text:p>
          </draw:text-box>
        </draw:frame>
        <draw:frame draw:style-name="gr3" draw:text-style-name="P4" draw:layer="layout" svg:width="7.86cm" svg:height="0.961cm" svg:x="13.94cm" svg:y="12.5cm">
          <draw:text-box>
            <text:p>–&gt; métrique adaptée</text:p>
          </draw:text-box>
        </draw:frame>
        <draw:frame draw:style-name="gr3" draw:text-style-name="P4" draw:layer="layout" svg:width="13.3cm" svg:height="0.961cm" svg:x="13.7cm" svg:y="11.4cm">
          <draw:text-box>
            <text:p>Performance élevée &lt;&gt; modèle satisfaisant</text:p>
          </draw:text-box>
        </draw:frame>
        <draw:frame draw:style-name="gr1" draw:text-style-name="P2" draw:layer="layout" svg:width="8.672cm" svg:height="5.743cm" svg:x="1.5cm" svg:y="8.257cm">
          <draw:image xlink:href="Pictures/10000000000001C20000012AA399E86A5EBAE3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draw:style-name="gr1" draw:text-style-name="P2" draw:layer="layout" svg:width="21.804cm" svg:height="13.998cm" svg:x="3cm" svg:y="1.5cm">
          <draw:image xlink:href="Pictures/10000000000004B100000303B2F50366195A95D6.png" xlink:type="simple" xlink:show="embed" xlink:actuate="onLoad" draw:mime-type="image/png">
            <text:p/>
          </draw:image>
        </draw:frame>
        <draw:frame presentation:style-name="pr3" draw:text-style-name="P1" draw:layer="layout" svg:width="7.5cm" svg:height="2.63cm" svg:x="2cm" svg:y="0.627cm" presentation:class="title" presentation:user-transformed="true">
          <draw:text-box>
            <text:p text:style-name="P1">Les donnée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 presentation:user-transformed="true">
          <draw:text-box>
            <text:p text:style-name="P1">Transformation des données</text:p>
          </draw:text-box>
        </draw:frame>
        <draw:frame presentation:style-name="pr4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Outliers</text:p>
              </text:list-item>
              <text:list-item>
                <text:p>Valeurs manquantes</text:p>
              </text:list-item>
              <text:list-item>
                <text:p>Encodage des variables catégoriques</text:p>
              </text:list-item>
              <text:list-item>
                <text:p>Normalisation des variables numériques</text:p>
              </text:list-item>
              <text:list-item>
                <text:p>Nouvelles variab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 presentation:user-transformed="true">
          <draw:text-box>
            <text:p text:style-name="P1">Modélisation</text:p>
          </draw:text-box>
        </draw:frame>
        <draw:frame draw:style-name="gr1" draw:text-style-name="P2" draw:layer="layout" svg:width="17.199cm" svg:height="11.533cm" svg:x="5.443cm" svg:y="3.701cm">
          <draw:image xlink:href="Pictures/10000201000007EF0000055264C87EBCB57AB5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>
          <draw:text-box>
            <text:p>Modélisation – les algorithmes</text:p>
          </draw:text-box>
        </draw:frame>
        <draw:frame draw:style-name="gr1" draw:text-style-name="P2" draw:layer="layout" svg:width="12.5cm" svg:height="10cm" svg:x="1cm" svg:y="5.4cm">
          <draw:image xlink:href="Pictures/1000000000000834000006909FE3B853162847E5.png" xlink:type="simple" xlink:show="embed" xlink:actuate="onLoad" draw:mime-type="image/png">
            <text:p/>
          </draw:image>
        </draw:frame>
        <draw:frame draw:style-name="gr1" draw:text-style-name="P2" draw:layer="layout" svg:width="12.5cm" svg:height="7.735cm" svg:x="14.3cm" svg:y="6.665cm">
          <draw:image xlink:href="Pictures/10000000000002D4000001C0E7B3033DB2DAC82A.png" xlink:type="simple" xlink:show="embed" xlink:actuate="onLoad" draw:mime-type="image/png">
            <text:p/>
          </draw:image>
        </draw:frame>
        <draw:frame draw:style-name="gr3" draw:text-style-name="P7" draw:layer="layout" svg:width="8.02cm" svg:height="0.961cm" svg:x="3.88cm" svg:y="4cm">
          <draw:text-box>
            <text:p><text:span text:style-name="T2">1 - Régression logistique</text:span></text:p>
          </draw:text-box>
        </draw:frame>
        <draw:frame draw:style-name="gr3" draw:text-style-name="P7" draw:layer="layout" svg:width="8.52cm" svg:height="0.961cm" svg:x="16.48cm" svg:y="4.039cm">
          <draw:text-box>
            <text:p><text:span text:style-name="T2">2 - Support Vector Machi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>
          <draw:text-box>
            <text:p text:style-name="P8">Modélisation – les algorithmes</text:p>
          </draw:text-box>
        </draw:frame>
        <draw:frame draw:style-name="gr1" draw:text-style-name="P2" draw:layer="layout" svg:width="9.135cm" svg:height="5.284cm" svg:x="14.5cm" svg:y="6.716cm">
          <draw:image xlink:href="Pictures/10000000000002770000016DB36221F1F14FAF02.png" xlink:type="simple" xlink:show="embed" xlink:actuate="onLoad" draw:mime-type="image/png">
            <text:p/>
          </draw:image>
        </draw:frame>
        <draw:frame draw:style-name="gr1" draw:text-style-name="P2" draw:layer="layout" svg:width="10cm" svg:height="10.17cm" svg:x="2.5cm" svg:y="5.13cm">
          <draw:image xlink:href="Pictures/100000000000020E000002170BA942729AF57966.png" xlink:type="simple" xlink:show="embed" xlink:actuate="onLoad" draw:mime-type="image/png">
            <text:p/>
          </draw:image>
        </draw:frame>
        <draw:frame draw:style-name="gr3" draw:text-style-name="P7" draw:layer="layout" svg:width="8.02cm" svg:height="0.961cm" svg:x="4.18cm" svg:y="4.001cm">
          <draw:text-box>
            <text:p><text:span text:style-name="T2">3 – Random Forest</text:span></text:p>
          </draw:text-box>
        </draw:frame>
        <draw:frame draw:style-name="gr3" draw:text-style-name="P9" draw:layer="layout" svg:width="8.02cm" svg:height="0.961cm" svg:x="17.48cm" svg:y="5.677cm">
          <draw:text-box>
            <text:p><text:span text:style-name="T3">Arbre de déci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3" draw:text-style-name="P1" draw:layer="layout" svg:width="24.599cm" svg:height="2.63cm" svg:x="2cm" svg:y="0.627cm" presentation:class="title" presentation:user-transformed="true">
          <draw:text-box>
            <text:p text:style-name="P1">Modélisation - métrique</text:p>
          </draw:text-box>
        </draw:frame>
        <draw:frame draw:style-name="gr1" draw:text-style-name="P2" draw:layer="layout" svg:width="11.987cm" svg:height="7.82cm" svg:x="1.5cm" svg:y="5cm">
          <draw:image xlink:href="Pictures/10000000000001A400000112C9E48CF23A111549.png" xlink:type="simple" xlink:show="embed" xlink:actuate="onLoad" draw:mime-type="image/png">
            <text:p/>
          </draw:image>
        </draw:frame>
        <draw:frame draw:style-name="gr3" draw:text-style-name="P10" draw:layer="layout" svg:width="7.97cm" svg:height="0.961cm" svg:x="15cm" svg:y="6cm">
          <draw:text-box>
            <text:p><text:span text:style-name="T4">Sensibilité = VP/Positifs</text:span></text:p>
          </draw:text-box>
        </draw:frame>
        <draw:frame draw:style-name="gr3" draw:text-style-name="P10" draw:layer="layout" svg:width="8.02cm" svg:height="0.961cm" svg:x="15cm" svg:y="7.039cm">
          <draw:text-box>
            <text:p><text:span text:style-name="T4">Spécificité = FP/Négatifs</text:span></text:p>
          </draw:text-box>
        </draw:frame>
        <draw:frame draw:style-name="gr3" draw:text-style-name="P10" draw:layer="layout" svg:width="8.02cm" svg:height="0.961cm" svg:x="14.98cm" svg:y="9cm">
          <draw:text-box>
            <text:p><text:span text:style-name="T4">Métrique : Roc Au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3" draw:text-style-name="P1" draw:layer="layout" svg:width="24.599cm" svg:height="2.63cm" svg:x="2cm" svg:y="0.627cm" presentation:class="title" presentation:user-transformed="true">
          <draw:text-box>
            <text:p text:style-name="P1">Modélisation – comparaison de modèles</text:p>
          </draw:text-box>
        </draw:frame>
        <draw:frame draw:style-name="gr3" draw:text-style-name="P9" draw:layer="layout" svg:width="17.52cm" svg:height="0.961cm" svg:x="1.98cm" svg:y="7.8cm">
          <draw:text-box>
            <text:p><text:span text:style-name="T3">Modèle de référence : LogisticRegression : itération 1 : score auc : 0,64</text:span></text:p>
          </draw:text-box>
        </draw:frame>
        <draw:frame draw:style-name="gr3" draw:text-style-name="P9" draw:layer="layout" svg:width="17.52cm" svg:height="0.961cm" svg:x="1.98cm" svg:y="8.901cm">
          <draw:text-box>
            <text:p><text:span text:style-name="T3">Itération 1 : Imputer – comparaison avec les autres algorithmes</text:span></text:p>
          </draw:text-box>
        </draw:frame>
        <draw:frame draw:style-name="gr3" draw:text-style-name="P9" draw:layer="layout" svg:width="17.52cm" svg:height="0.961cm" svg:x="1.98cm" svg:y="9.702cm">
          <draw:text-box>
            <text:p><text:span text:style-name="T3">Itération 2 : Normalisation des données</text:span></text:p>
          </draw:text-box>
        </draw:frame>
        <draw:frame draw:style-name="gr3" draw:text-style-name="P9" draw:layer="layout" svg:width="17.52cm" svg:height="0.961cm" svg:x="1.98cm" svg:y="10.501cm">
          <draw:text-box>
            <text:p><text:span text:style-name="T3">Itération 3 : Stratified cross validation</text:span></text:p>
          </draw:text-box>
        </draw:frame>
        <draw:frame draw:style-name="gr3" draw:text-style-name="P9" draw:layer="layout" svg:width="17.52cm" svg:height="0.961cm" svg:x="1.98cm" svg:y="11.302cm">
          <draw:text-box>
            <text:p><text:span text:style-name="T3">Itération 4 : class weight : balanced</text:span></text:p>
          </draw:text-box>
        </draw:frame>
        <draw:frame draw:style-name="gr3" draw:text-style-name="P9" draw:layer="layout" svg:width="17.52cm" svg:height="0.961cm" svg:x="1.98cm" svg:y="12.101cm">
          <draw:text-box>
            <text:p><text:span text:style-name="T3">Itération 5 : Resampling data</text:span></text:p>
          </draw:text-box>
        </draw:frame>
        <draw:frame draw:style-name="gr3" draw:text-style-name="P9" draw:layer="layout" svg:width="17.52cm" svg:height="0.961cm" svg:x="1.98cm" svg:y="12.902cm">
          <draw:text-box>
            <text:p><text:span text:style-name="T3">Itération 6 : Nouvelles variables</text:span></text:p>
          </draw:text-box>
        </draw:frame>
        <draw:frame draw:style-name="gr1" draw:text-style-name="P2" draw:layer="layout" svg:width="16.5cm" svg:height="3.588cm" svg:x="4.5cm" svg:y="3.5cm">
          <draw:image xlink:href="Pictures/100000000000025F000000847FBE09A45BFA79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3" draw:text-style-name="P1" draw:layer="layout" svg:width="24.599cm" svg:height="2.63cm" svg:x="2cm" svg:y="0.627cm" presentation:class="title" presentation:user-transformed="true">
          <draw:text-box>
            <text:p text:style-name="P1">Modélisation</text:p>
          </draw:text-box>
        </draw:frame>
        <draw:frame draw:style-name="gr1" draw:text-style-name="P2" draw:layer="layout" svg:width="17.354cm" svg:height="12.019cm" svg:x="3.777cm" svg:y="3.281cm">
          <draw:image xlink:href="Pictures/1000020100000375000002651DC86600B27A97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3" draw:text-style-name="P1" draw:layer="layout" svg:width="24.599cm" svg:height="2.63cm" svg:x="2cm" svg:y="0.627cm" presentation:class="title" presentation:user-transformed="true">
          <draw:text-box>
            <text:p text:style-name="P1">Modélisation – comparaison de modèles</text:p>
          </draw:text-box>
        </draw:frame>
        <draw:frame draw:style-name="gr3" draw:text-style-name="P9" draw:layer="layout" svg:width="17.52cm" svg:height="0.961cm" svg:x="1.98cm" svg:y="7.8cm">
          <draw:text-box>
            <text:p><text:span text:style-name="T3">Modèle de référence : LogisticRegression : itération 1 : score auc : 0,64</text:span></text:p>
          </draw:text-box>
        </draw:frame>
        <draw:frame draw:style-name="gr3" draw:text-style-name="P9" draw:layer="layout" svg:width="17.52cm" svg:height="0.961cm" svg:x="1.98cm" svg:y="8.901cm">
          <draw:text-box>
            <text:p><text:span text:style-name="T3">Itération 1 : Imputer – comparaison avec les autres algorithmes</text:span></text:p>
          </draw:text-box>
        </draw:frame>
        <draw:frame draw:style-name="gr3" draw:text-style-name="P9" draw:layer="layout" svg:width="17.52cm" svg:height="0.961cm" svg:x="1.98cm" svg:y="9.702cm">
          <draw:text-box>
            <text:p><text:span text:style-name="T3">Itération 2 : Normalisation des données</text:span></text:p>
          </draw:text-box>
        </draw:frame>
        <draw:frame draw:style-name="gr3" draw:text-style-name="P9" draw:layer="layout" svg:width="17.52cm" svg:height="0.961cm" svg:x="1.98cm" svg:y="10.501cm">
          <draw:text-box>
            <text:p><text:span text:style-name="T3">Itération 3 : Stratified cross validation</text:span></text:p>
          </draw:text-box>
        </draw:frame>
        <draw:frame draw:style-name="gr3" draw:text-style-name="P9" draw:layer="layout" svg:width="17.52cm" svg:height="0.961cm" svg:x="1.98cm" svg:y="11.302cm">
          <draw:text-box>
            <text:p><text:span text:style-name="T3">Itération 4 : class weight : balanced</text:span></text:p>
          </draw:text-box>
        </draw:frame>
        <draw:frame draw:style-name="gr3" draw:text-style-name="P9" draw:layer="layout" svg:width="17.52cm" svg:height="0.961cm" svg:x="1.98cm" svg:y="12.101cm">
          <draw:text-box>
            <text:p><text:span text:style-name="T3">Itération 5 : Resampling data</text:span></text:p>
          </draw:text-box>
        </draw:frame>
        <draw:frame draw:style-name="gr3" draw:text-style-name="P9" draw:layer="layout" svg:width="17.52cm" svg:height="0.961cm" svg:x="1.98cm" svg:y="12.902cm">
          <draw:text-box>
            <text:p><text:span text:style-name="T3">Itération 6 : Nouvelles variables</text:span></text:p>
          </draw:text-box>
        </draw:frame>
        <draw:frame draw:style-name="gr1" draw:text-style-name="P2" draw:layer="layout" svg:width="16.5cm" svg:height="3.588cm" svg:x="4.5cm" svg:y="3.5cm">
          <draw:image xlink:href="Pictures/100000000000025F000000847FBE09A45BFA79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3" draw:text-style-name="P1" draw:layer="layout" svg:width="24.599cm" svg:height="2.63cm" svg:x="2cm" svg:y="0.627cm" presentation:class="title" presentation:user-transformed="true">
          <draw:text-box>
            <text:p text:style-name="P1">Evaluation</text:p>
          </draw:text-box>
        </draw:frame>
        <draw:frame draw:style-name="gr1" draw:text-style-name="P2" draw:layer="layout" svg:width="12.514cm" svg:height="8.759cm" svg:x="1.5cm" svg:y="4.241cm">
          <draw:image xlink:href="Pictures/10000000000001EA00000157819270BC13F8344A.png" xlink:type="simple" xlink:show="embed" xlink:actuate="onLoad" draw:mime-type="image/png">
            <text:p/>
          </draw:image>
        </draw:frame>
        <draw:frame draw:style-name="gr1" draw:text-style-name="P2" draw:layer="layout" svg:width="12.5cm" svg:height="8.749cm" svg:x="14cm" svg:y="4.441cm">
          <draw:image xlink:href="Pictures/10000000000001EA000001575BE85E2FF2C99F40.png" xlink:type="simple" xlink:show="embed" xlink:actuate="onLoad" draw:mime-type="image/png">
            <text:p/>
          </draw:image>
        </draw:frame>
        <draw:line draw:style-name="gr4" draw:text-style-name="P2" draw:layer="layout" svg:x1="6.8cm" svg:y1="3.9cm" svg:x2="6.8cm" svg:y2="13.5cm">
          <text:p/>
        </draw:line>
        <draw:line draw:style-name="gr4" draw:text-style-name="P2" draw:layer="layout" svg:x1="19.3cm" svg:y1="3.9cm" svg:x2="19.3cm" svg:y2="13.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6" draw:text-style-name="P1" draw:layer="layout" svg:width="25cm" svg:height="3cm" svg:x="2cm" svg:y="0.5cm" presentation:class="title" presentation:user-transformed="true">
          <draw:text-box>
            <text:p>Evaluation</text:p>
          </draw:text-box>
        </draw:frame>
        <draw:frame draw:style-name="gr1" draw:text-style-name="P2" draw:layer="layout" svg:width="12.18cm" svg:height="8.685cm" svg:x="1.32cm" svg:y="5.4cm">
          <draw:image xlink:href="Pictures/10000000000001E10000015766EBDA04F12DC857.png" xlink:type="simple" xlink:show="embed" xlink:actuate="onLoad" draw:mime-type="image/png">
            <text:p/>
          </draw:image>
        </draw:frame>
        <draw:frame draw:style-name="gr1" draw:text-style-name="P2" draw:layer="layout" svg:width="9.5cm" svg:height="9.422cm" svg:x="16.1cm" svg:y="4.978cm">
          <draw:image xlink:href="Pictures/100000000000025F0000025A0D9626B63494EB89.png" xlink:type="simple" xlink:show="embed" xlink:actuate="onLoad" draw:mime-type="image/png">
            <text:p/>
          </draw:image>
        </draw:frame>
        <draw:line draw:style-name="gr4" draw:text-style-name="P2" draw:layer="layout" svg:x1="6.4cm" svg:y1="4.8cm" svg:x2="6.4cm" svg:y2="14.4cm">
          <text:p/>
        </draw:line>
        <draw:line draw:style-name="gr4" draw:text-style-name="P2" draw:layer="layout" svg:x1="16.2cm" svg:y1="4.5cm" svg:x2="19.7cm" svg:y2="8.1cm">
          <text:p/>
        </draw:line>
        <draw:frame draw:style-name="gr3" draw:text-style-name="P9" draw:layer="layout" svg:width="4.02cm" svg:height="0.961cm" svg:x="13.88cm" svg:y="3.839cm">
          <draw:text-box>
            <text:p><text:span text:style-name="T3">Seuil : 0,4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6" draw:text-style-name="P1" draw:layer="layout" svg:width="25cm" svg:height="3cm" svg:x="2cm" svg:y="0.5cm" presentation:class="title">
          <draw:text-box>
            <text:p>Importance des variables</text:p>
          </draw:text-box>
        </draw:frame>
        <draw:frame draw:style-name="gr1" draw:text-style-name="P2" draw:layer="layout" svg:width="21.178cm" svg:height="10.32cm" svg:x="2.322cm" svg:y="4.373cm">
          <draw:image xlink:href="Pictures/100000000000031400000180A269D79DECE685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3" draw:text-style-name="P1" draw:layer="layout" svg:width="24.599cm" svg:height="2.63cm" svg:x="2cm" svg:y="0.627cm" presentation:class="title" presentation:user-transformed="true">
          <draw:text-box>
            <text:p text:style-name="P1">Conclusion</text:p>
          </draw:text-box>
        </draw:frame>
        <draw:frame presentation:style-name="pr4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Modèle de classification supervisée : roc auc : 0,73.</text:p>
              </text:list-item>
              <text:list-item>
                <text:p>Améliorations :</text:p>
                <text:list>
                  <text:list-item>
                    <text:p>Feature engineering</text:p>
                  </text:list-item>
                  <text:list-item>
                    <text:p>Feature Selection</text:p>
                  </text:list-item>
                  <text:list-item>
                    <text:p>Autres algorithmes (LightGBM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8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2T08:52:34.567000000</meta:creation-date>
    <meta:editing-duration>PT6H27M14S</meta:editing-duration>
    <meta:editing-cycles>34</meta:editing-cycles>
    <meta:generator>LibreOffice/7.0.4.2$Windows_X86_64 LibreOffice_project/dcf040e67528d9187c66b2379df5ea4407429775</meta:generator>
    <dc:title>Impress</dc:title>
    <dc:date>2021-09-15T11:18:04.199000000</dc:date>
    <meta:document-statistic meta:object-count="154"/>
  </office:meta>
</office:document-meta>
</file>