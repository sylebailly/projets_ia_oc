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9000002A342E4ABE817B2B251.png" manifest:media-type="image/png"/>
  <manifest:file-entry manifest:full-path="Pictures/10000000000000FC000000C60E936D2A07265099.png" manifest:media-type="image/png"/>
  <manifest:file-entry manifest:full-path="Pictures/10000201000004B0000002A321A11E4C39D1E523.png" manifest:media-type="image/png"/>
  <manifest:file-entry manifest:full-path="Pictures/10000201000002BE000000FEF6665EFA5E107ACF.png" manifest:media-type="image/png"/>
  <manifest:file-entry manifest:full-path="Pictures/10000201000004B0000002A377B8EF3E7760D1AD.png" manifest:media-type="image/png"/>
  <manifest:file-entry manifest:full-path="Pictures/10000000000002CA000001A122B767C2EBDA9617.png" manifest:media-type="image/png"/>
  <manifest:file-entry manifest:full-path="Pictures/10000000000001E8000001EEA02D97C14616F14A.png" manifest:media-type="image/png"/>
  <manifest:file-entry manifest:full-path="Pictures/10000000000001D400000107C003A2BE52CB8327.png" manifest:media-type="image/png"/>
  <manifest:file-entry manifest:full-path="Pictures/10000000000006C10000041707DB27A2C40E311D.png" manifest:media-type="image/png"/>
  <manifest:file-entry manifest:full-path="Pictures/1000000000000111000000B9A6FE97677D508620.png" manifest:media-type="image/png"/>
  <manifest:file-entry manifest:full-path="Pictures/10000000000000D4000000EDFA31F2D5BAB9B645.png" manifest:media-type="image/png"/>
  <manifest:file-entry manifest:full-path="Pictures/10000000000006BE00000413E782CD0D08AAF489.png" manifest:media-type="image/png"/>
  <manifest:file-entry manifest:full-path="Pictures/10000000000006BE000004062567A6F09EBF091C.png" manifest:media-type="image/png"/>
  <manifest:file-entry manifest:full-path="Pictures/10000000000002690000016ABC5933717BA07E77.png" manifest:media-type="image/png"/>
  <manifest:file-entry manifest:full-path="Pictures/10000000000001F2000001570F4BE9A2BBFEA57B.png" manifest:media-type="image/png"/>
  <manifest:file-entry manifest:full-path="Pictures/10000000000002A90000025D8EA2569D28C9C25D.png" manifest:media-type="image/png"/>
  <manifest:file-entry manifest:full-path="Pictures/10000000000000DC000000C7EBF00883E2997178.png" manifest:media-type="image/png"/>
  <manifest:file-entry manifest:full-path="Pictures/10000000000001E9000002634F4930399F685029.png" manifest:media-type="image/png"/>
  <manifest:file-entry manifest:full-path="Pictures/100000000000023800000210467D28242218263E.png" manifest:media-type="image/png"/>
  <manifest:file-entry manifest:full-path="Pictures/100000000000046A0000008D6386047972303CD6.png" manifest:media-type="image/png"/>
  <manifest:file-entry manifest:full-path="Pictures/10000000000004E3000001556D6E8AE677F21A94.png" manifest:media-type="image/png"/>
  <manifest:file-entry manifest:full-path="Pictures/100000000000036B000002243E8DB6DA3283FF85.png" manifest:media-type="image/png"/>
  <manifest:file-entry manifest:full-path="Pictures/100000000000013C0000013DD91AEFBC3B174AB1.png" manifest:media-type="image/png"/>
  <manifest:file-entry manifest:full-path="Pictures/10000000000001EA0000017B9580191C763EA4B0.png" manifest:media-type="image/png"/>
  <manifest:file-entry manifest:full-path="Pictures/10000000000001B0000001B44601F8A66CD2AF6B.png" manifest:media-type="image/png"/>
  <manifest:file-entry manifest:full-path="Pictures/1000000000000198000001B6B95E643893A0359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Trebuchet MS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1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p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3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11.377cm"/>
      <style:paragraph-properties style:writing-mode="lr-tb"/>
    </style:style>
    <style:style style:name="gr6" style:family="graphic" style:parent-style-name="standard">
      <style:graphic-properties draw:stroke="none" draw:fill="none" fo:min-height="1.424cm"/>
      <style:paragraph-properties style:writing-mode="lr-tb"/>
    </style:style>
    <style:style style:name="gr7" style:family="graphic" style:parent-style-name="standard">
      <style:graphic-properties draw:stroke="none" draw:fill="none" fo:min-height="2.845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6.063cm"/>
    </style:style>
    <style:style style:name="gr10" style:family="graphic" style:parent-style-name="standard">
      <style:graphic-properties draw:stroke="none" draw:fill="none" fo:min-height="7.75cm"/>
      <style:paragraph-properties style:writing-mode="lr-tb"/>
    </style:style>
    <style:style style:name="gr11" style:family="graphic" style:parent-style-name="standard">
      <style:graphic-properties draw:stroke="none" draw:fill="none" fo:min-height="10.666cm"/>
      <style:paragraph-properties style:writing-mode="lr-tb"/>
    </style:style>
    <style:style style:name="gr12" style:family="graphic" style:parent-style-name="standard">
      <style:graphic-properties draw:stroke="none" draw:fill="none" fo:min-height="5.689cm"/>
      <style:paragraph-properties style:writing-mode="lr-tb"/>
    </style:style>
    <style:style style:name="gr1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title">
      <style:graphic-properties draw:auto-grow-height="true" fo:min-height="3.681cm"/>
      <style:paragraph-properties style:writing-mode="lr-tb"/>
    </style:style>
    <style:style style:name="pr9" style:family="presentation" style:parent-style-name="Title_20_and_20_Content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 style:font-size-asian="48pt" style:font-size-complex="4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Trebuchet M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Trebuchet M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style:writing-mode="lr-tb"/>
      <style:text-properties fo:font-weight="bold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style:writing-mode="lr-tb"/>
      <style:text-properties fo:font-size="20pt" fo:font-weight="bold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48pt" fo:letter-spacing="normal" fo:language="en" fo:country="US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0pt" fo:font-weight="bold"/>
    </style:style>
    <style:style style:name="T12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9cm" svg:height="16cm" svg:x="0.2cm" svg:y="0.1cm" presentation:class="title" presentation:user-transformed="true">
          <draw:text-box>
            <text:p text:style-name="P1"><text:span text:style-name="T1">Exploration des données </text:span><text:span text:style-name="T1"><text:line-break/></text:span><text:span text:style-name="T1"><text:line-break/></text:span><text:span text:style-name="T1">Open Food Facts</text:span><text:span text:style-name="T1"><text:line-break/></text:span><text:span text:style-name="T1"><text:line-break/></text:span><text:span text:style-name="T1">pour</text:span><text:span text:style-name="T1"><text:line-break/></text:span><text:span text:style-name="T1"><text:line-break/></text:span><text:span text:style-name="T1">Santé publique Fran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Title 1_0" presentation:style-name="pr3" draw:text-style-name="P4" draw:layer="layout" svg:width="23.954cm" svg:height="3.681cm" svg:x="1.125cm" svg:y="1.159cm" presentation:class="title" presentation:user-transformed="true">
          <draw:text-box>
            <text:p text:style-name="P1"><text:span text:style-name="T2">Sommaire</text:span></text:p>
          </draw:text-box>
        </draw:frame>
        <draw:frame draw:name="Content Placeholder 2_7" presentation:style-name="pr4" draw:text-style-name="P5" draw:layer="layout" svg:width="23.954cm" svg:height="12.186cm" svg:x="1.125cm" svg:y="5.116cm" presentation:class="outline" presentation:user-transformed="true">
          <draw:text-box>
            <text:list text:style-name="L2">
              <text:list-item>
                <text:p>L’appel à projets</text:p>
              </text:list-item>
              <text:list-item>
                <text:p>Le jeu de données</text:p>
              </text:list-item>
              <text:list-item>
                <text:p>Cadre de l’étude</text:p>
              </text:list-item>
              <text:list-item>
                <text:p>Nettoyage des données</text:p>
              </text:list-item>
              <text:list-item>
                <text:p>Analyse exploratoir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_5" presentation:style-name="pr6" draw:text-style-name="P4" draw:layer="layout" svg:width="23.954cm" svg:height="3.681cm" svg:x="1.125cm" svg:y="1.159cm" presentation:class="title" presentation:user-transformed="true">
          <draw:text-box>
            <text:p text:style-name="P1"><text:span text:style-name="T2">L’appel à projets</text:span></text:p>
          </draw:text-box>
        </draw:frame>
        <draw:frame draw:name="Content Placeholder 2_1" presentation:style-name="pr7" draw:text-style-name="P5" draw:layer="layout" svg:width="23.954cm" svg:height="12.186cm" svg:x="1.125cm" svg:y="5.116cm" presentation:class="outline" presentation:user-transformed="true">
          <draw:text-box>
            <text:list text:style-name="L2">
              <text:list-item>
                <text:p>Santé publique France</text:p>
              </text:list-item>
              <text:list-item>
                <text:p>Open Food Fact</text:p>
              </text:list-item>
              <text:list-item>
                <text:p>Données accessibl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2T11">
        <office:forms form:automatic-focus="false" form:apply-design-mode="false"/>
        <draw:frame draw:style-name="gr2" draw:text-style-name="P7" draw:layer="layout" svg:width="10.898cm" svg:height="7.786cm" svg:x="0.802cm" svg:y="4cm">
          <draw:image xlink:href="Pictures/10000000000002CA000001A122B767C2EBDA9617.png" xlink:type="simple" xlink:show="embed" xlink:actuate="onLoad" draw:mime-type="image/png">
            <text:p/>
          </draw:image>
        </draw:frame>
        <draw:frame draw:style-name="gr2" draw:text-style-name="P7" draw:layer="layout" svg:width="10.033cm" svg:height="7.882cm" svg:x="23.267cm" svg:y="10.489cm">
          <draw:image xlink:href="Pictures/10000000000000FC000000C60E936D2A07265099.png" xlink:type="simple" xlink:show="embed" xlink:actuate="onLoad" draw:mime-type="image/png">
            <text:p/>
          </draw:image>
        </draw:frame>
        <draw:frame draw:style-name="gr2" draw:text-style-name="P7" draw:layer="layout" svg:width="9.905cm" svg:height="5.566cm" svg:x="12.595cm" svg:y="8.9cm">
          <draw:image xlink:href="Pictures/10000000000001D400000107C003A2BE52CB8327.png" xlink:type="simple" xlink:show="embed" xlink:actuate="onLoad" draw:mime-type="image/png">
            <text:p/>
          </draw:image>
        </draw:frame>
        <draw:frame presentation:style-name="pr8" draw:text-style-name="P8" draw:layer="layout" svg:width="29.209cm" svg:height="3.681cm" svg:x="0.501cm" svg:y="-0.68cm" presentation:class="title" presentation:user-transformed="true">
          <draw:text-box>
            <text:p><text:span text:style-name="T3">L’appel à proje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_2" presentation:style-name="pr10" draw:text-style-name="P4" draw:layer="layout" svg:width="23.954cm" svg:height="3.681cm" svg:x="1.125cm" svg:y="1.159cm" presentation:class="title" presentation:user-transformed="true">
          <draw:text-box>
            <text:p text:style-name="P1"><text:span text:style-name="T2">Le jeu de données</text:span></text:p>
          </draw:text-box>
        </draw:frame>
        <draw:frame draw:name="Content Placeholder 2_9" presentation:style-name="pr11" draw:text-style-name="P5" draw:layer="layout" svg:width="23.954cm" svg:height="12.186cm" svg:x="1.125cm" svg:y="5.116cm" presentation:class="outline" presentation:user-transformed="true">
          <draw:text-box>
            <text:list text:style-name="L2">
              <text:list-item>
                <text:p>Dimensionnalité</text:p>
              </text:list-item>
              <text:list-item>
                <text:p>Types</text:p>
              </text:list-item>
              <text:list-item>
                <text:p>Contenu</text:p>
              </text:list-item>
              <text:list-item>
                <text:p>Valeur manquan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_5f_" presentation:presentation-page-layout-name="AL2T11">
        <office:forms form:automatic-focus="false" form:apply-design-mode="false"/>
        <draw:frame draw:name="Content Placeholder 2_5" presentation:style-name="pr12" draw:text-style-name="P5" draw:layer="layout" svg:width="29.209cm" svg:height="12.186cm" svg:x="2.291cm" svg:y="3.814cm" presentation:class="outline" presentation:user-transformed="true">
          <draw:text-box>
            <text:list text:style-name="L3">
              <text:list-header>
                <text:p text:style-name="P9"><text:span text:style-name="T4"/></text:p>
              </text:list-header>
              <text:list-item>
                <text:p text:style-name="P9"><text:span text:style-name="T4">320772 lignes : <text:s/>Produits alimentaires</text:span></text:p>
                <text:p text:style-name="P9"><text:span text:style-name="T4"/></text:p>
              </text:list-item>
              <text:list-item>
                <text:p text:style-name="P9"><text:span text:style-name="T4">162 colonnes : Informations relatives aux produit</text:span></text:p>
                <text:p text:style-name="P9"><text:span text:style-name="T4"/></text:p>
                <text:list>
                  <text:list-item>
                    <text:list>
                      <text:list-item>
                        <text:p><text:span text:style-name="T4">106 colonnes quantitatives </text:span></text:p>
                      </text:list-item>
                      <text:list-item>
                        <text:p><text:span text:style-name="T4">56 colonnes qualitatives.</text:span></text:p>
                      </text:list-item>
                    </text:list>
                  </text:list-item>
                </text:list>
                <text:p text:style-name="P9"><text:span text:style-name="T4"/></text:p>
              </text:list-item>
            </text:list>
          </draw:text-box>
        </draw:frame>
        <draw:frame presentation:style-name="pr8" draw:text-style-name="P8" draw:layer="layout" svg:width="29.209cm" svg:height="3.681cm" svg:x="0.501cm" svg:y="-0.68cm" presentation:class="title" presentation:user-transformed="true">
          <draw:text-box>
            <text:p><text:span text:style-name="T3">Le jeu de données – le fichi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_5f_" presentation:presentation-page-layout-name="AL2T11">
        <office:forms form:automatic-focus="false" form:apply-design-mode="false"/>
        <draw:frame draw:name="Content Placeholder 2_12" presentation:style-name="pr13" draw:text-style-name="P5" draw:layer="layout" svg:width="29.209cm" svg:height="12.186cm" svg:x="1.93cm" svg:y="3.571cm" presentation:class="outline" presentation:user-transformed="true">
          <draw:text-box>
            <text:list text:style-name="L3">
              <text:list-header>
                <text:p text:style-name="P9"><text:span text:style-name="T5"/></text:p>
              </text:list-header>
            </text:list>
            <text:list text:style-name="L2">
              <text:list-item>
                <text:p><text:span text:style-name="T5">I</text:span><text:span text:style-name="T4">nformations générales (produit, créateur, date...)</text:span></text:p>
              </text:list-item>
              <text:list-item>
                <text:p>Etiquettes ( origine, catégorie…)</text:p>
              </text:list-item>
              <text:list-item>
                <text:p>Ingrédients</text:p>
              </text:list-item>
              <text:list-item>
                <text:p>Divers (additifs…)</text:p>
              </text:list-item>
              <text:list-item>
                <text:p>Apports nutritionnels</text:p>
              </text:list-item>
            </text:list>
          </draw:text-box>
        </draw:frame>
        <draw:frame presentation:style-name="pr8" draw:text-style-name="P8" draw:layer="layout" svg:width="29.209cm" svg:height="3.681cm" svg:x="0.501cm" svg:y="-0.68cm" presentation:class="title" presentation:user-transformed="true">
          <draw:text-box>
            <text:p><text:span text:style-name="T3">Le jeu de données - inform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_5f_" presentation:presentation-page-layout-name="AL2T11">
        <office:forms form:automatic-focus="false" form:apply-design-mode="false"/>
        <draw:frame presentation:style-name="pr8" draw:text-style-name="P8" draw:layer="layout" svg:width="29.209cm" svg:height="3.681cm" svg:x="0.5cm" svg:y="-0.681cm" presentation:class="title" presentation:user-transformed="true">
          <draw:text-box>
            <text:p><text:span text:style-name="T3">Le jeu de données – valeurs manquantes</text:span></text:p>
          </draw:text-box>
        </draw:frame>
        <draw:frame draw:style-name="gr2" draw:text-style-name="P7" draw:layer="layout" svg:width="29.091cm" svg:height="16cm" svg:x="2.3cm" svg:y="2.5cm">
          <draw:image xlink:href="Pictures/10000000000006C10000041707DB27A2C40E31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_4" presentation:style-name="pr14" draw:text-style-name="P4" draw:layer="layout" svg:width="23.954cm" svg:height="3.681cm" svg:x="1.125cm" svg:y="1.159cm" presentation:class="title" presentation:user-transformed="true">
          <draw:text-box>
            <text:p text:style-name="P1"><text:span text:style-name="T2">Le cadre de l’étude</text:span></text:p>
          </draw:text-box>
        </draw:frame>
        <draw:frame draw:name="Content Placeholder 2_11" presentation:style-name="pr15" draw:text-style-name="P5" draw:layer="layout" svg:width="23.954cm" svg:height="12.186cm" svg:x="1.125cm" svg:y="5.116cm" presentation:class="outline" presentation:user-transformed="true">
          <draw:text-box>
            <text:list text:style-name="L2">
              <text:list-item>
                <text:p>Objectif / cadre</text:p>
              </text:list-item>
              <text:list-item>
                <text:p>Valeurs manquantes</text:p>
              </text:list-item>
              <text:list-item>
                <text:p>Filtrage</text:p>
              </text:list-item>
              <text:list-item>
                <text:p>Indicateu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_5f_" presentation:presentation-page-layout-name="AL2T11">
        <office:forms form:automatic-focus="false" form:apply-design-mode="false"/>
        <draw:frame draw:style-name="gr2" draw:text-style-name="P7" draw:layer="layout" svg:width="8.778cm" svg:height="5.948cm" svg:x="11.5cm" svg:y="7cm">
          <draw:image xlink:href="Pictures/1000000000000111000000B9A6FE97677D508620.png" xlink:type="simple" xlink:show="embed" xlink:actuate="onLoad" draw:mime-type="image/png">
            <text:p/>
          </draw:image>
        </draw:frame>
        <draw:frame draw:style-name="gr2" draw:text-style-name="P7" draw:layer="layout" svg:width="6.351cm" svg:height="4.537cm" svg:x="2cm" svg:y="7.5cm">
          <draw:image xlink:href="Pictures/10000000000002CA000001A122B767C2EBDA9617.png" xlink:type="simple" xlink:show="embed" xlink:actuate="onLoad" draw:mime-type="image/png">
            <text:p/>
          </draw:image>
        </draw:frame>
        <draw:frame draw:style-name="gr2" draw:text-style-name="P7" draw:layer="layout" svg:width="8.496cm" svg:height="9.5cm" svg:x="23.5cm" svg:y="5.5cm">
          <draw:image xlink:href="Pictures/10000000000000D4000000EDFA31F2D5BAB9B645.png" xlink:type="simple" xlink:show="embed" xlink:actuate="onLoad" draw:mime-type="image/png">
            <text:p/>
          </draw:image>
        </draw:frame>
        <draw:frame presentation:style-name="pr8" draw:text-style-name="P8" draw:layer="layout" svg:width="29.209cm" svg:height="3.681cm" svg:x="0.501cm" svg:y="-0.68cm" presentation:class="title" presentation:user-transformed="true">
          <draw:text-box>
            <text:p text:style-name="P10"><text:span text:style-name="T3">Le cadre de l’étude – objecti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_5f_" presentation:presentation-page-layout-name="AL2T11">
        <office:forms form:automatic-focus="false" form:apply-design-mode="false"/>
        <draw:frame draw:style-name="gr2" draw:text-style-name="P7" draw:layer="layout" svg:width="31.523cm" svg:height="16cm" svg:x="0.477cm" svg:y="2.5cm">
          <draw:image xlink:href="Pictures/10000000000006BE00000413E782CD0D08AAF489.png" xlink:type="simple" xlink:show="embed" xlink:actuate="onLoad" draw:mime-type="image/png">
            <text:p/>
          </draw:image>
        </draw:frame>
        <draw:frame draw:style-name="gr3" draw:text-style-name="P11" draw:layer="layout" svg:width="9.037cm" svg:height="1.673cm" svg:x="23.163cm" svg:y="4.737cm">
          <draw:text-box>
            <text:p><text:span text:style-name="T6">100 colonnes ont plus de </text:span></text:p>
            <text:p><text:span text:style-name="T6">90% de </text:span><text:span text:style-name="T7">valeurs</text:span><text:span text:style-name="T6"> manquantes</text:span></text:p>
          </draw:text-box>
        </draw:frame>
        <draw:frame presentation:style-name="pr8" draw:text-style-name="P8" draw:layer="layout" svg:width="29.209cm" svg:height="3.681cm" svg:x="0.501cm" svg:y="-0.68cm" presentation:class="title" presentation:user-transformed="true">
          <draw:text-box>
            <text:p text:style-name="P10"><text:span text:style-name="T3">Le cadre de l’étude – valeurs manquan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_5f_" presentation:presentation-page-layout-name="AL2T11">
        <office:forms form:automatic-focus="false" form:apply-design-mode="false"/>
        <draw:frame draw:style-name="gr3" draw:text-style-name="P12" draw:layer="layout" svg:width="10.5cm" svg:height="1.673cm" svg:x="1.4cm" svg:y="11.837cm">
          <draw:text-box>
            <text:p>Groupes de pays <text:s text:c="62"/></text:p>
          </draw:text-box>
        </draw:frame>
        <draw:frame draw:style-name="gr3" draw:text-style-name="P11" draw:layer="layout" svg:width="17.942cm" svg:height="1.673cm" svg:x="1.3cm" svg:y="14.827cm">
          <draw:text-box>
            <text:p><text:span text:style-name="T6">98440 produits sont des produits vendus en France</text:span></text:p>
          </draw:text-box>
        </draw:frame>
        <draw:frame draw:style-name="gr3" draw:text-style-name="P11" draw:layer="layout" svg:width="19.5cm" svg:height="1.673cm" svg:x="1.3cm" svg:y="16cm">
          <draw:text-box>
            <text:p><text:span text:style-name="T6">6 colonnes ont plus de 90% de valeurs manquantes. <text:s/></text:span></text:p>
          </draw:text-box>
        </draw:frame>
        <draw:frame draw:style-name="gr2" draw:text-style-name="P7" draw:layer="layout" svg:width="11.5cm" svg:height="6.863cm" svg:x="21cm" svg:y="4.359cm">
          <draw:image xlink:href="Pictures/10000000000006BE000004062567A6F09EBF091C.png" xlink:type="simple" xlink:show="embed" xlink:actuate="onLoad" draw:mime-type="image/png">
            <text:p/>
          </draw:image>
        </draw:frame>
        <draw:frame draw:style-name="gr4" draw:text-style-name="P12" draw:layer="layout" svg:width="5.5cm" svg:height="0.963cm" svg:x="21cm" svg:y="11.9cm">
          <draw:text-box>
            <text:p>Après filtrage</text:p>
          </draw:text-box>
        </draw:frame>
        <draw:frame presentation:style-name="pr8" draw:text-style-name="P8" draw:layer="layout" svg:width="29.209cm" svg:height="3.681cm" svg:x="0.501cm" svg:y="-0.68cm" presentation:class="title" presentation:user-transformed="true">
          <draw:text-box>
            <text:p><text:span text:style-name="T3">Le cadre de l’étude - produits vendus en France</text:span></text:p>
          </draw:text-box>
        </draw:frame>
        <draw:frame draw:style-name="gr2" draw:text-style-name="P7" draw:layer="layout" svg:width="13.06cm" svg:height="7.662cm" svg:x="1.34cm" svg:y="3.538cm">
          <draw:image xlink:href="Pictures/10000000000002690000016ABC5933717BA07E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_5f_" presentation:presentation-page-layout-name="AL2T11">
        <office:forms form:automatic-focus="false" form:apply-design-mode="false"/>
        <draw:frame draw:style-name="gr5" draw:text-style-name="P12" draw:layer="layout" svg:width="28.48cm" svg:height="11.627cm" svg:x="2.02cm" svg:y="4.06cm">
          <draw:text-box>
            <text:p><text:span text:style-name="T8">Quantitatifs</text:span></text:p>
            <text:p/>
            <text:p>Colonnes terminant par "_100g" </text:p>
            <text:p>Informations nutritionnelles pour 100 grammes.</text:p>
            <text:p/>
            <text:p><text:span text:style-name="T9">Nutriments, Energie, Nutriscore</text:span></text:p>
            <text:p><text:span text:style-name="T10"/></text:p>
            <text:p/>
            <text:p><text:span text:style-name="T8">Qualitatifs</text:span></text:p>
            <text:p/>
            <text:p>product_name </text:p>
            <text:p>nutrition_grade_fr (grade de 'a' à 'e')</text:p>
            <text:p/>
            <text:p><text:span text:style-name="T9">Produit, nutrigrade</text:span></text:p>
            <text:p/>
            <text:p/>
          </draw:text-box>
        </draw:frame>
        <draw:frame draw:style-name="gr2" draw:text-style-name="P7" draw:layer="layout" svg:width="10.54cm" svg:height="7.259cm" svg:x="19.46cm" svg:y="5.241cm">
          <draw:image xlink:href="Pictures/10000000000001F2000001570F4BE9A2BBFEA57B.png" xlink:type="simple" xlink:show="embed" xlink:actuate="onLoad" draw:mime-type="image/png">
            <text:p/>
          </draw:image>
        </draw:frame>
        <draw:frame draw:style-name="gr6" draw:text-style-name="P13" draw:layer="layout" svg:width="7.741cm" svg:height="1.674cm" svg:x="2cm" svg:y="16.2cm">
          <draw:text-box>
            <text:p><text:span text:style-name="T11">–</text:span><text:span text:style-name="T11">&gt; 12 colonnes</text:span></text:p>
          </draw:text-box>
        </draw:frame>
        <draw:frame draw:style-name="gr6" draw:text-style-name="P12" draw:layer="layout" svg:width="7.741cm" svg:height="1.674cm" svg:x="21.3cm" svg:y="12.826cm">
          <draw:text-box>
            <text:p>Nutriscore : FR et UK</text:p>
            <text:p/>
          </draw:text-box>
        </draw:frame>
        <draw:frame presentation:style-name="pr8" draw:text-style-name="P8" draw:layer="layout" svg:width="29.209cm" svg:height="3.681cm" svg:x="0.501cm" svg:y="-0.68cm" presentation:class="title" presentation:user-transformed="true">
          <draw:text-box>
            <text:p text:style-name="P10"><text:span text:style-name="T3">Le cadre de l’étude - indicateu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_7" presentation:style-name="pr16" draw:text-style-name="P4" draw:layer="layout" svg:width="23.954cm" svg:height="3.681cm" svg:x="1.125cm" svg:y="1.159cm" presentation:class="title" presentation:user-transformed="true">
          <draw:text-box>
            <text:p text:style-name="P1"><text:span text:style-name="T2">Nettoyage des données</text:span></text:p>
          </draw:text-box>
        </draw:frame>
        <draw:frame draw:name="Content Placeholder 2_13" presentation:style-name="pr17" draw:text-style-name="P5" draw:layer="layout" svg:width="23.954cm" svg:height="12.186cm" svg:x="1.125cm" svg:y="5.116cm" presentation:class="outline" presentation:user-transformed="true">
          <draw:text-box>
            <text:list text:style-name="L2">
              <text:list-item>
                <text:p>Valeurs manquantes</text:p>
              </text:list-item>
              <text:list-item>
                <text:p>Doublons</text:p>
              </text:list-item>
              <text:list-item>
                <text:p>Valeurs aberrantes</text:p>
              </text:list-item>
              <text:list-item>
                <text:p>Valeurs atypiques</text:p>
              </text:list-item>
              <text:list-item>
                <text:p>Imputation des valeurs manquan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2T11">
        <office:forms form:automatic-focus="false" form:apply-design-mode="false"/>
        <draw:frame draw:style-name="gr4" draw:text-style-name="P12" draw:layer="layout" svg:width="12.559cm" svg:height="0.963cm" svg:x="17.5cm" svg:y="8cm">
          <draw:text-box>
            <text:p>7193 lignes sans nom de produit</text:p>
          </draw:text-box>
        </draw:frame>
        <draw:frame draw:style-name="gr4" draw:text-style-name="P12" draw:layer="layout" svg:width="14.028cm" svg:height="0.963cm" svg:x="17.472cm" svg:y="9.8cm">
          <draw:text-box>
            <text:p>30175 produits sans nutrition score / grade</text:p>
          </draw:text-box>
        </draw:frame>
        <draw:frame draw:style-name="gr4" draw:text-style-name="P11" draw:layer="layout" svg:width="13.818cm" svg:height="0.963cm" svg:x="17.5cm" svg:y="11.537cm">
          <draw:text-box>
            <text:p><text:span text:style-name="T6">37368 lignes supprimées </text:span></text:p>
          </draw:text-box>
        </draw:frame>
        <draw:frame draw:style-name="gr2" draw:text-style-name="P7" draw:layer="layout" svg:width="13.336cm" svg:height="13.5cm" svg:x="1.5cm" svg:y="4cm">
          <draw:image xlink:href="Pictures/10000000000001E8000001EEA02D97C14616F14A.png" xlink:type="simple" xlink:show="embed" xlink:actuate="onLoad" draw:mime-type="image/png">
            <text:p/>
          </draw:image>
        </draw:frame>
        <draw:frame presentation:style-name="pr8" draw:text-style-name="P8" draw:layer="layout" svg:width="29.209cm" svg:height="3.681cm" svg:x="0.501cm" svg:y="-0.68cm" presentation:class="title" presentation:user-transformed="true">
          <draw:text-box>
            <text:p text:style-name="P10"><text:span text:style-name="T3">Nettoyage – valeurs manquan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_5f_" presentation:presentation-page-layout-name="AL2T11">
        <office:forms form:automatic-focus="false" form:apply-design-mode="false"/>
        <draw:frame draw:style-name="gr2" draw:text-style-name="P7" draw:layer="layout" svg:width="14.071cm" svg:height="12.5cm" svg:x="1.5cm" svg:y="5.3cm">
          <draw:image xlink:href="Pictures/10000000000002A90000025D8EA2569D28C9C25D.png" xlink:type="simple" xlink:show="embed" xlink:actuate="onLoad" draw:mime-type="image/png">
            <text:p/>
          </draw:image>
        </draw:frame>
        <draw:frame draw:style-name="gr2" draw:text-style-name="P7" draw:layer="layout" svg:width="12.353cm" svg:height="12.432cm" svg:x="18.9cm" svg:y="5.3cm">
          <draw:image xlink:href="Pictures/10000000000001E9000002634F4930399F685029.png" xlink:type="simple" xlink:show="embed" xlink:actuate="onLoad" draw:mime-type="image/png">
            <text:p/>
          </draw:image>
        </draw:frame>
        <draw:frame draw:style-name="gr7" draw:text-style-name="P12" draw:layer="layout" svg:width="17.18cm" svg:height="3.095cm" svg:x="1.32cm" svg:y="2.737cm">
          <draw:text-box>
            <text:p>892 lignes complètes sont des doublons</text:p>
            <text:p/>
            <text:p>Doublons des noms de produit :</text:p>
            <text:p/>
          </draw:text-box>
        </draw:frame>
        <draw:frame presentation:style-name="pr8" draw:text-style-name="P8" draw:layer="layout" svg:width="29.209cm" svg:height="3.681cm" svg:x="0.501cm" svg:y="-0.68cm" presentation:class="title" presentation:user-transformed="true">
          <draw:text-box>
            <text:p text:style-name="P10"><text:span text:style-name="T3">Nettoyage – doublons</text:span></text:p>
          </draw:text-box>
        </draw:frame>
        <draw:line draw:style-name="gr8" draw:text-style-name="P7" draw:layer="layout" svg:x1="15.672cm" svg:y1="11.4cm" svg:x2="18.751cm" svg:y2="11.4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2T11">
        <office:forms form:automatic-focus="false" form:apply-design-mode="false"/>
        <draw:frame draw:style-name="gr2" draw:text-style-name="P7" draw:layer="layout" svg:width="28.053cm" svg:height="3.5cm" svg:x="2cm" svg:y="4.5cm">
          <draw:image xlink:href="Pictures/100000000000046A0000008D6386047972303CD6.png" xlink:type="simple" xlink:show="embed" xlink:actuate="onLoad" draw:mime-type="image/png">
            <text:p/>
          </draw:image>
        </draw:frame>
        <draw:frame draw:style-name="gr3" draw:text-style-name="P11" draw:layer="layout" svg:width="23.111cm" svg:height="1.673cm" svg:x="1.889cm" svg:y="9.937cm">
          <draw:text-box>
            <text:p><text:span text:style-name="T6">14660 lignes ont été supprimées lors de la suppression des doublons.</text:span></text:p>
          </draw:text-box>
        </draw:frame>
        <draw:frame presentation:style-name="pr8" draw:text-style-name="P8" draw:layer="layout" svg:width="29.209cm" svg:height="3.681cm" svg:x="0.501cm" svg:y="-0.68cm" presentation:class="title" presentation:user-transformed="true">
          <draw:text-box>
            <text:p text:style-name="P10"><text:span text:style-name="T3">Nettoyage – doubl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and_20_Content_5f_" presentation:presentation-page-layout-name="AL2T11">
        <office:forms form:automatic-focus="false" form:apply-design-mode="false"/>
        <draw:frame draw:style-name="gr2" draw:text-style-name="P7" draw:layer="layout" svg:width="33.021cm" svg:height="9cm" svg:x="0.521cm" svg:y="3.3cm">
          <draw:image xlink:href="Pictures/10000000000004E3000001556D6E8AE677F21A94.png" xlink:type="simple" xlink:show="embed" xlink:actuate="onLoad" draw:mime-type="image/png">
            <text:p/>
          </draw:image>
        </draw:frame>
        <draw:frame draw:style-name="gr4" draw:text-style-name="P12" draw:layer="layout" svg:width="9.091cm" svg:height="0.963cm" svg:x="1.5cm" svg:y="13.7cm">
          <draw:text-box>
            <text:p>Des valeurs supérieures à 100</text:p>
          </draw:text-box>
        </draw:frame>
        <draw:frame draw:style-name="gr3" draw:text-style-name="P12" draw:layer="layout" svg:width="17.5cm" svg:height="1.673cm" svg:x="1.5cm" svg:y="16.3cm">
          <draw:text-box>
            <text:p>Densité massique (lipides) : 37 KJ/g soit 3700 KJ/100g.</text:p>
          </draw:text-box>
        </draw:frame>
        <draw:frame draw:style-name="gr4" draw:text-style-name="P12" draw:layer="layout" svg:width="9.091cm" svg:height="0.963cm" svg:x="1.501cm" svg:y="15.001cm">
          <draw:text-box>
            <text:p>Des valeurs négatives</text:p>
          </draw:text-box>
        </draw:frame>
        <draw:frame presentation:style-name="pr8" draw:text-style-name="P8" draw:layer="layout" svg:width="29.209cm" svg:height="3.681cm" svg:x="0.501cm" svg:y="-0.68cm" presentation:class="title" presentation:user-transformed="true">
          <draw:text-box>
            <text:p text:style-name="P10"><text:span text:style-name="T3">Nettoyage – valeurs aberran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and_20_Content_5f_" presentation:presentation-page-layout-name="AL2T11">
        <office:forms form:automatic-focus="false" form:apply-design-mode="false"/>
        <draw:frame draw:style-name="gr2" draw:text-style-name="P7" draw:layer="layout" svg:width="28.5cm" svg:height="14.691cm" svg:x="3cm" svg:y="3.409cm">
          <draw:image xlink:href="Pictures/100000000000036B000002243E8DB6DA3283FF85.png" xlink:type="simple" xlink:show="embed" xlink:actuate="onLoad" draw:mime-type="image/png">
            <text:p/>
          </draw:image>
        </draw:frame>
        <draw:frame draw:style-name="gr3" draw:text-style-name="P12" draw:layer="layout" svg:width="9cm" svg:height="1.673cm" svg:x="13cm" svg:y="2.427cm">
          <draw:text-box>
            <text:p><text:span text:style-name="T7">Nutriments (grammes)</text:span></text:p>
          </draw:text-box>
        </draw:frame>
        <draw:frame presentation:style-name="pr8" draw:text-style-name="P8" draw:layer="layout" svg:width="29.209cm" svg:height="3.681cm" svg:x="0.501cm" svg:y="-0.68cm" presentation:class="title" presentation:user-transformed="true">
          <draw:text-box>
            <text:p text:style-name="P10"><text:span text:style-name="T3">Nettoyage – valeurs atypiqu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and_20_Content_5f_" presentation:presentation-page-layout-name="AL2T11">
        <office:forms form:automatic-focus="false" form:apply-design-mode="false"/>
        <draw:frame draw:style-name="gr2" draw:text-style-name="P7" draw:layer="layout" svg:width="8.188cm" svg:height="8.214cm" svg:x="3cm" svg:y="4.437cm">
          <draw:image xlink:href="Pictures/100000000000013C0000013DD91AEFBC3B174AB1.png" xlink:type="simple" xlink:show="embed" xlink:actuate="onLoad" draw:mime-type="image/png">
            <text:p/>
          </draw:image>
        </draw:frame>
        <draw:frame draw:style-name="gr4" draw:text-style-name="P12" draw:layer="layout" svg:width="6.805cm" svg:height="0.963cm" svg:x="2.8cm" svg:y="13.037cm">
          <draw:text-box>
            <text:p>valeurs négatives </text:p>
          </draw:text-box>
        </draw:frame>
        <draw:frame draw:style-name="gr4" draw:text-style-name="P12" draw:layer="layout" svg:width="4.866cm" svg:height="0.963cm" svg:x="2.8cm" svg:y="14cm">
          <draw:text-box>
            <text:p>sels et fibres</text:p>
          </draw:text-box>
        </draw:frame>
        <draw:frame draw:style-name="gr4" draw:text-style-name="P12" draw:layer="layout" svg:width="2.614cm" svg:height="0.963cm" svg:x="8.4cm" svg:y="14.074cm">
          <draw:text-box>
            <text:p>43,50 g</text:p>
          </draw:text-box>
        </draw:frame>
        <draw:frame draw:style-name="gr4" draw:text-style-name="P12" draw:layer="layout" svg:width="2.792cm" svg:height="0.963cm" svg:x="11.014cm" svg:y="14.111cm">
          <draw:text-box>
            <text:p><text:s/>39,10 g</text:p>
          </draw:text-box>
        </draw:frame>
        <draw:frame draw:style-name="gr4" draw:text-style-name="P12" draw:layer="layout" svg:width="5.202cm" svg:height="0.963cm" svg:x="13.7cm" svg:y="14.111cm">
          <draw:text-box>
            <text:p>–&gt; 40 g </text:p>
          </draw:text-box>
        </draw:frame>
        <draw:frame draw:style-name="gr4" draw:text-style-name="P12" draw:layer="layout" svg:width="6.564cm" svg:height="0.963cm" svg:x="8.2cm" svg:y="15.037cm">
          <draw:text-box>
            <text:p><text:s/>16 g (40/2.5)</text:p>
          </draw:text-box>
        </draw:frame>
        <draw:frame draw:style-name="gr3" draw:text-style-name="P11" draw:layer="layout" svg:width="20.714cm" svg:height="1.673cm" svg:x="2.786cm" svg:y="16.737cm">
          <draw:text-box>
            <text:p><text:span text:style-name="T6">Les valeurs aberrantes seront remplacées par des valeurs nulles.</text:span></text:p>
          </draw:text-box>
        </draw:frame>
        <draw:frame draw:style-name="gr3" draw:text-style-name="P12" draw:layer="layout" svg:width="9cm" svg:height="1.673cm" svg:x="3cm" svg:y="3.319cm">
          <draw:text-box>
            <text:p><text:span text:style-name="T7">Bornes 1,5*interquartiles</text:span></text:p>
          </draw:text-box>
        </draw:frame>
        <draw:frame draw:style-name="gr4" draw:text-style-name="P12" draw:layer="layout" svg:width="4.866cm" svg:height="0.963cm" svg:x="2.8cm" svg:y="14.901cm">
          <draw:text-box>
            <text:p>sodium</text:p>
          </draw:text-box>
        </draw:frame>
        <draw:frame draw:style-name="gr2" draw:text-style-name="P7" draw:layer="layout" svg:width="10.371cm" svg:height="8.021cm" svg:x="19.7cm" svg:y="4.514cm">
          <draw:image xlink:href="Pictures/10000000000001EA0000017B9580191C763EA4B0.png" xlink:type="simple" xlink:show="embed" xlink:actuate="onLoad" draw:mime-type="image/png">
            <text:p/>
          </draw:image>
        </draw:frame>
        <draw:frame draw:style-name="gr3" draw:text-style-name="P12" draw:layer="layout" svg:width="9cm" svg:height="1.673cm" svg:x="21.7cm" svg:y="3.3cm">
          <draw:text-box>
            <text:p><text:span text:style-name="T7">Energie (KJoules)</text:span></text:p>
          </draw:text-box>
        </draw:frame>
        <draw:frame draw:style-name="gr4" draw:text-style-name="P12" draw:layer="layout" svg:width="13cm" svg:height="0.963cm" svg:x="19.5cm" svg:y="13.119cm">
          <draw:text-box>
            <text:p>Outliers sous le seuil défini précédemment.</text:p>
          </draw:text-box>
        </draw:frame>
        <draw:frame presentation:style-name="pr8" draw:text-style-name="P8" draw:layer="layout" svg:width="29.209cm" svg:height="3.681cm" svg:x="0.501cm" svg:y="-0.68cm" presentation:class="title" presentation:user-transformed="true">
          <draw:text-box>
            <text:p text:style-name="P10"><text:span text:style-name="T3">Nettoyage – valeurs atypiqu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and_20_Content_5f_" presentation:presentation-page-layout-name="AL2T11">
        <office:forms form:automatic-focus="false" form:apply-design-mode="false"/>
        <draw:frame draw:style-name="gr2" draw:text-style-name="P7" draw:layer="layout" svg:width="12.5cm" svg:height="12.616cm" svg:x="0.5cm" svg:y="4.3cm">
          <draw:image xlink:href="Pictures/10000000000001B0000001B44601F8A66CD2AF6B.png" xlink:type="simple" xlink:show="embed" xlink:actuate="onLoad" draw:mime-type="image/png">
            <text:p/>
          </draw:image>
        </draw:frame>
        <draw:frame draw:style-name="gr2" draw:text-style-name="P7" draw:layer="layout" svg:width="11.669cm" svg:height="12.527cm" svg:x="21.531cm" svg:y="4.273cm">
          <draw:image xlink:href="Pictures/1000000000000198000001B6B95E643893A03591.png" xlink:type="simple" xlink:show="embed" xlink:actuate="onLoad" draw:mime-type="image/png">
            <text:p/>
          </draw:image>
        </draw:frame>
        <draw:frame draw:style-name="gr2" draw:text-style-name="P7" draw:layer="layout" svg:width="7.156cm" svg:height="6.472cm" svg:x="13.7cm" svg:y="9.1cm">
          <draw:image xlink:href="Pictures/10000000000000DC000000C7EBF00883E2997178.png" xlink:type="simple" xlink:show="embed" xlink:actuate="onLoad" draw:mime-type="image/png">
            <text:p/>
          </draw:image>
        </draw:frame>
        <draw:custom-shape draw:style-name="gr9" draw:text-style-name="P14" draw:layer="layout" svg:width="7.5cm" svg:height="1cm" svg:x="13.5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4.866cm" svg:height="0.963cm" svg:x="13.8cm" svg:y="6.3cm">
          <draw:text-box>
            <text:p><text:span text:style-name="T6">KNN Imputer</text:span></text:p>
          </draw:text-box>
        </draw:frame>
        <draw:frame presentation:style-name="pr8" draw:text-style-name="P8" draw:layer="layout" svg:width="29.209cm" svg:height="3.681cm" svg:x="0.501cm" svg:y="-0.68cm" presentation:class="title" presentation:user-transformed="true">
          <draw:text-box>
            <text:p text:style-name="P10"><text:span text:style-name="T3">Nettoyage – imputation des valeurs manquan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2T11">
        <office:forms form:automatic-focus="false" form:apply-design-mode="false"/>
        <draw:frame draw:name="Content Placeholder 2_23" presentation:style-name="pr18" draw:text-style-name="P5" draw:layer="layout" svg:width="29.209cm" svg:height="12.186cm" svg:x="5.929cm" svg:y="4.971cm" presentation:class="outline" presentation:user-transformed="true">
          <draw:text-box>
            <text:p/>
          </draw:text-box>
        </draw:frame>
        <draw:frame draw:style-name="gr2" draw:text-style-name="P7" draw:layer="layout" svg:width="23.171cm" svg:height="15.2cm" svg:x="4.6cm" svg:y="3.3cm">
          <draw:image xlink:href="Pictures/100000000000023800000210467D28242218263E.png" xlink:type="simple" xlink:show="embed" xlink:actuate="onLoad" draw:mime-type="image/png">
            <text:p/>
          </draw:image>
        </draw:frame>
        <draw:frame draw:style-name="gr3" draw:text-style-name="P12" draw:layer="layout" svg:width="6.366cm" svg:height="1.673cm" svg:x="8.734cm" svg:y="2.437cm">
          <draw:text-box>
            <text:p>Avant imputation</text:p>
          </draw:text-box>
        </draw:frame>
        <draw:frame draw:style-name="gr3" draw:text-style-name="P12" draw:layer="layout" svg:width="6.366cm" svg:height="1.673cm" svg:x="19.834cm" svg:y="2.438cm">
          <draw:text-box>
            <text:p>Après imputation</text:p>
          </draw:text-box>
        </draw:frame>
        <draw:frame presentation:style-name="pr8" draw:text-style-name="P8" draw:layer="layout" svg:width="29.209cm" svg:height="3.681cm" svg:x="0.501cm" svg:y="-0.68cm" presentation:class="title" presentation:user-transformed="true">
          <draw:text-box>
            <text:p text:style-name="P10"><text:span text:style-name="T3">Nettoyage – imputation des valeurs manquan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le_20_and_20_Content_5f_" presentation:presentation-page-layout-name="AL2T11">
        <office:forms form:automatic-focus="false" form:apply-design-mode="false"/>
        <draw:frame draw:style-name="gr3" draw:text-style-name="P15" draw:layer="layout" svg:width="5.5cm" svg:height="1.673cm" svg:x="12.8cm" svg:y="3.454cm">
          <draw:text-box>
            <text:p><text:span text:style-name="T12">46412 produits</text:span></text:p>
          </draw:text-box>
        </draw:frame>
        <draw:frame draw:style-name="gr3" draw:text-style-name="P15" draw:layer="layout" svg:width="9cm" svg:height="1.673cm" svg:x="13cm" svg:y="5.127cm">
          <draw:text-box>
            <text:p><text:span text:style-name="T12">12 colonnes</text:span></text:p>
          </draw:text-box>
        </draw:frame>
        <draw:frame draw:style-name="gr10" draw:text-style-name="P17" draw:layer="layout" svg:width="6.873cm" svg:height="8cm" svg:x="4.1cm" svg:y="7.5cm">
          <draw:text-box>
            <text:p text:style-name="P16"/>
            <text:p text:style-name="P16"><text:span text:style-name="T7">Nom du produit</text:span><text:span text:style-name="T7"><text:tab/></text:span></text:p>
            <text:p text:style-name="P16"><text:span text:style-name="T7"/></text:p>
            <text:p text:style-name="P16"/>
            <text:p text:style-name="P16">product_name</text:p>
            <text:p text:style-name="P16"/>
          </draw:text-box>
        </draw:frame>
        <draw:frame presentation:style-name="pr8" draw:text-style-name="P8" draw:layer="layout" svg:width="29.209cm" svg:height="3.681cm" svg:x="0.501cm" svg:y="-0.68cm" presentation:class="title" presentation:user-transformed="true">
          <draw:text-box>
            <text:p text:style-name="P10"><text:span text:style-name="T3">Nettoyage – synthèse</text:span></text:p>
          </draw:text-box>
        </draw:frame>
        <draw:frame draw:style-name="gr11" draw:text-style-name="P17" draw:layer="layout" svg:width="10.5cm" svg:height="10.916cm" svg:x="21.6cm" svg:y="6.8cm">
          <draw:text-box>
            <text:p text:style-name="P16"/>
            <text:p text:style-name="P16"/>
            <text:p><text:span text:style-name="T7">Les informations</text:span></text:p>
            <text:p><text:span text:style-name="T7">nutritionnelles</text:span></text:p>
            <text:p/>
            <text:p>sodium_100g<text:tab/></text:p>
            <text:p>salt_100g<text:tab/></text:p>
            <text:p>proteins_100g<text:tab/></text:p>
            <text:p>fiber_100g<text:tab/></text:p>
            <text:p>sugars_100g<text:tab/></text:p>
            <text:p>carbohydrates_100g</text:p>
            <text:p>saturated-fat_100g</text:p>
            <text:p>fat_100g<text:tab/></text:p>
            <text:p>energy_100g<text:tab/></text:p>
            <text:p/>
          </draw:text-box>
        </draw:frame>
        <draw:frame draw:style-name="gr12" draw:text-style-name="P17" draw:layer="layout" svg:width="6.873cm" svg:height="5.939cm" svg:x="12.5cm" svg:y="7.5cm">
          <draw:text-box>
            <text:p text:style-name="P16"/>
            <text:p text:style-name="P16"><text:span text:style-name="T7">Le score / grade</text:span></text:p>
            <text:p text:style-name="P16"><text:span text:style-name="T7"/></text:p>
            <text:p text:style-name="P16"/>
            <text:p text:style-name="P16">nutrition_grade_fr</text:p>
            <text:p>nutrition-score-fr_100g</text:p>
            <text:p/>
            <text:p/>
          </draw:text-box>
        </draw:frame>
        <draw:line draw:style-name="gr13" draw:text-style-name="P7" draw:layer="layout" svg:x1="9cm" svg:y1="7.5cm" svg:x2="12cm" svg:y2="6.5cm">
          <text:p/>
        </draw:line>
        <draw:line draw:style-name="gr13" draw:text-style-name="P7" draw:layer="layout" svg:x1="18.3cm" svg:y1="6.5cm" svg:x2="20.8cm" svg:y2="7.5cm">
          <text:p/>
        </draw:line>
        <draw:line draw:style-name="gr13" draw:text-style-name="P7" draw:layer="layout" svg:x1="15.2cm" svg:y1="7.5cm" svg:x2="15.2cm" svg:y2="6.5cm">
          <text:p/>
        </draw:lin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name="Title 1_8" presentation:style-name="pr19" draw:text-style-name="P4" draw:layer="layout" svg:width="23.954cm" svg:height="3.681cm" svg:x="1.125cm" svg:y="1.159cm" presentation:class="title" presentation:user-transformed="true">
          <draw:text-box>
            <text:p text:style-name="P1"><text:span text:style-name="T2">Analyse exploratoire</text:span></text:p>
          </draw:text-box>
        </draw:frame>
        <draw:frame draw:name="Content Placeholder 2_16" presentation:style-name="pr20" draw:text-style-name="P5" draw:layer="layout" svg:width="23.954cm" svg:height="12.186cm" svg:x="1.125cm" svg:y="5.116cm" presentation:class="outline" presentation:user-transformed="true">
          <draw:text-box>
            <text:list text:style-name="L2">
              <text:list-item>
                <text:p>Distributions</text:p>
              </text:list-item>
              <text:list-item>
                <text:p>Analyse multivariée</text:p>
              </text:list-item>
              <text:list-item>
                <text:p>Hypothèses</text:p>
              </text:list-item>
              <text:list-item>
                <text:p>Anova</text:p>
              </text:list-item>
              <text:list-item>
                <text:p>AC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name="Title 1_9" presentation:style-name="pr21" draw:text-style-name="P4" draw:layer="layout" svg:width="23.954cm" svg:height="3.681cm" svg:x="1.125cm" svg:y="1.159cm" presentation:class="title" presentation:user-transformed="true">
          <draw:text-box>
            <text:p text:style-name="P1"><text:span text:style-name="T2">Conclusion</text:span></text:p>
          </draw:text-box>
        </draw:frame>
        <draw:frame draw:name="Content Placeholder 2_17" presentation:style-name="pr22" draw:text-style-name="P5" draw:layer="layout" svg:width="23.954cm" svg:height="12.186cm" svg:x="1.125cm" svg:y="5.116cm" presentation:class="outline" presentation:user-transformed="true">
          <draw:text-box>
            <text:list text:style-name="L2">
              <text:list-item>
                <text:p>Jeu de données</text:p>
              </text:list-item>
              <text:list-item>
                <text:p>Nettoyage</text:p>
              </text:list-item>
              <text:list-item>
                <text:p>Nutriscore</text:p>
              </text:list-item>
              <text:list-item>
                <text:p>Evolu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office:forms form:automatic-focus="false" form:apply-design-mode="false"/>
        <draw:frame draw:name="Title 1_1" presentation:style-name="pr23" draw:text-style-name="P4" draw:layer="layout" svg:width="23.954cm" svg:height="3.681cm" svg:x="1.125cm" svg:y="1.159cm" presentation:class="title" presentation:user-transformed="true">
          <draw:text-box>
            <text:p text:style-name="P1"><text:span text:style-name="T2">Merci</text:span></text:p>
          </draw:text-box>
        </draw:frame>
        <draw:frame draw:name="Content Placeholder 2_2" presentation:style-name="pr24" draw:text-style-name="P5" draw:layer="layout" svg:width="23.954cm" svg:height="12.186cm" svg:x="1.125cm" svg:y="5.116cm" presentation:class="outline" presentation:user-transformed="true">
          <draw:text-box>
            <text:list text:style-name="L2">
              <text:list-item>
                <text:p>Questions ?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Trebuchet MS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1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p" xlink:href="Pictures/1000020100000299000002A342E4ABE817B2B251.png" xlink:type="simple" xlink:show="embed" xlink:actuate="onLoad"/>
    <draw:fill-image draw:name="msFillBitmap_20_1" draw:display-name="msFillBitmap 1" xlink:href="Pictures/10000201000004B0000002A321A11E4C39D1E523.png" xlink:type="simple" xlink:show="embed" xlink:actuate="onLoad"/>
    <draw:fill-image draw:name="msFillBitmap_20_2" draw:display-name="msFillBitmap 2" xlink:href="Pictures/10000201000004B0000002A377B8EF3E7760D1AD.png" xlink:type="simple" xlink:show="embed" xlink:actuate="onLoad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rebuchet MS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rebuchet MS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rebuchet MS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loext:opacity="100%" style:text-line-through-style="none" style:text-line-through-type="none" style:text-position="0% 100%" style:font-name="Trebuchet MS" fo:font-size="12pt" fo:letter-spacing="normal" fo:language="bs" fo:country="BA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a6a6a6" loext:opacity="100%" style:text-line-through-style="none" style:text-line-through-type="none" style:text-position="0% 100%" style:font-name="Trebuchet MS" fo:font-size="12pt" fo:letter-spacing="normal" fo:language="bs" fo:country="BA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60pt" fo:letter-spacing="normal" fo:language="en" fo:country="US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MT5" style:family="text">
      <style:text-properties fo:font-variant="normal" fo:text-transform="none" fo:color="#8b8b8b" loext:opacity="100%" style:text-line-through-style="none" style:text-line-through-type="none" style:text-position="0% 100%" style:font-name="Trebuchet M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44pt" fo:letter-spacing="normal" fo:language="en" fo:country="U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4pt" fo:letter-spacing="normal" fo:language="en" fo:country="GB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Picture 10" draw:style-name="Mgr3" draw:text-style-name="MP5" draw:layer="backgroundobjects" svg:width="2.489cm" svg:height="0.9cm" draw:transform="rotate (1.5707963267949) translate (-0.901cm 15.348cm)">
        <draw:image xlink:href="Pictures/10000201000002BE000000FEF6665EFA5E107ACF.png" xlink:type="simple" xlink:show="embed" xlink:actuate="onLoad" draw:mime-type="image/png">
          <text:p/>
        </draw:image>
      </draw:frame>
      <draw:custom-shape draw:name="TextBox 11" draw:style-name="Mgr4" draw:text-style-name="MP7" draw:layer="backgroundobjects" svg:width="10.801cm" svg:height="0.758cm" draw:transform="rotate (1.5707963267949) translate (-0.851cm 12.858cm)">
        <text:p text:style-name="MP6"><text:span text:style-name="MT2">Find more PowerPoint templates on </text:span><text:span text:style-name="MT3">prezentr.com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0.483cm" svg:height="6.631cm" svg:x="1.125cm" svg:y="2.936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Date Placeholder 3" presentation:style-name="Mpr2" draw:text-style-name="MP11" draw:layer="backgroundobjects" svg:width="6.065cm" svg:height="1.013cm" svg:x="1.125cm" svg:y="17.657cm" presentation:class="date-time" presentation:user-transformed="true">
        <draw:text-box>
          <text:p text:style-name="MP10"><text:span text:style-name="MT5"><text:date style:data-style-name="D1" text:date-value="2021-07-07">7/7/21</text:date></text:span></text:p>
        </draw:text-box>
      </draw:frame>
      <draw:frame draw:name="Footer Placeholder 4" presentation:style-name="Mpr2" draw:text-style-name="MP11" draw:layer="backgroundobjects" svg:width="9.098cm" svg:height="1.013cm" svg:x="8.941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5.288cm" svg:height="1.013cm" svg:x="19.791cm" svg:y="17.657cm" presentation:class="page-number" presentation:user-transformed="true">
        <draw:text-box>
          <text:p text:style-name="MP12"><text:span text:style-name="MT5"><text:page-number>&lt;numéro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0" draw:style-name="Mgr3" draw:text-style-name="MP5" draw:layer="backgroundobjects" svg:width="2.489cm" svg:height="0.9cm" draw:transform="rotate (1.5707963267949) translate (-0.901cm 15.348cm)">
        <draw:image xlink:href="Pictures/10000201000002BE000000FEF6665EFA5E107ACF.png" xlink:type="simple" xlink:show="embed" xlink:actuate="onLoad" draw:mime-type="image/png">
          <text:p/>
        </draw:image>
      </draw:frame>
      <draw:custom-shape draw:name="TextBox 11" draw:style-name="Mgr4" draw:text-style-name="MP7" draw:layer="backgroundobjects" svg:width="10.801cm" svg:height="0.758cm" draw:transform="rotate (1.5707963267949) translate (-0.851cm 12.858cm)">
        <text:p text:style-name="MP6"><text:span text:style-name="MT2">Find more PowerPoint templates on </text:span><text:span text:style-name="MT3">prezentr.com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3.954cm" svg:height="3.681cm" svg:x="1.125cm" svg:y="1.159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6" draw:text-style-name="MP16" draw:layer="backgroundobjects" svg:width="23.954cm" svg:height="12.186cm" svg:x="1.125cm" svg:y="5.116cm" presentation:class="outline" presentation:user-transformed="true">
        <draw:text-box>
          <text:list text:style-name="ML3">
            <text:list-item>
              <text:p text:style-name="MP14"><text:span text:style-name="MT7">Edit Master text styles</text:span></text:p>
              <text:list>
                <text:list-item>
                  <text:p text:style-name="MP15"><text:span text:style-name="MT8">Second level</text:span></text:p>
                  <text:list>
                    <text:list-item>
                      <text:p text:style-name="MP15"><text:span text:style-name="MT9">Third level</text:span></text:p>
                      <text:list>
                        <text:list-item>
                          <text:p text:style-name="MP15"><text:span text:style-name="MT10">Fourth level</text:span></text:p>
                          <text:list>
                            <text:list-item>
                              <text:p text:style-name="MP1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065cm" svg:height="1.013cm" svg:x="1.125cm" svg:y="17.657cm" presentation:class="date-time" presentation:user-transformed="true">
        <draw:text-box>
          <text:p text:style-name="MP10"><text:span text:style-name="MT5"><text:date style:data-style-name="D1" text:date-value="2021-07-07">7/7/21</text:date></text:span></text:p>
        </draw:text-box>
      </draw:frame>
      <draw:frame draw:name="Footer Placeholder 4" presentation:style-name="Mpr7" draw:text-style-name="MP11" draw:layer="backgroundobjects" svg:width="9.098cm" svg:height="1.013cm" svg:x="8.941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5.288cm" svg:height="1.013cm" svg:x="19.791cm" svg:y="17.657cm" presentation:class="page-number" presentation:user-transformed="true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201000002BE000000FEF6665EFA5E107ACF.png" xlink:type="simple" xlink:show="embed" xlink:actuate="onLoad" draw:mime-type="image/png">
          <text:p/>
        </draw:image>
      </draw:frame>
      <draw:custom-shape draw:name="TextBox 7" draw:style-name="Mgr5" draw:text-style-name="MP7" draw:layer="backgroundobjects" svg:width="10.801cm" svg:height="0.758cm" draw:transform="rotate (1.5707963267949) translate (-0.851cm 12.858cm)">
        <text:p text:style-name="MP6"><text:span text:style-name="MT2">Find more PowerPoint templates on </text:span><text:span text:style-name="MT3">prezentr.com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3" draw:layer="backgroundobjects" svg:width="29.209cm" svg:height="3.681cm" svg:x="2.328cm" svg:y="1.014cm" presentation:class="title" presentation:user-transformed="true">
        <draw:text-box>
          <text:p text:style-name="MP8"><text:span text:style-name="MT11">Click to edit Master title style</text:span></text:p>
        </draw:text-box>
      </draw:frame>
      <draw:frame draw:name="Content Placeholder 2" presentation:style-name="Mpr11" draw:text-style-name="MP16" draw:layer="backgroundobjects" svg:width="29.209cm" svg:height="12.186cm" svg:x="2.328cm" svg:y="4.971cm" presentation:class="outline" presentation:user-transformed="true">
        <draw:text-box>
          <text:list text:style-name="ML3">
            <text:list-item>
              <text:p text:style-name="MP14"><text:span text:style-name="MT12">Click to edit Master text styles</text:span></text:p>
              <text:list>
                <text:list-item>
                  <text:p text:style-name="MP15"><text:span text:style-name="MT13">Second level</text:span></text:p>
                  <text:list>
                    <text:list-item>
                      <text:p text:style-name="MP15"><text:span text:style-name="MT14">Third level</text:span></text:p>
                      <text:list>
                        <text:list-item>
                          <text:p text:style-name="MP15"><text:span text:style-name="MT15">Fourth level</text:span></text:p>
                          <text:list>
                            <text:list-item>
                              <text:p text:style-name="MP15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5"><text:date style:data-style-name="D1" text:date-value="2021-07-07">7/7/21</text:date></text:span></text:p>
        </draw:text-box>
      </draw:frame>
      <draw:frame draw:name="Footer Placeholder 4" presentation:style-name="Mpr12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esentation Title</dc:title>
    <meta:editing-cycles>78</meta:editing-cycles>
    <meta:creation-date>2021-05-27T01:52:27.141000000</meta:creation-date>
    <dc:date>2021-07-07T08:03:47.971000000</dc:date>
    <meta:editing-duration>PT19H11M3S</meta:editing-duration>
    <meta:generator>LibreOffice/7.0.4.2$Windows_X86_64 LibreOffice_project/dcf040e67528d9187c66b2379df5ea4407429775</meta:generator>
    <meta:document-statistic meta:object-count="202"/>
    <meta:user-defined meta:name="AppVersion">16.0014</meta:user-defined>
    <meta:user-defined meta:name="PresentationFormat">Widescreen</meta:user-defined>
    <meta:user-defined meta:name="Slides" meta:value-type="float">2</meta:user-defined>
  </office:meta>
</office:document-meta>
</file>