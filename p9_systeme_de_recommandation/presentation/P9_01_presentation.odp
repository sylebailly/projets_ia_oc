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1E000000D459469245A8DA2554.png" manifest:media-type="image/png"/>
  <manifest:file-entry manifest:full-path="Pictures/10000000000000700000006C8A4D18171B422A0F.png" manifest:media-type="image/png"/>
  <manifest:file-entry manifest:full-path="Pictures/10000000000002AF000001EEF8F7261435DE7A13.png" manifest:media-type="image/png"/>
  <manifest:file-entry manifest:full-path="Pictures/100000000000008B0000009D3E14975A64D24398.png" manifest:media-type="image/png"/>
  <manifest:file-entry manifest:full-path="Pictures/10000000000002B400000119BD013C6835294B7D.png" manifest:media-type="image/png"/>
  <manifest:file-entry manifest:full-path="Pictures/100000000000019E0000018465C8E627A449DE50.png" manifest:media-type="image/png"/>
  <manifest:file-entry manifest:full-path="Pictures/100000000000015D0000019298DF5E94E5E233B7.png" manifest:media-type="image/png"/>
  <manifest:file-entry manifest:full-path="Pictures/100000000000008A0000009747072402B6F5776E.png" manifest:media-type="image/png"/>
  <manifest:file-entry manifest:full-path="Pictures/10000000000000A0000000B192A67F05ABC3535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2" svg:font-family="Arial"/>
    <style:font-face style:name="Fira Sans Extra Condensed Medium" svg:font-family="'Fira Sans Extra Condensed Medium'"/>
    <style:font-face style:name="Fira Sans Extra Condensed SemiBold" svg:font-family="'Fira Sans Extra Condensed SemiBold'"/>
    <style:font-face style:name="Lato1" svg:font-family="Lato"/>
    <style:font-face style:name="Roboto" svg:font-family="Roboto"/>
    <style:font-face style:name="Arial1" svg:font-family="Arial" style:font-pitch="variable"/>
    <style:font-face style:name="Lato" svg:font-family="Lato" style:font-pitch="variable"/>
    <style:font-face style:name="Liberation Sans2" svg:font-family="'Liberation Sans'" style:font-pitch="variable"/>
    <style:font-face style:name="Lucida Sans1" svg:font-family="'Lucida Sans'" style:font-pitch="variable"/>
    <style:font-face style:name="Microsoft YaHei1" svg:font-family="'Microsoft YaHei'"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79cm" svg:stroke-color="#ffffff" draw:stroke-linejoin="round" svg:stroke-linecap="butt" draw:fill="solid" draw:fill-color="#76c2c8" draw:textarea-vertical-align="middle" draw:auto-grow-height="false" draw:fit-to-size="false" style:shrink-to-fit="false" fo:min-height="2.351cm" fo:min-width="27.693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418cm" fo:min-width="26.403cm" fo:padding-top="0.127cm" fo:padding-bottom="0.127cm" fo:padding-left="0.254cm" fo:padding-right="0.254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false" style:shrink-to-fit="false" fo:min-height="1.018cm" fo:min-width="26.391cm" fo:padding-top="0.127cm" fo:padding-bottom="0.127cm" fo:padding-left="0.254cm" fo:padding-right="0.254cm" fo:wrap-option="wrap"/>
      <style:paragraph-properties style:writing-mode="lr-tb"/>
    </style:style>
    <style:style style:name="gr6" style:family="graphic" style:parent-style-name="standard">
      <style:graphic-properties draw:stroke="solid" svg:stroke-width="0.106cm" svg:stroke-color="#bdb99d" draw:stroke-linejoin="round" svg:stroke-linecap="butt" draw:fill="solid" draw:fill-color="#76c2c8" draw:textarea-vertical-align="middle" draw:auto-grow-height="false" draw:fit-to-size="false" style:shrink-to-fit="false" fo:min-height="0.731cm" fo:min-width="4.209cm" fo:padding-top="0.254cm" fo:padding-bottom="0.254cm" fo:padding-left="0.254cm" fo:padding-right="0.254cm" fo:wrap-option="wrap"/>
    </style:style>
    <style:style style:name="gr7" style:family="graphic" style:parent-style-name="standard">
      <style:graphic-properties draw:stroke="solid" svg:stroke-width="0.106cm" svg:stroke-color="#bdb99d" draw:stroke-linejoin="round" svg:stroke-linecap="butt" draw:fill="solid" draw:fill-color="#3f959e" draw:textarea-vertical-align="middle" draw:auto-grow-height="false" draw:fit-to-size="false" style:shrink-to-fit="false" fo:min-height="0.64cm" fo:min-width="2.555cm" fo:padding-top="0.254cm" fo:padding-bottom="0.254cm" fo:padding-left="0.254cm" fo:padding-right="0.254cm" fo:wrap-option="wrap"/>
    </style:style>
    <style:style style:name="gr8" style:family="graphic" style:parent-style-name="standard">
      <style:graphic-properties draw:stroke="solid" svg:stroke-width="0.106cm" svg:stroke-color="#bdb99d" draw:stroke-linejoin="round" svg:stroke-linecap="butt" draw:fill="solid" draw:fill-color="#bdb99d" draw:textarea-vertical-align="middle" draw:auto-grow-height="false" draw:fit-to-size="false" style:shrink-to-fit="false" fo:min-height="0.901cm" fo:min-width="1.516cm" fo:padding-top="0.254cm" fo:padding-bottom="0.254cm" fo:padding-left="0.254cm" fo:padding-right="0.254cm" fo:wrap-option="wrap"/>
    </style:style>
    <style:style style:name="gr9" style:family="graphic" style:parent-style-name="standard">
      <style:graphic-properties draw:stroke="none" svg:stroke-width="0cm" draw:fill="solid" draw:fill-color="#f3f3e9" draw:textarea-vertical-align="middle" draw:auto-grow-height="false" draw:fit-to-size="false" style:shrink-to-fit="false" fo:min-height="0.723cm" fo:min-width="1.324cm" fo:padding-top="0.254cm" fo:padding-bottom="0.254cm" fo:padding-left="0.254cm" fo:padding-right="0.254cm" fo:wrap-option="wrap"/>
    </style:style>
    <style:style style:name="gr10" style:family="graphic" style:parent-style-name="standard">
      <style:graphic-properties draw:stroke="solid" svg:stroke-width="0.106cm" svg:stroke-color="#bdb99d" draw:stroke-linejoin="round" svg:stroke-linecap="butt" draw:fill="solid" draw:fill-color="#ce8a8a" draw:textarea-vertical-align="middle" draw:auto-grow-height="false" draw:fit-to-size="false" style:shrink-to-fit="false" fo:min-height="0.731cm" fo:min-width="4.208cm" fo:padding-top="0.254cm" fo:padding-bottom="0.254cm" fo:padding-left="0.254cm" fo:padding-right="0.254cm" fo:wrap-option="wrap"/>
    </style:style>
    <style:style style:name="gr11" style:family="graphic" style:parent-style-name="standard">
      <style:graphic-properties draw:stroke="solid" svg:stroke-width="0.106cm" svg:stroke-color="#bdb99d" draw:stroke-linejoin="round" svg:stroke-linecap="butt" draw:fill="solid" draw:fill-color="#9e5a5a" draw:textarea-vertical-align="middle" draw:auto-grow-height="false" draw:fit-to-size="false" style:shrink-to-fit="false" fo:min-height="0.641cm" fo:min-width="2.555cm" fo:padding-top="0.254cm" fo:padding-bottom="0.254cm" fo:padding-left="0.254cm" fo:padding-right="0.254cm" fo:wrap-option="wrap"/>
    </style:style>
    <style:style style:name="gr12" style:family="graphic" style:parent-style-name="standard">
      <style:graphic-properties draw:stroke="solid" svg:stroke-width="0.106cm" svg:stroke-color="#bdb99d" draw:stroke-linejoin="round" svg:stroke-linecap="butt" draw:fill="solid" draw:fill-color="#bdb99d" draw:textarea-vertical-align="middle" draw:auto-grow-height="false" draw:fit-to-size="false" style:shrink-to-fit="false" fo:min-height="0.902cm" fo:min-width="1.516cm" fo:padding-top="0.254cm" fo:padding-bottom="0.254cm" fo:padding-left="0.254cm" fo:padding-right="0.254cm" fo:wrap-option="wrap"/>
    </style:style>
    <style:style style:name="gr13" style:family="graphic" style:parent-style-name="standard">
      <style:graphic-properties draw:stroke="none" svg:stroke-width="0cm" draw:fill="solid" draw:fill-color="#f3f3e9" draw:textarea-vertical-align="middle" draw:auto-grow-height="false" draw:fit-to-size="false" style:shrink-to-fit="false" fo:min-height="0.724cm" fo:min-width="1.324cm" fo:padding-top="0.254cm" fo:padding-bottom="0.254cm" fo:padding-left="0.254cm" fo:padding-right="0.254cm" fo:wrap-option="wrap"/>
    </style:style>
    <style:style style:name="gr14" style:family="graphic" style:parent-style-name="standard">
      <style:graphic-properties draw:stroke="none" svg:stroke-width="0cm" draw:fill="solid" draw:fill-color="#76c2c8" draw:textarea-vertical-align="middle" draw:auto-grow-height="false" draw:fit-to-size="false" style:shrink-to-fit="false" fo:min-height="0.332cm" fo:min-width="1.093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131cm" fo:min-width="2.306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solid" draw:fill-color="#3f959e" draw:textarea-vertical-align="middle" draw:auto-grow-height="false" draw:fit-to-size="false" style:shrink-to-fit="false" fo:min-height="0.332cm" fo:min-width="1.094cm" fo:padding-top="0.254cm" fo:padding-bottom="0.254cm" fo:padding-left="0.254cm" fo:padding-right="0.254cm" fo:wrap-option="wrap"/>
      <style:paragraph-properties style:writing-mode="lr-tb"/>
    </style:style>
    <style:style style:name="gr17" style:family="graphic" style:parent-style-name="standard">
      <style:graphic-properties draw:stroke="none" svg:stroke-width="0cm" draw:fill="none" draw:textarea-vertical-align="middle" draw:auto-grow-height="false" draw:fit-to-size="false" style:shrink-to-fit="false" fo:min-height="1.131cm" fo:min-width="2.359cm" fo:padding-top="0.254cm" fo:padding-bottom="0.254cm" fo:padding-left="0.254cm" fo:padding-right="0.254cm" fo:wrap-option="wrap"/>
      <style:paragraph-properties style:writing-mode="lr-tb"/>
    </style:style>
    <style:style style:name="gr18" style:family="graphic" style:parent-style-name="standard">
      <style:graphic-properties draw:stroke="none" svg:stroke-width="0cm" draw:fill="solid" draw:fill-color="#ce8a8a" draw:textarea-vertical-align="middle" draw:auto-grow-height="false" draw:fit-to-size="false" style:shrink-to-fit="false" fo:min-height="0.332cm" fo:min-width="1.093cm" fo:padding-top="0.254cm" fo:padding-bottom="0.254cm" fo:padding-left="0.254cm" fo:padding-right="0.254cm" fo:wrap-option="wrap"/>
      <style:paragraph-properties style:writing-mode="lr-tb"/>
    </style:style>
    <style:style style:name="gr19" style:family="graphic" style:parent-style-name="standard">
      <style:graphic-properties draw:stroke="none" svg:stroke-width="0cm" draw:fill="solid" draw:fill-color="#9e5a5a" draw:textarea-vertical-align="middle" draw:auto-grow-height="false" draw:fit-to-size="false" style:shrink-to-fit="false" fo:min-height="0.332cm" fo:min-width="1.093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71a891" draw:textarea-vertical-align="middle" draw:auto-grow-height="false" draw:fit-to-size="false" style:shrink-to-fit="false" fo:min-height="0.332cm" fo:min-width="1.096cm" fo:padding-top="0.254cm" fo:padding-bottom="0.254cm" fo:padding-left="0.254cm" fo:padding-right="0.254cm" fo:wrap-option="wrap"/>
      <style:paragraph-properties style:writing-mode="lr-tb"/>
    </style:style>
    <style:style style:name="gr21" style:family="graphic" style:parent-style-name="standard">
      <style:graphic-properties draw:stroke="none" svg:stroke-width="0cm" draw:fill="none" draw:textarea-vertical-align="middle" draw:auto-grow-height="false" draw:fit-to-size="false" style:shrink-to-fit="false" fo:min-height="1.131cm" fo:min-width="2.36cm" fo:padding-top="0.254cm" fo:padding-bottom="0.254cm" fo:padding-left="0.254cm" fo:padding-right="0.254cm" fo:wrap-option="wrap"/>
      <style:paragraph-properties style:writing-mode="lr-tb"/>
    </style:style>
    <style:style style:name="gr22" style:family="graphic" style:parent-style-name="standard">
      <style:graphic-properties draw:stroke="none" draw:fill="none" fo:min-height="0.498cm"/>
      <style:paragraph-properties style:writing-mode="lr-tb"/>
    </style:style>
    <style:style style:name="gr23" style:family="graphic" style:parent-style-name="standard">
      <style:graphic-properties draw:stroke="none" draw:fill="none" fo:min-height="1.098cm"/>
      <style:paragraph-properties style:writing-mode="lr-tb"/>
    </style:style>
    <style:style style:name="gr24" style:family="graphic" style:parent-style-name="standard">
      <style:graphic-properties draw:stroke="none" draw:fill="none" fo:min-height="1.111cm"/>
      <style:paragraph-properties style:writing-mode="lr-tb"/>
    </style:style>
    <style:style style:name="gr25" style:family="graphic" style:parent-style-name="standard">
      <style:graphic-properties draw:stroke="none" draw:fill="none" fo:min-height="2.509cm"/>
      <style:paragraph-properties style:writing-mode="lr-tb"/>
    </style:style>
    <style:style style:name="gr26" style:family="graphic" style:parent-style-name="standard">
      <style:graphic-properties draw:stroke="none" draw:fill="none" fo:min-height="1.423cm"/>
      <style:paragraph-properties style:writing-mode="lr-tb"/>
    </style:style>
    <style:style style:name="gr27" style:family="graphic" style:parent-style-name="standard">
      <style:graphic-properties draw:stroke="none" draw:fill="none" fo:min-height="0.978cm"/>
      <style:paragraph-properties style:writing-mode="lr-tb"/>
    </style:style>
    <style:style style:name="gr28" style:family="graphic" style:parent-style-name="standard">
      <style:graphic-properties draw:marker-start="Arrow" draw:marker-start-width="0.3cm" draw:marker-end="Arrow" draw:marker-end-width="0.3cm" draw:textarea-vertical-align="middle"/>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color="#3f959e" draw:textarea-horizontal-align="justify" draw:textarea-vertical-align="middle" draw:auto-grow-height="false" fo:min-height="2.25cm" fo:min-width="6cm"/>
    </style:style>
    <style:style style:name="gr31" style:family="graphic" style:parent-style-name="standard">
      <style:graphic-properties draw:stroke="none" draw:fill="none" fo:min-height="2.134cm"/>
      <style:paragraph-properties style:writing-mode="lr-tb"/>
    </style:style>
    <style:style style:name="gr32" style:family="graphic" style:parent-style-name="objectwithoutfill">
      <style:graphic-properties draw:fill="none" draw:textarea-vertical-align="middle"/>
    </style:style>
    <style:style style:name="gr33" style:family="graphic" style:parent-style-name="standard">
      <style:graphic-properties draw:stroke="none" draw:fill="none" fo:min-height="0.713cm"/>
      <style:paragraph-properties style:writing-mode="lr-tb"/>
    </style:style>
    <style:style style:name="gr34" style:family="graphic" style:parent-style-name="standard">
      <style:graphic-properties draw:fill-color="#3f959e" draw:textarea-horizontal-align="justify" draw:textarea-vertical-align="middle" draw:auto-grow-height="false" fo:min-height="2.25cm" fo:min-width="14cm"/>
    </style:style>
    <style:style style:name="gr35" style:family="graphic" style:parent-style-name="objectwithoutfill">
      <style:graphic-properties draw:marker-end="Extrémités_20_de_20_flèche_20_5" draw:marker-end-width="0.3cm" draw:fill="none" draw:textarea-vertical-align="middle"/>
    </style:style>
    <style:style style:name="gr36" style:family="graphic" style:parent-style-name="standard">
      <style:graphic-properties draw:stroke="none" draw:fill="none" fo:min-height="1.666cm"/>
      <style:paragraph-properties style:writing-mode="lr-tb"/>
    </style:style>
    <style:style style:name="gr37" style:family="graphic" style:parent-style-name="objectwithoutfill">
      <style:graphic-properties draw:marker-end="Extrémités_20_de_20_flèche_20_6" draw:marker-end-width="0.3cm" draw:fill="none" draw:textarea-vertical-align="middle"/>
    </style:style>
    <style:style style:name="gr38" style:family="graphic" style:parent-style-name="objectwithoutfill">
      <style:graphic-properties draw:marker-end="Extrémités_20_de_20_flèche_20_7" draw:marker-end-width="0.3cm" draw:fill="none" draw:textarea-vertical-align="middle"/>
    </style:style>
    <style:style style:name="gr39" style:family="graphic" style:parent-style-name="objectwithoutfill">
      <style:graphic-properties draw:marker-end="Extrémités_20_de_20_flèche_20_8" draw:marker-end-width="0.3cm" draw:fill="none" draw:textarea-vertical-align="middle"/>
    </style:style>
    <style:style style:name="gr40" style:family="graphic" style:parent-style-name="objectwithoutfill">
      <style:graphic-properties draw:marker-end="Extrémités_20_de_20_flèche_20_9" draw:marker-end-width="0.3cm" draw:fill="none" draw:textarea-vertical-align="middle"/>
    </style:style>
    <style:style style:name="gr41" style:family="graphic" style:parent-style-name="standard">
      <style:graphic-properties draw:stroke="none" draw:fill="none" fo:min-height="2.221cm"/>
      <style:paragraph-properties style:writing-mode="lr-tb"/>
    </style:style>
    <style:style style:name="gr42" style:family="graphic" style:parent-style-name="objectwithoutfill">
      <style:graphic-properties draw:marker-end="Arrow" draw:marker-end-width="0.3cm" draw:fill="none" draw:textarea-vertical-align="middle"/>
    </style:style>
    <style:style style:name="gr43" style:family="graphic" style:parent-style-name="standard">
      <style:graphic-properties draw:fill-color="#3f959e" draw:textarea-horizontal-align="justify" draw:textarea-vertical-align="middle" draw:auto-grow-height="false" fo:min-height="1.134cm" fo:min-width="3cm"/>
    </style:style>
    <style:style style:name="gr44" style:family="graphic" style:parent-style-name="standard">
      <style:graphic-properties draw:fill-color="#3f959e" draw:textarea-horizontal-align="justify" draw:textarea-vertical-align="middle" draw:auto-grow-height="false" fo:min-height="1.134cm" fo:min-width="3.1cm"/>
    </style:style>
    <style:style style:name="gr45" style:family="graphic" style:parent-style-name="standard">
      <style:graphic-properties draw:stroke="none" draw:fill="none" fo:min-height="1.134cm"/>
      <style:paragraph-properties style:writing-mode="lr-tb"/>
    </style:style>
    <style:style style:name="gr46" style:family="graphic" style:parent-style-name="standard">
      <style:graphic-properties draw:stroke="none" draw:fill="none" fo:min-height="1.166cm"/>
      <style:paragraph-properties style:writing-mode="lr-tb"/>
    </style:style>
    <style:style style:name="gr47" style:family="graphic" style:parent-style-name="objectwithoutfill">
      <style:graphic-properties draw:marker-end="Extrémités_20_de_20_flèche_20_1" draw:marker-end-width="0.3cm" draw:fill="none" draw:textarea-vertical-align="middle"/>
    </style:style>
    <style:style style:name="gr48" style:family="graphic" style:parent-style-name="standard">
      <style:graphic-properties draw:stroke="none" draw:fill="none" fo:min-height="0.654cm"/>
      <style:paragraph-properties style:writing-mode="lr-tb"/>
    </style:style>
    <style:style style:name="gr49" style:family="graphic" style:parent-style-name="objectwithoutfill">
      <style:graphic-properties draw:marker-end="Extrémités_20_de_20_flèche_20_2" draw:marker-end-width="0.3cm" draw:fill="none" draw:textarea-vertical-align="middle"/>
    </style:style>
    <style:style style:name="gr50" style:family="graphic" style:parent-style-name="objectwithoutfill">
      <style:graphic-properties draw:marker-end="Extrémités_20_de_20_flèche_20_3" draw:marker-end-width="0.3cm" draw:fill="none" draw:textarea-vertical-align="middle"/>
    </style:style>
    <style:style style:name="gr51" style:family="graphic" style:parent-style-name="standard">
      <style:graphic-properties draw:fill-color="#3f959e" draw:textarea-horizontal-align="justify" draw:textarea-vertical-align="middle" draw:auto-grow-height="false" fo:min-height="3.25cm" fo:min-width="5cm"/>
    </style:style>
    <style:style style:name="gr52" style:family="graphic" style:parent-style-name="standard">
      <style:graphic-properties draw:stroke="none" draw:fill="none" fo:min-height="2.111cm"/>
      <style:paragraph-properties style:writing-mode="lr-tb"/>
    </style:style>
    <style:style style:name="gr53" style:family="graphic" style:parent-style-name="standard">
      <style:graphic-properties draw:fill-color="#3f959e" draw:textarea-horizontal-align="justify" draw:textarea-vertical-align="middle" draw:auto-grow-height="false" fo:min-height="3.77cm" fo:min-width="5.4cm"/>
    </style:style>
    <style:style style:name="gr54" style:family="graphic" style:parent-style-name="standard">
      <style:graphic-properties draw:stroke="none" draw:fill="none" fo:min-height="3.331cm"/>
      <style:paragraph-properties style:writing-mode="lr-tb"/>
    </style:style>
    <style:style style:name="gr55" style:family="graphic" style:parent-style-name="standard">
      <style:graphic-properties draw:fill-color="#3f959e" draw:textarea-horizontal-align="justify" draw:textarea-vertical-align="middle" draw:auto-grow-height="false" fo:min-height="3.25cm" fo:min-width="10.1cm"/>
    </style:style>
    <style:style style:name="gr56" style:family="graphic" style:parent-style-name="standard">
      <style:graphic-properties draw:stroke="none" draw:fill="none" fo:min-height="1.25cm"/>
      <style:paragraph-properties style:writing-mode="lr-tb"/>
    </style:style>
    <style:style style:name="gr57" style:family="graphic" style:parent-style-name="standard">
      <style:graphic-properties draw:stroke="none" draw:fill="none" fo:min-height="1.985cm"/>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36pt" style:font-size-asian="36pt" style:font-size-complex="36pt"/>
    </style:style>
    <style:style style:name="P3" style:family="paragraph">
      <loext:graphic-properties draw:fill="none"/>
      <style:paragraph-properties fo:text-align="center"/>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76c2c8"/>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font-size-asian="28pt" style:font-size-complex="28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font-size-asian="28pt" style:font-size-complex="28pt"/>
    </style:style>
    <style:style style:name="P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9" style:family="paragraph">
      <loext:graphic-properties draw:fill="solid" draw:fill-color="#3f959e"/>
      <style:paragraph-properties fo:text-align="start" style:font-independent-line-spacing="true"/>
      <style:text-properties fo:font-size="14pt"/>
    </style:style>
    <style:style style:name="P10" style:family="paragraph">
      <loext:graphic-properties draw:fill="solid" draw:fill-color="#bdb99d"/>
      <style:paragraph-properties fo:text-align="start" style:font-independent-line-spacing="true"/>
      <style:text-properties fo:font-size="14pt"/>
    </style:style>
    <style:style style:name="P11" style:family="paragraph">
      <loext:graphic-properties draw:fill="solid" draw:fill-color="#f3f3e9"/>
      <style:paragraph-properties fo:text-align="start" style:font-independent-line-spacing="true"/>
      <style:text-properties fo:font-size="14pt"/>
    </style:style>
    <style:style style:name="P12" style:family="paragraph">
      <loext:graphic-properties draw:fill="solid" draw:fill-color="#ce8a8a"/>
      <style:paragraph-properties fo:text-align="start" style:font-independent-line-spacing="true"/>
      <style:text-properties fo:font-size="14pt"/>
    </style:style>
    <style:style style:name="P13" style:family="paragraph">
      <loext:graphic-properties draw:fill="solid" draw:fill-color="#9e5a5a"/>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5" style:family="paragraph">
      <loext:graphic-properties draw:fill="solid" draw:fill-color="#76c2c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6" style:family="paragraph">
      <loext:graphic-properties draw:fill="solid" draw:fill-color="#3f959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7" style:family="paragraph">
      <loext:graphic-properties draw:fill="solid" draw:fill-color="#ce8a8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8" style:family="paragraph">
      <loext:graphic-properties draw:fill="solid" draw:fill-color="#9e5a5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9" style:family="paragraph">
      <loext:graphic-properties draw:fill="solid" draw:fill-color="#71a89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none"/>
    </style:style>
    <style:style style:name="P21" style:family="paragraph">
      <loext:graphic-properties draw:fill-color="#ffffff"/>
      <style:paragraph-properties style:writing-mode="lr-tb"/>
      <style:text-properties fo:font-size="20pt"/>
    </style:style>
    <style:style style:name="P22" style:family="paragraph">
      <style:text-properties fo:font-size="16pt" style:font-size-asian="14pt" style:font-size-complex="14pt"/>
    </style:style>
    <style:style style:name="P23" style:family="paragraph">
      <loext:graphic-properties draw:fill="none"/>
      <style:text-properties fo:font-size="16pt" style:font-size-asian="14pt" style:font-size-complex="14pt"/>
    </style:style>
    <style:style style:name="P24" style:family="paragraph">
      <style:text-properties fo:font-weight="bold" style:font-weight-asian="bold" style:font-weight-complex="bold"/>
    </style:style>
    <style:style style:name="P25" style:family="paragraph">
      <loext:graphic-properties draw:fill="none"/>
      <style:text-properties fo:font-weight="bold" style:font-weight-asian="bold" style:font-weight-complex="bold"/>
    </style:style>
    <style:style style:name="P26" style:family="paragraph">
      <style:text-properties fo:font-size="18pt"/>
    </style:style>
    <style:style style:name="P27" style:family="paragraph">
      <loext:graphic-properties draw:fill="none"/>
      <style:paragraph-properties style:writing-mode="lr-tb"/>
      <style:text-properties fo:font-size="18pt"/>
    </style:style>
    <style:style style:name="P28" style:family="paragraph">
      <loext:graphic-properties draw:fill="none"/>
      <style:paragraph-properties style:writing-mode="lr-tb"/>
      <style:text-properties fo:font-size="18pt" fo:font-weight="bold"/>
    </style:style>
    <style:style style:name="P29" style:family="paragraph">
      <style:paragraph-properties fo:text-align="center"/>
    </style:style>
    <style:style style:name="P30" style:family="paragraph">
      <loext:graphic-properties draw:fill-color="#3f959e"/>
      <style:paragraph-properties fo:text-align="center"/>
    </style:style>
    <style:style style:name="P31" style:family="paragraph">
      <style:text-properties fo:color="#ffffff" loext:opacity="100%"/>
    </style:style>
    <style:style style:name="P32" style:family="paragraph">
      <loext:graphic-properties draw:fill="none"/>
      <style:text-properties fo:color="#ffffff" loext:opacity="100%"/>
    </style:style>
    <style:style style:name="P33" style:family="paragraph">
      <style:text-properties fo:font-size="14pt" style:font-size-asian="14pt" style:font-size-complex="14pt"/>
    </style:style>
    <style:style style:name="P34" style:family="paragraph">
      <loext:graphic-properties draw:fill="none"/>
      <style:text-properties fo:font-size="14pt" style:font-size-asian="14pt" style:font-size-complex="14pt"/>
    </style:style>
    <style:style style:name="P35" style:family="paragraph">
      <style:text-properties fo:font-size="14pt" fo:font-weight="bold" style:font-size-asian="14pt" style:font-size-complex="14pt"/>
    </style:style>
    <style:style style:name="P36" style:family="paragraph">
      <loext:graphic-properties draw:fill="none"/>
      <style:text-properties fo:font-size="14pt" fo:font-weight="bold" style:font-size-asian="14pt" style:font-size-complex="14pt"/>
    </style:style>
    <style:style style:name="P37" style:family="paragraph">
      <style:text-properties fo:color="#ff0000" loext:opacity="100%" fo:font-size="14pt" fo:font-weight="bold" style:font-size-asian="14pt" style:font-size-complex="14pt"/>
    </style:style>
    <style:style style:name="P38" style:family="paragraph">
      <loext:graphic-properties draw:fill="none"/>
      <style:text-properties fo:color="#ff0000" loext:opacity="100%" fo:font-size="14pt" fo:font-weight="bold" style:font-size-asian="14pt" style:font-size-complex="14pt"/>
    </style:style>
    <style:style style:name="P39" style:family="paragraph">
      <style:text-properties fo:color="#ffffff" loext:opacity="100%" fo:font-size="14pt" style:font-size-asian="14pt" style:font-size-complex="14pt"/>
    </style:style>
    <style:style style:name="P40" style:family="paragraph">
      <loext:graphic-properties draw:fill="none"/>
      <style:text-properties fo:color="#ffffff" loext:opacity="100%" fo:font-size="14pt" style:font-size-asian="14pt" style:font-size-complex="14pt"/>
    </style:style>
    <style:style style:name="P41" style:family="paragraph">
      <style:text-properties fo:font-size="14pt"/>
    </style:style>
    <style:style style:name="P42" style:family="paragraph">
      <loext:graphic-properties draw:fill="none"/>
      <style:paragraph-properties style:writing-mode="lr-tb"/>
      <style:text-properties fo:color="#729fcf" loext:opacity="100%" style:font-name="Liberation Sans1" fo:font-size="14pt" fo:font-weight="bold" style:font-size-asian="14pt" style:font-weight-asian="bold" style:font-size-complex="14pt" style:font-weight-complex="bold"/>
    </style:style>
    <style:style style:name="P43" style:family="paragraph">
      <loext:graphic-properties draw:fill="none"/>
      <style:paragraph-properties style:writing-mode="lr-tb"/>
      <style:text-properties fo:color="#3465a4" loext:opacity="100%" style:font-name="Liberation Sans1" fo:font-size="14pt" fo:font-weight="bold" style:font-size-asian="14pt" style:font-weight-asian="bold" style:font-size-complex="14pt" style:font-weight-complex="bold"/>
    </style:style>
    <style:style style:name="P44" style:family="paragraph">
      <style:text-properties fo:color="#ffffff" loext:opacity="100%" fo:font-size="14pt"/>
    </style:style>
    <style:style style:name="P45" style:family="paragraph">
      <loext:graphic-properties draw:fill="none"/>
      <style:paragraph-properties style:writing-mode="lr-tb"/>
      <style:text-properties fo:color="#ffffff" loext:opacity="100%" style:font-name="Liberation Sans1" fo:font-size="14pt" fo:font-weight="bold" style:font-size-asian="14pt" style:font-weight-asian="bold" style:font-size-complex="14pt" style:font-weight-complex="bold"/>
    </style:style>
    <style:style style:name="P46" style:family="paragraph">
      <style:text-properties fo:font-weight="bold"/>
    </style:style>
    <style:style style:name="P47" style:family="paragraph">
      <loext:graphic-properties draw:fill="none"/>
      <style:text-properties fo:font-weight="bold"/>
    </style:style>
    <style:style style:name="P48" style:family="paragraph">
      <style:paragraph-properties fo:margin-left="0cm" fo:margin-right="0cm" fo:margin-top="0cm" fo:margin-bottom="0cm" fo:line-height="100%" fo:text-indent="0cm"/>
      <style:text-properties fo:color="#ffffff" loext:opacity="100%" fo:font-size="14pt"/>
    </style:style>
    <style:style style:name="T1" style:family="text">
      <style:text-properties fo:font-variant="normal" fo:text-transform="none" fo:color="#000000" loext:opacity="100%" style:text-line-through-style="none" style:text-line-through-type="none" style:text-position="0% 100%" style:font-name="Fira Sans Extra Condensed SemiBold" fo:font-size="36pt" fo:letter-spacing="normal" fo:language="fr" fo:country="FR" fo:font-style="normal" style:text-underline-style="none" fo:font-weight="normal" style:font-name-asian="Fira Sans Extra Condensed SemiBold" style:font-size-asian="36pt" style:font-style-asian="normal" style:font-weight-asian="normal" style:font-name-complex="Fira Sans Extra Condensed SemiBold"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Fira Sans Extra Condensed Medium" fo:font-size="28pt" fo:letter-spacing="normal" fo:language="fr" fo:country="FR" fo:font-style="normal" style:text-underline-style="none" fo:font-weight="normal" style:font-name-asian="Fira Sans Extra Condensed Medium" style:font-size-asian="28pt" style:font-style-asian="normal" style:font-weight-asian="normal" style:font-name-complex="Fira Sans Extra Condensed Medium" style:font-size-complex="2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Fira Sans Extra Condensed Medium" fo:font-size="20pt" fo:letter-spacing="normal" fo:language="fr" fo:country="FR" fo:font-style="normal" style:text-underline-style="none" fo:font-weight="normal" style:font-name-asian="Fira Sans Extra Condensed Medium" style:font-size-asian="20pt" style:font-style-asian="normal" style:font-weight-asian="normal" style:font-name-complex="Fira Sans Extra Condensed Medium"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Roboto" fo:font-size="12pt" fo:letter-spacing="normal" fo:language="fr" fo:country="FR"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 style:family="text">
      <style:text-properties style:font-size-asian="14pt" style:font-size-complex="14pt"/>
    </style:style>
    <style:style style:name="T6" style:family="text">
      <style:text-properties fo:font-size="16pt" style:font-size-asian="14pt" style:font-size-complex="14pt"/>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fo:font-weight="bold"/>
    </style:style>
    <style:style style:name="T10" style:family="text">
      <style:text-properties fo:font-size="14pt" style:font-size-asian="14pt" style:font-size-complex="14pt"/>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ff0000" loext:opacity="100%"/>
    </style:style>
    <style:style style:name="T13" style:family="text">
      <style:text-properties fo:font-variant="normal" fo:text-transform="none" fo:color="#729fcf" loext:opacity="100%" style:text-line-through-style="none" style:text-line-through-type="none" style:text-position="0% 100%" style:font-name="Liberation Sans1" fo:font-size="14pt" fo:letter-spacing="normal" fo:language="en" fo:country="none" fo:font-style="normal" style:text-underline-style="none" fo:font-weight="bold" style:font-name-asian="Lato1" style:font-size-asian="14pt" style:font-style-asian="normal" style:font-weight-asian="bold" style:font-name-complex="Lato1" style:font-size-complex="14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Liberation Sans1" fo:font-size="14pt" fo:letter-spacing="normal" fo:language="en" fo:country="none" fo:font-style="normal" style:text-underline-style="none" fo:font-weight="bold" style:font-name-asian="Lato1" style:font-size-asian="14pt" style:font-style-asian="normal" style:font-weight-asian="bold" style:font-name-complex="Lato1" style:font-size-complex="14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Liberation Sans1" fo:font-size="14pt" fo:letter-spacing="normal" fo:language="en" fo:country="none" fo:font-style="normal" style:text-underline-style="none" fo:font-weight="bold" style:font-name-asian="Lato1" style:font-size-asian="14pt" style:font-style-asian="normal" style:font-weight-asian="bold" style:font-name-complex="Lato1"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1;p19" presentation:style-name="pr1" draw:text-style-name="P2" draw:layer="layout" svg:width="13.493cm" svg:height="8.359cm" svg:x="13.2cm" svg:y="2.441cm" presentation:class="title" presentation:user-transformed="true">
          <draw:text-box>
            <text:p text:style-name="P1"><text:span text:style-name="T1">Réalisez une application mobile de recommandation de contenu</text:span></text:p>
          </draw:text-box>
        </draw:frame>
        <draw:frame draw:style-name="gr1" draw:text-style-name="P3" draw:layer="layout" svg:width="6.948cm" svg:height="2.717cm" svg:x="16.5cm" svg:y="9.783cm">
          <draw:image xlink:href="Pictures/100000000000021E000000D459469245A8DA2554.png" xlink:type="simple" xlink:show="embed" xlink:actuate="onLoad" draw:mime-type="image/png">
            <text:p/>
          </draw:image>
        </draw:frame>
        <presentation:notes draw:style-name="dp2">
          <draw:page-thumbnail draw:name="Google Shape;117;gaa3fb9f80e_0_3809:notes" draw:style-name="gr2" draw:layer="layout" svg:width="18.665cm" svg:height="11.136cm" svg:x="1.167cm" svg:y="2.227cm" draw:page-number="1" presentation:class="page"/>
          <draw:frame draw:name="Google Shape;118;gaa3fb9f80e_0_1"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Standard" presentation:presentation-page-layout-name="AL1T0">
        <office:forms form:automatic-focus="false" form:apply-design-mode="false"/>
        <draw:g draw:name="Google Shape;545;p29">
          <draw:custom-shape draw:name="Google Shape;546;p29_0"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0">
            <draw:custom-shape draw:name="Google Shape;548;p29_0" draw:style-name="gr4" draw:text-style-name="P7" draw:layer="layout" svg:width="26.91cm" svg:height="0.671cm" svg:x="0.545cm" svg:y="0.381cm">
              <text:p text:style-name="P6"><text:span text:style-name="T2">SOMMAI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0" draw:style-name="gr5" draw:text-style-name="P8" draw:layer="layout" svg:width="26.898cm" svg:height="1.271cm" svg:x="0.551cm" svg:y="1.178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
          <draw:g draw:name="Google Shape;1683;p46_0">
            <draw:custom-shape draw:name="Google Shape;1684;p46_0"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0"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0"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0"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0">
            <draw:custom-shape draw:name="Google Shape;1689;p46_0"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0"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0"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0"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g draw:name="Google Shape;1309;p40">
          <draw:custom-shape draw:name="Google Shape;1310;p40_0" draw:style-name="gr14" draw:text-style-name="P15" draw:layer="layout" svg:width="1.947cm" svg:height="1.186cm" svg:x="3.256cm" svg:y="3.402cm">
            <text:p text:style-name="P14"><text:span text:style-name="T3">01</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13;p40">
            <draw:custom-shape draw:name="Google Shape;1315;p40_0" draw:style-name="gr15" draw:text-style-name="P8" draw:layer="layout" svg:width="2.813cm" svg:height="1.638cm" svg:x="0.274cm" svg:y="5.101cm">
              <text:p text:style-name="P14"><text:span text:style-name="T4"/></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13;p40_0">
            <draw:custom-shape draw:name="Google Shape;1314;p40_1" draw:style-name="gr16" draw:text-style-name="P16" draw:layer="layout" svg:width="1.948cm" svg:height="1.186cm" svg:x="3.258cm" svg:y="5.127cm">
              <text:p text:style-name="P14"><text:span text:style-name="T3">02</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5;p40_1" draw:style-name="gr17" draw:text-style-name="P8" draw:layer="layout" svg:width="2.866cm" svg:height="1.638cm" svg:x="0.181cm" svg:y="5.101cm">
              <text:p text:style-name="P14"><text:span text:style-name="T4"/></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4;p40_2" draw:style-name="gr16" draw:text-style-name="P16" draw:layer="layout" svg:width="1.948cm" svg:height="1.186cm" svg:x="3.257cm" svg:y="13.928cm">
              <text:p text:style-name="P14"><text:span text:style-name="T3">02</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317;p40">
            <draw:custom-shape draw:name="Google Shape;1318;p40_0" draw:style-name="gr18" draw:text-style-name="P17" draw:layer="layout" svg:width="1.947cm" svg:height="1.186cm" svg:x="3.256cm" svg:y="6.952cm">
              <text:p text:style-name="P14"><text:span text:style-name="T3">03</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9;p40_0" draw:style-name="gr17" draw:text-style-name="P8" draw:layer="layout" svg:width="2.866cm" svg:height="1.638cm" svg:x="0.181cm" svg:y="7.026cm">
              <text:p text:style-name="P14"><text:span text:style-name="T4"/></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5;p40">
            <draw:custom-shape draw:name="Google Shape;1326;p40_0" draw:style-name="gr19" draw:text-style-name="P18" draw:layer="layout" svg:width="1.947cm" svg:height="1.186cm" svg:x="3.256cm" svg:y="8.724cm">
              <text:p text:style-name="P14"><text:span text:style-name="T3">04</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27;p40_0" draw:style-name="gr17" draw:text-style-name="P8" draw:layer="layout" svg:width="2.866cm" svg:height="1.638cm" svg:x="0.181cm" svg:y="8.898cm">
              <text:p text:style-name="P14"><text:span text:style-name="T4"/></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1;p40">
            <draw:custom-shape draw:name="Google Shape;1322;p40_0" draw:style-name="gr20" draw:text-style-name="P19" draw:layer="layout" svg:width="1.95cm" svg:height="1.186cm" svg:x="3.275cm" svg:y="10.489cm">
              <text:p text:style-name="P14"><text:span text:style-name="T3">05</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23;p40_0" draw:style-name="gr21" draw:text-style-name="P8" draw:layer="layout" svg:width="2.867cm" svg:height="1.638cm" svg:x="0.199cm" svg:y="10.862cm">
              <text:p text:style-name="P14"><text:span text:style-name="T4"/></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11;p40_1" draw:style-name="gr17" draw:text-style-name="P8" draw:layer="layout" svg:width="2.866cm" svg:height="1.638cm" svg:x="13.234cm" svg:y="4.662cm">
            <text:p text:style-name="P14"><text:span text:style-name="T4"/></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0;p40_1" draw:style-name="gr14" draw:text-style-name="P15" draw:layer="layout" svg:width="1.947cm" svg:height="1.186cm" svg:x="3.257cm" svg:y="3.402cm">
            <text:p text:style-name="P14"><text:span text:style-name="T3">01</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0;p40_2" draw:style-name="gr14" draw:text-style-name="P15" draw:layer="layout" svg:width="1.947cm" svg:height="1.186cm" svg:x="3.257cm" svg:y="12.202cm">
            <text:p text:style-name="P14"><text:span text:style-name="T3">01</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style-name="gr22" draw:text-style-name="P20" draw:layer="layout" svg:width="2.42cm" svg:height="0.748cm" svg:x="5.9cm" svg:y="3.552cm">
          <draw:text-box>
            <text:p><text:span text:style-name="T4">Contexte</text:span></text:p>
          </draw:text-box>
        </draw:frame>
        <draw:frame draw:style-name="gr22" draw:text-style-name="P20" draw:layer="layout" svg:width="2.42cm" svg:height="0.748cm" svg:x="5.9cm" svg:y="5.252cm">
          <draw:text-box>
            <text:p><text:span text:style-name="T4">Données</text:span></text:p>
          </draw:text-box>
        </draw:frame>
        <draw:frame draw:style-name="gr23" draw:text-style-name="P20" draw:layer="layout" svg:width="10cm" svg:height="1.348cm" svg:x="5.9cm" svg:y="7.152cm">
          <draw:text-box>
            <text:p><text:span text:style-name="T4">Systèmes de recommandation</text:span></text:p>
          </draw:text-box>
        </draw:frame>
        <draw:frame draw:style-name="gr23" draw:text-style-name="P20" draw:layer="layout" svg:width="10cm" svg:height="1.348cm" svg:x="6cm" svg:y="8.952cm">
          <draw:text-box>
            <text:p><text:span text:style-name="T4">Description</text:span></text:p>
          </draw:text-box>
        </draw:frame>
        <draw:frame draw:style-name="gr23" draw:text-style-name="P20" draw:layer="layout" svg:width="10cm" svg:height="1.348cm" svg:x="6cm" svg:y="10.752cm">
          <draw:text-box>
            <text:p><text:span text:style-name="T4">Architecture</text:span></text:p>
          </draw:text-box>
        </draw:frame>
        <draw:frame draw:style-name="gr23" draw:text-style-name="P20" draw:layer="layout" svg:width="10cm" svg:height="1.348cm" svg:x="6cm" svg:y="12.652cm">
          <draw:text-box>
            <text:p><text:span text:style-name="T4">Démo</text:span></text:p>
          </draw:text-box>
        </draw:frame>
        <draw:frame draw:style-name="gr23" draw:text-style-name="P20" draw:layer="layout" svg:width="10cm" svg:height="1.348cm" svg:x="6cm" svg:y="14.252cm">
          <draw:text-box>
            <text:p><text:span text:style-name="T4">Conclusion</text:span></text:p>
          </draw:text-box>
        </draw:frame>
        <presentation:notes draw:style-name="dp4">
          <draw:page-thumbnail draw:style-name="gr2" draw:layer="layout" svg:width="19.798cm" svg:height="11.136cm" svg:x="0.6cm" svg:y="2.257cm" draw:page-number="2" presentation:class="page"/>
          <draw:frame presentation:style-name="pr3" draw:text-style-name="P21" draw:layer="layout" svg:width="16.799cm" svg:height="13.364cm" svg:x="2.1cm" svg:y="14.107cm" presentation:class="notes" presentation:placeholder="true">
            <draw:text-box/>
          </draw:frame>
        </presentation:notes>
      </draw:page>
      <draw:page draw:name="page3" draw:style-name="dp5" draw:master-page-name="Standard" presentation:presentation-page-layout-name="AL1T0">
        <office:forms form:automatic-focus="false" form:apply-design-mode="false"/>
        <draw:g draw:name="Google Shape;545;p29_0">
          <draw:custom-shape draw:name="Google Shape;546;p29_2"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2">
            <draw:custom-shape draw:name="Google Shape;548;p29_2" draw:style-name="gr4" draw:text-style-name="P7" draw:layer="layout" svg:width="26.91cm" svg:height="0.671cm" svg:x="0.545cm" svg:y="0.381cm">
              <text:p text:style-name="P6"><text:span text:style-name="T2">CONTEX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2"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1">
          <draw:g draw:name="Google Shape;1683;p46_2">
            <draw:custom-shape draw:name="Google Shape;1684;p46_2"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2"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2"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2"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2">
            <draw:custom-shape draw:name="Google Shape;1689;p46_2"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2"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2"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2"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frame draw:style-name="gr1" draw:text-style-name="P3" draw:layer="layout" svg:width="6.948cm" svg:height="2.717cm" svg:x="5.2cm" svg:y="4.9cm">
          <draw:image xlink:href="Pictures/100000000000021E000000D459469245A8DA2554.png" xlink:type="simple" xlink:show="embed" xlink:actuate="onLoad" draw:mime-type="image/png">
            <text:p/>
          </draw:image>
        </draw:frame>
        <draw:frame draw:style-name="gr24" draw:text-style-name="P23" draw:layer="layout" svg:width="10cm" svg:height="2.132cm" svg:x="13.3cm" svg:y="5.139cm">
          <draw:text-box>
            <text:p text:style-name="P22"><text:span text:style-name="T5">Recommendations articles / livres</text:span></text:p>
            <text:p text:style-name="P22"><text:span text:style-name="T5"/></text:p>
            <text:list text:style-name="L2">
              <text:list-item>
                <text:p text:style-name="P22"><text:span text:style-name="T5">particuliers</text:span></text:p>
              </text:list-item>
            </text:list>
          </draw:text-box>
        </draw:frame>
        <draw:frame draw:style-name="gr24" draw:text-style-name="P23" draw:layer="layout" svg:width="10cm" svg:height="2.132cm" svg:x="13.4cm" svg:y="10.4cm">
          <draw:text-box>
            <text:p text:style-name="P22"><text:span text:style-name="T5">Application mobile</text:span></text:p>
            <text:p text:style-name="P22"><text:span text:style-name="T5"/></text:p>
            <text:p text:style-name="P22"><text:span text:style-name="T5">Sélection de 5 articles</text:span></text:p>
          </draw:text-box>
        </draw:frame>
        <draw:frame draw:style-name="gr1" draw:text-style-name="P3" draw:layer="layout" svg:width="3.112cm" svg:height="3cm" svg:x="7.2cm" svg:y="9.9cm">
          <draw:image xlink:href="Pictures/10000000000000700000006C8A4D18171B422A0F.png" xlink:type="simple" xlink:show="embed" xlink:actuate="onLoad" draw:mime-type="image/png">
            <text:p/>
          </draw:image>
        </draw:frame>
        <presentation:notes draw:style-name="dp6">
          <draw:page-thumbnail draw:style-name="gr2" draw:layer="layout" svg:width="19.798cm" svg:height="11.136cm" svg:x="0.6cm" svg:y="2.257cm" draw:page-number="3" presentation:class="page"/>
          <draw:frame presentation:style-name="pr3" draw:text-style-name="P21" draw:layer="layout" svg:width="16.799cm" svg:height="13.364cm" svg:x="2.1cm" svg:y="14.107cm" presentation:class="notes" presentation:placeholder="true">
            <draw:text-box/>
          </draw:frame>
        </presentation:notes>
      </draw:page>
      <draw:page draw:name="page4" draw:style-name="dp5" draw:master-page-name="Standard" presentation:presentation-page-layout-name="AL1T0">
        <office:forms form:automatic-focus="false" form:apply-design-mode="false"/>
        <draw:g draw:name="Google Shape;545;p29_1">
          <draw:custom-shape draw:name="Google Shape;546;p29_1"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1">
            <draw:custom-shape draw:name="Google Shape;548;p29_1" draw:style-name="gr4" draw:text-style-name="P7" draw:layer="layout" svg:width="26.91cm" svg:height="0.671cm" svg:x="0.545cm" svg:y="0.381cm">
              <text:p text:style-name="P6"><text:span text:style-name="T2">DONNÉE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1"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2">
          <draw:g draw:name="Google Shape;1683;p46_1">
            <draw:custom-shape draw:name="Google Shape;1684;p46_1"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1"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1"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1"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1">
            <draw:custom-shape draw:name="Google Shape;1689;p46_1"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1"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1"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1"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frame draw:style-name="gr25" draw:text-style-name="P23" draw:layer="layout" svg:width="13.4cm" svg:height="2.759cm" svg:x="2.1cm" svg:y="6.841cm">
          <draw:text-box>
            <text:p text:style-name="P22"><text:span text:style-name="T5">Articles metadatas</text:span></text:p>
            <text:list text:style-name="L2">
              <text:list-item>
                <text:p text:style-name="P22"><text:span text:style-name="T5">Id, catégorie, date création, nombre de mots</text:span></text:p>
              </text:list-item>
            </text:list>
          </draw:text-box>
        </draw:frame>
        <draw:frame draw:style-name="gr24" draw:text-style-name="P23" draw:layer="layout" svg:width="10cm" svg:height="1.505cm" svg:x="16.5cm" svg:y="7.041cm">
          <draw:text-box>
            <text:list text:style-name="L2">
              <text:list-item>
                <text:p text:style-name="P22"><text:span text:style-name="T6">User, session, article, date...</text:span></text:p>
              </text:list-item>
            </text:list>
            <text:p text:style-name="P22"><text:span text:style-name="T5"/></text:p>
          </draw:text-box>
        </draw:frame>
        <draw:frame draw:style-name="gr26" draw:text-style-name="P25" draw:layer="layout" svg:width="6cm" svg:height="1.673cm" svg:x="2cm" svg:y="5.6cm">
          <draw:text-box>
            <text:p text:style-name="P24"><text:span text:style-name="T7">364 000 articles </text:span></text:p>
          </draw:text-box>
        </draw:frame>
        <draw:frame draw:style-name="gr25" draw:text-style-name="P23" draw:layer="layout" svg:width="13.4cm" svg:height="2.759cm" svg:x="2cm" svg:y="8.841cm">
          <draw:text-box>
            <text:p text:style-name="P22"><text:span text:style-name="T5">Articles embeddings</text:span></text:p>
            <text:list text:style-name="L2">
              <text:list-item>
                <text:p text:style-name="P22"><text:span text:style-name="T5">Vecteur 250</text:span></text:p>
              </text:list-item>
            </text:list>
          </draw:text-box>
        </draw:frame>
        <draw:frame draw:style-name="gr26" draw:text-style-name="P25" draw:layer="layout" svg:width="6cm" svg:height="1.673cm" svg:x="16.5cm" svg:y="5.5cm">
          <draw:text-box>
            <text:p text:style-name="P24"><text:span text:style-name="T7">3 000 000 clicks </text:span></text:p>
          </draw:text-box>
        </draw:frame>
        <presentation:notes draw:style-name="dp6">
          <draw:page-thumbnail draw:style-name="gr2" draw:layer="layout" svg:width="19.798cm" svg:height="11.136cm" svg:x="0.6cm" svg:y="2.257cm" draw:page-number="4" presentation:class="page"/>
          <draw:frame presentation:style-name="pr3" draw:text-style-name="P21" draw:layer="layout" svg:width="16.799cm" svg:height="13.364cm" svg:x="2.1cm" svg:y="14.107cm" presentation:class="notes" presentation:placeholder="true">
            <draw:text-box/>
          </draw:frame>
        </presentation:notes>
      </draw:page>
      <draw:page draw:name="page5" draw:style-name="dp5" draw:master-page-name="Standard" presentation:presentation-page-layout-name="AL2T1">
        <draw:frame draw:style-name="gr1" draw:text-style-name="P3" draw:layer="layout" svg:width="14.541cm" svg:height="10.455cm" svg:x="6cm" svg:y="3.9cm">
          <draw:image xlink:href="Pictures/10000000000002AF000001EEF8F7261435DE7A13.png" xlink:type="simple" xlink:show="embed" xlink:actuate="onLoad" draw:mime-type="image/png">
            <text:p/>
          </draw:image>
        </draw:frame>
        <draw:g draw:name="Google Shape;545;p29_2">
          <draw:custom-shape draw:name="Google Shape;546;p29_3" draw:style-name="gr3" draw:text-style-name="P5" draw:layer="layout" svg:width="28.2cm" svg:height="2.858cm" svg:x="-0.099cm" svg:y="-0.099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3">
            <draw:custom-shape draw:name="Google Shape;548;p29_3" draw:style-name="gr4" draw:text-style-name="P7" draw:layer="layout" svg:width="26.91cm" svg:height="0.671cm" svg:x="0.546cm" svg:y="0.382cm">
              <text:p text:style-name="P6"><text:span text:style-name="T2">SYSTÈMES DE RECOMMANDA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3" draw:style-name="gr5" draw:text-style-name="P8" draw:layer="layout" svg:width="26.898cm" svg:height="1.271cm" svg:x="0.552cm" svg:y="1.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0">
          <draw:g draw:name="Google Shape;1683;p46_3">
            <draw:custom-shape draw:name="Google Shape;1684;p46_3" draw:style-name="gr6" draw:text-style-name="P5" draw:layer="layout" svg:width="4.716cm" svg:height="1.238cm" svg:x="22.598cm" svg:y="0.699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3" draw:style-name="gr7" draw:text-style-name="P9" draw:layer="layout" svg:width="3.062cm" svg:height="1.147cm" svg:x="24.364cm" svg:y="1.354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3" draw:style-name="gr8" draw:text-style-name="P10" draw:layer="layout" svg:width="2.023cm" svg:height="1.408cm" svg:x="22.504cm" svg:y="1.093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3" draw:style-name="gr9" draw:text-style-name="P11" draw:layer="layout" svg:width="1.831cm" svg:height="1.23cm" svg:x="22.575cm" svg:y="1.183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3">
            <draw:custom-shape draw:name="Google Shape;1689;p46_3" draw:style-name="gr10" draw:text-style-name="P12" draw:layer="layout" svg:width="4.715cm" svg:height="1.238cm" svg:x="23.176cm" svg:y="0.001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3" draw:style-name="gr11" draw:text-style-name="P13" draw:layer="layout" svg:width="3.062cm" svg:height="1.148cm" svg:x="24.942cm" svg:y="0.656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3" draw:style-name="gr12" draw:text-style-name="P10" draw:layer="layout" svg:width="2.023cm" svg:height="1.409cm" svg:x="23.082cm" svg:y="0.395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3" draw:style-name="gr13" draw:text-style-name="P11" draw:layer="layout" svg:width="1.831cm" svg:height="1.231cm" svg:x="23.153cm" svg:y="0.485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presentation:notes draw:style-name="dp6">
          <draw:page-thumbnail draw:style-name="gr2" draw:layer="layout" svg:width="19.798cm" svg:height="11.136cm" svg:x="0.6cm" svg:y="2.257cm" draw:page-number="5" presentation:class="page"/>
          <draw:frame presentation:style-name="pr3" draw:text-style-name="P21" draw:layer="layout" svg:width="16.799cm" svg:height="13.364cm" svg:x="2.1cm" svg:y="14.107cm" presentation:class="notes" presentation:placeholder="true">
            <draw:text-box/>
          </draw:frame>
        </presentation:notes>
      </draw:page>
      <draw:page draw:name="page6" draw:style-name="dp5" draw:master-page-name="Standard" presentation:presentation-page-layout-name="AL2T1">
        <draw:frame draw:style-name="gr1" draw:text-style-name="P3" draw:layer="layout" svg:width="8.762cm" svg:height="8.212cm" svg:x="2.838cm" svg:y="5.488cm">
          <draw:image xlink:href="Pictures/100000000000019E0000018465C8E627A449DE50.png" xlink:type="simple" xlink:show="embed" xlink:actuate="onLoad" draw:mime-type="image/png">
            <text:p/>
          </draw:image>
        </draw:frame>
        <draw:frame draw:style-name="gr27" draw:text-style-name="P27" draw:layer="layout" svg:width="8.7cm" svg:height="1.673cm" svg:x="15.5cm" svg:y="7.772cm">
          <draw:text-box>
            <text:p text:style-name="P26"><text:span text:style-name="T8">Moyenne « embeddings » articles utilisateur</text:span></text:p>
          </draw:text-box>
        </draw:frame>
        <draw:g draw:name="Google Shape;545;p29_3">
          <draw:custom-shape draw:name="Google Shape;546;p29_4" draw:style-name="gr3" draw:text-style-name="P5" draw:layer="layout" svg:width="28.2cm" svg:height="2.858cm" svg:x="-0.098cm" svg:y="-0.098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4">
            <draw:custom-shape draw:name="Google Shape;548;p29_4" draw:style-name="gr4" draw:text-style-name="P7" draw:layer="layout" svg:width="26.91cm" svg:height="0.671cm" svg:x="0.547cm" svg:y="0.383cm">
              <text:p text:style-name="P6"><text:span text:style-name="T2">CONTENT BASED FILTER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4" draw:style-name="gr5" draw:text-style-name="P8" draw:layer="layout" svg:width="26.898cm" svg:height="1.271cm" svg:x="0.553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3">
          <draw:g draw:name="Google Shape;1683;p46_4">
            <draw:custom-shape draw:name="Google Shape;1684;p46_4" draw:style-name="gr6" draw:text-style-name="P5" draw:layer="layout" svg:width="4.716cm" svg:height="1.238cm" svg:x="22.602cm" svg:y="0.7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4" draw:style-name="gr7" draw:text-style-name="P9" draw:layer="layout" svg:width="3.062cm" svg:height="1.147cm" svg:x="24.368cm" svg:y="1.3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4" draw:style-name="gr8" draw:text-style-name="P10" draw:layer="layout" svg:width="2.023cm" svg:height="1.408cm" svg:x="22.508cm" svg:y="1.0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4" draw:style-name="gr9" draw:text-style-name="P11" draw:layer="layout" svg:width="1.831cm" svg:height="1.23cm" svg:x="22.579cm" svg:y="1.1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4">
            <draw:custom-shape draw:name="Google Shape;1689;p46_4" draw:style-name="gr10" draw:text-style-name="P12" draw:layer="layout" svg:width="4.715cm" svg:height="1.238cm" svg:x="23.18cm" svg:y="0.002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4" draw:style-name="gr11" draw:text-style-name="P13" draw:layer="layout" svg:width="3.062cm" svg:height="1.148cm" svg:x="24.946cm" svg:y="0.657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4" draw:style-name="gr12" draw:text-style-name="P10" draw:layer="layout" svg:width="2.023cm" svg:height="1.409cm" svg:x="23.086cm" svg:y="0.396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4" draw:style-name="gr13" draw:text-style-name="P11" draw:layer="layout" svg:width="1.831cm" svg:height="1.231cm" svg:x="23.157cm" svg:y="0.486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frame draw:style-name="gr26" draw:text-style-name="P28" draw:layer="layout" svg:width="7.2cm" svg:height="1.673cm" svg:x="4.2cm" svg:y="4cm">
          <draw:text-box>
            <text:p text:style-name="P26"><text:span text:style-name="T9">Cosine similarity</text:span></text:p>
          </draw:text-box>
        </draw:frame>
        <draw:frame draw:style-name="gr27" draw:text-style-name="P27" draw:layer="layout" svg:width="8.7cm" svg:height="1.228cm" svg:x="15.5cm" svg:y="10.872cm">
          <draw:text-box>
            <text:p text:style-name="P26"><text:span text:style-name="T8">Article à recommander ?</text:span></text:p>
          </draw:text-box>
        </draw:frame>
        <draw:line draw:style-name="gr28" draw:text-style-name="P29" draw:layer="layout" svg:x1="19cm" svg:y1="9.5cm" svg:x2="19cm" svg:y2="11cm">
          <text:p/>
        </draw:line>
        <presentation:notes draw:style-name="dp6">
          <draw:page-thumbnail draw:style-name="gr2" draw:layer="layout" svg:width="19.798cm" svg:height="11.136cm" svg:x="0.6cm" svg:y="2.257cm" draw:page-number="6" presentation:class="page"/>
          <draw:frame presentation:style-name="pr3" draw:text-style-name="P21" draw:layer="layout" svg:width="16.799cm" svg:height="13.364cm" svg:x="2.1cm" svg:y="14.107cm" presentation:class="notes" presentation:placeholder="true">
            <draw:text-box/>
          </draw:frame>
        </presentation:notes>
      </draw:page>
      <draw:page draw:name="page7" draw:style-name="dp5" draw:master-page-name="Standard" presentation:presentation-page-layout-name="AL2T1">
        <draw:g draw:name="Google Shape;545;p29_8">
          <draw:custom-shape draw:name="Google Shape;546;p29_9" draw:style-name="gr3" draw:text-style-name="P5" draw:layer="layout" svg:width="28.2cm" svg:height="2.858cm" svg:x="-0.097cm" svg:y="-0.097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9">
            <draw:custom-shape draw:name="Google Shape;548;p29_9" draw:style-name="gr4" draw:text-style-name="P7" draw:layer="layout" svg:width="26.91cm" svg:height="0.671cm" svg:x="0.548cm" svg:y="0.384cm">
              <text:p text:style-name="P6"><text:span text:style-name="T2">COLLABORATIVE FILTER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9" draw:style-name="gr5" draw:text-style-name="P8" draw:layer="layout" svg:width="26.898cm" svg:height="1.271cm" svg:x="0.554cm" svg:y="1.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4">
          <draw:g draw:name="Google Shape;1683;p46_9">
            <draw:custom-shape draw:name="Google Shape;1684;p46_9" draw:style-name="gr6" draw:text-style-name="P5" draw:layer="layout" svg:width="4.716cm" svg:height="1.238cm" svg:x="22.606cm" svg:y="0.701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9" draw:style-name="gr7" draw:text-style-name="P9" draw:layer="layout" svg:width="3.062cm" svg:height="1.147cm" svg:x="24.372cm" svg:y="1.356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9" draw:style-name="gr8" draw:text-style-name="P10" draw:layer="layout" svg:width="2.023cm" svg:height="1.408cm" svg:x="22.512cm" svg:y="1.095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9" draw:style-name="gr9" draw:text-style-name="P11" draw:layer="layout" svg:width="1.831cm" svg:height="1.23cm" svg:x="22.583cm" svg:y="1.185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9">
            <draw:custom-shape draw:name="Google Shape;1689;p46_9" draw:style-name="gr10" draw:text-style-name="P12" draw:layer="layout" svg:width="4.715cm" svg:height="1.238cm" svg:x="23.184cm" svg:y="0.003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9" draw:style-name="gr11" draw:text-style-name="P13" draw:layer="layout" svg:width="3.062cm" svg:height="1.148cm" svg:x="24.95cm" svg:y="0.658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9" draw:style-name="gr12" draw:text-style-name="P10" draw:layer="layout" svg:width="2.023cm" svg:height="1.409cm" svg:x="23.09cm" svg:y="0.397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9" draw:style-name="gr13" draw:text-style-name="P11" draw:layer="layout" svg:width="1.831cm" svg:height="1.231cm" svg:x="23.161cm" svg:y="0.487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frame draw:style-name="gr29" draw:text-style-name="P29" draw:layer="layout" svg:width="7.386cm" svg:height="8.508cm" svg:x="18.114cm" svg:y="5.492cm">
          <draw:image xlink:href="Pictures/100000000000015D0000019298DF5E94E5E233B7.png" xlink:type="simple" xlink:show="embed" xlink:actuate="onLoad" draw:mime-type="image/png">
            <text:p/>
          </draw:image>
        </draw:frame>
        <draw:frame draw:style-name="gr26" draw:text-style-name="P28" draw:layer="layout" svg:width="7.2cm" svg:height="1.673cm" svg:x="18.5cm" svg:y="4cm">
          <draw:text-box>
            <text:p text:style-name="P26"><text:span text:style-name="T9">Rating implicite</text:span></text:p>
          </draw:text-box>
        </draw:frame>
        <draw:frame draw:style-name="gr29" draw:text-style-name="P29" draw:layer="layout" svg:width="14.646cm" svg:height="5.947cm" svg:x="1.1cm" svg:y="6.3cm">
          <draw:image xlink:href="Pictures/10000000000002B400000119BD013C6835294B7D.png" xlink:type="simple" xlink:show="embed" xlink:actuate="onLoad" draw:mime-type="image/png">
            <text:p/>
          </draw:image>
        </draw:frame>
        <draw:frame draw:style-name="gr26" draw:text-style-name="P28" draw:layer="layout" svg:width="13.5cm" svg:height="1.673cm" svg:x="1.5cm" svg:y="3.901cm">
          <draw:text-box>
            <text:p text:style-name="P26"><text:span text:style-name="T9">SVD – Singular Vector <text:s/>Decomposition</text:span></text:p>
          </draw:text-box>
        </draw:frame>
        <presentation:notes draw:style-name="dp6">
          <draw:page-thumbnail draw:style-name="gr2" draw:layer="layout" svg:width="19.798cm" svg:height="11.136cm" svg:x="0.6cm" svg:y="2.257cm" draw:page-number="7" presentation:class="page"/>
          <draw:frame presentation:style-name="pr3" draw:text-style-name="P21" draw:layer="layout" svg:width="16.799cm" svg:height="13.364cm" svg:x="2.1cm" svg:y="14.107cm" presentation:class="notes" presentation:placeholder="true">
            <draw:text-box/>
          </draw:frame>
        </presentation:notes>
      </draw:page>
      <draw:page draw:name="page8" draw:style-name="dp5" draw:master-page-name="Standard" presentation:presentation-page-layout-name="AL1T0">
        <office:forms form:automatic-focus="false" form:apply-design-mode="false"/>
        <draw:g draw:name="Google Shape;545;p29_4">
          <draw:custom-shape draw:name="Google Shape;546;p29_5"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5">
            <draw:custom-shape draw:name="Google Shape;548;p29_5" draw:style-name="gr4" draw:text-style-name="P7" draw:layer="layout" svg:width="26.91cm" svg:height="0.671cm" svg:x="0.545cm" svg:y="0.381cm">
              <text:p text:style-name="P6"><text:span text:style-name="T2">DESCRIPTION - HYBRID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5"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5">
          <draw:g draw:name="Google Shape;1683;p46_5">
            <draw:custom-shape draw:name="Google Shape;1684;p46_5"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5"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5"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5"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5">
            <draw:custom-shape draw:name="Google Shape;1689;p46_5"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5"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5"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5"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custom-shape draw:style-name="gr30" draw:text-style-name="P30" draw:layer="layout" svg:width="6.5cm" svg:height="2.5cm" svg:x="1cm" svg:y="11cm">
          <text:p/>
          <draw:enhanced-geometry svg:viewBox="0 0 21600 21600" draw:type="rectangle" draw:enhanced-path="M 0 0 L 21600 0 21600 21600 0 21600 0 0 Z N"/>
        </draw:custom-shape>
        <draw:custom-shape draw:style-name="gr30" draw:text-style-name="P30" draw:layer="layout" svg:width="6.5cm" svg:height="2.5cm" svg:x="11.1cm" svg:y="11cm">
          <text:p/>
          <draw:enhanced-geometry svg:viewBox="0 0 21600 21600" draw:type="rectangle" draw:enhanced-path="M 0 0 L 21600 0 21600 21600 0 21600 0 0 Z N"/>
        </draw:custom-shape>
        <draw:custom-shape draw:style-name="gr30" draw:text-style-name="P30" draw:layer="layout" svg:width="6.5cm" svg:height="2.5cm" svg:x="1cm" svg:y="11cm">
          <text:p/>
          <draw:enhanced-geometry svg:viewBox="0 0 21600 21600" draw:type="rectangle" draw:enhanced-path="M 0 0 L 21600 0 21600 21600 0 21600 0 0 Z N"/>
        </draw:custom-shape>
        <draw:custom-shape draw:style-name="gr30" draw:text-style-name="P30" draw:layer="layout" svg:width="6.5cm" svg:height="2.5cm" svg:x="20.8cm" svg:y="11cm">
          <text:p/>
          <draw:enhanced-geometry svg:viewBox="0 0 21600 21600" draw:type="rectangle" draw:enhanced-path="M 0 0 L 21600 0 21600 21600 0 21600 0 0 Z N"/>
        </draw:custom-shape>
        <draw:frame draw:style-name="gr31" draw:text-style-name="P32" draw:layer="layout" svg:width="5cm" svg:height="2.384cm" svg:x="1.9cm" svg:y="11.5cm">
          <draw:text-box>
            <text:p text:style-name="P31">User based </text:p>
            <text:p text:style-name="P31">recommender</text:p>
          </draw:text-box>
        </draw:frame>
        <draw:frame draw:style-name="gr31" draw:text-style-name="P32" draw:layer="layout" svg:width="5cm" svg:height="2.384cm" svg:x="11.9cm" svg:y="11.5cm">
          <draw:text-box>
            <text:p text:style-name="P31">Content based </text:p>
            <text:p text:style-name="P31">recommender</text:p>
          </draw:text-box>
        </draw:frame>
        <draw:frame draw:style-name="gr31" draw:text-style-name="P32" draw:layer="layout" svg:width="5cm" svg:height="2.384cm" svg:x="21.5cm" svg:y="11.5cm">
          <draw:text-box>
            <text:p text:style-name="P31">Articles populaires</text:p>
          </draw:text-box>
        </draw:frame>
        <draw:line draw:style-name="gr32" draw:text-style-name="P3" draw:layer="layout" svg:x1="6.6cm" svg:y1="8cm" svg:x2="4.2cm" svg:y2="10.5cm">
          <text:p/>
        </draw:line>
        <draw:line draw:style-name="gr32" draw:text-style-name="P3" draw:layer="layout" svg:x1="14.3cm" svg:y1="8cm" svg:x2="14.3cm" svg:y2="10.5cm">
          <text:p/>
        </draw:line>
        <draw:line draw:style-name="gr32" draw:text-style-name="P3" draw:layer="layout" svg:x1="21.1cm" svg:y1="8cm" svg:x2="23.1cm" svg:y2="10.5cm">
          <text:p/>
        </draw:line>
        <draw:frame draw:style-name="gr33" draw:text-style-name="P34" draw:layer="layout" svg:width="7.572cm" svg:height="1.361cm" svg:x="0.6cm" svg:y="8.537cm">
          <draw:text-box>
            <text:p text:style-name="P33"><text:span text:style-name="T10">Utilisateur régulier</text:span></text:p>
            <text:p text:style-name="P33"><text:span text:style-name="T10">Nombreux clicks</text:span></text:p>
          </draw:text-box>
        </draw:frame>
        <draw:frame draw:style-name="gr24" draw:text-style-name="P34" draw:layer="layout" svg:width="5.9cm" svg:height="1.361cm" svg:x="8.9cm" svg:y="8.538cm">
          <draw:text-box>
            <text:p text:style-name="P33"><text:span text:style-name="T10">Utilisateur occasionnel</text:span></text:p>
            <text:p text:style-name="P33"><text:span text:style-name="T10">Quelques clicks</text:span></text:p>
          </draw:text-box>
        </draw:frame>
        <draw:frame draw:style-name="gr24" draw:text-style-name="P34" draw:layer="layout" svg:width="5cm" svg:height="1.361cm" svg:x="23cm" svg:y="8.539cm">
          <draw:text-box>
            <text:p text:style-name="P33"><text:span text:style-name="T10">Nouvel utilisateur</text:span></text:p>
            <text:p text:style-name="P33"><text:span text:style-name="T10">Aucun click</text:span></text:p>
          </draw:text-box>
        </draw:frame>
        <draw:custom-shape draw:style-name="gr34" draw:text-style-name="P30" draw:layer="layout" svg:width="14.5cm" svg:height="2.5cm" svg:x="6.6cm" svg:y="4.8cm">
          <text:p/>
          <draw:enhanced-geometry svg:viewBox="0 0 21600 21600" draw:type="rectangle" draw:enhanced-path="M 0 0 L 21600 0 21600 21600 0 21600 0 0 Z N"/>
        </draw:custom-shape>
        <draw:frame draw:style-name="gr31" draw:text-style-name="P32" draw:layer="layout" svg:width="10.5cm" svg:height="2.384cm" svg:x="9cm" svg:y="5.5cm">
          <draw:text-box>
            <text:p text:style-name="P31">Détermination du type d’utilisateur</text:p>
          </draw:text-box>
        </draw:frame>
        <draw:frame draw:style-name="gr24" draw:text-style-name="P34" draw:layer="layout" svg:width="3.9cm" svg:height="1.361cm" svg:x="12.5cm" svg:y="3cm">
          <draw:text-box>
            <text:p text:style-name="P33"><text:span text:style-name="T11">Utilisateur</text:span><text:span text:style-name="T10"> </text:span></text:p>
          </draw:text-box>
        </draw:frame>
        <draw:line draw:style-name="gr35" draw:text-style-name="P3" draw:layer="layout" svg:x1="14cm" svg:y1="3.8cm" svg:x2="14cm" svg:y2="4.8cm">
          <text:p/>
        </draw:line>
        <presentation:notes draw:style-name="dp6">
          <draw:page-thumbnail draw:style-name="gr2" draw:layer="layout" svg:width="19.798cm" svg:height="11.136cm" svg:x="0.6cm" svg:y="2.257cm" draw:page-number="8" presentation:class="page"/>
          <draw:frame presentation:style-name="pr3" draw:text-style-name="P21" draw:layer="layout" svg:width="16.799cm" svg:height="13.364cm" svg:x="2.1cm" svg:y="14.107cm" presentation:class="notes" presentation:placeholder="true">
            <draw:text-box/>
          </draw:frame>
        </presentation:notes>
      </draw:page>
      <draw:page draw:name="page9" draw:style-name="dp5" draw:master-page-name="Standard" presentation:presentation-page-layout-name="AL1T0">
        <office:forms form:automatic-focus="false" form:apply-design-mode="false"/>
        <draw:g draw:name="Google Shape;545;p29_5">
          <draw:custom-shape draw:name="Google Shape;546;p29_6"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6">
            <draw:custom-shape draw:name="Google Shape;548;p29_6" draw:style-name="gr4" draw:text-style-name="P7" draw:layer="layout" svg:width="26.91cm" svg:height="0.671cm" svg:x="0.545cm" svg:y="0.381cm">
              <text:p text:style-name="P6"><text:span text:style-name="T2">DESCRIPTION - DONNÉE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6"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6">
          <draw:g draw:name="Google Shape;1683;p46_6">
            <draw:custom-shape draw:name="Google Shape;1684;p46_6"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6"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6"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6"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6">
            <draw:custom-shape draw:name="Google Shape;1689;p46_6"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6"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6"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6"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custom-shape draw:style-name="gr30" draw:text-style-name="P30" draw:layer="layout" svg:width="6.5cm" svg:height="2.5cm" svg:x="1cm" svg:y="9.5cm">
          <text:p/>
          <draw:enhanced-geometry svg:viewBox="0 0 21600 21600" draw:type="rectangle" draw:enhanced-path="M 0 0 L 21600 0 21600 21600 0 21600 0 0 Z N"/>
        </draw:custom-shape>
        <draw:custom-shape draw:style-name="gr30" draw:text-style-name="P30" draw:layer="layout" svg:width="6.5cm" svg:height="2.5cm" svg:x="11.1cm" svg:y="9.5cm">
          <text:p/>
          <draw:enhanced-geometry svg:viewBox="0 0 21600 21600" draw:type="rectangle" draw:enhanced-path="M 0 0 L 21600 0 21600 21600 0 21600 0 0 Z N"/>
        </draw:custom-shape>
        <draw:custom-shape draw:style-name="gr30" draw:text-style-name="P30" draw:layer="layout" svg:width="6.5cm" svg:height="2.5cm" svg:x="1cm" svg:y="9.5cm">
          <text:p/>
          <draw:enhanced-geometry svg:viewBox="0 0 21600 21600" draw:type="rectangle" draw:enhanced-path="M 0 0 L 21600 0 21600 21600 0 21600 0 0 Z N"/>
        </draw:custom-shape>
        <draw:custom-shape draw:style-name="gr30" draw:text-style-name="P30" draw:layer="layout" svg:width="6.5cm" svg:height="2.5cm" svg:x="20.8cm" svg:y="9.5cm">
          <text:p/>
          <draw:enhanced-geometry svg:viewBox="0 0 21600 21600" draw:type="rectangle" draw:enhanced-path="M 0 0 L 21600 0 21600 21600 0 21600 0 0 Z N"/>
        </draw:custom-shape>
        <draw:frame draw:style-name="gr31" draw:text-style-name="P32" draw:layer="layout" svg:width="5cm" svg:height="2.384cm" svg:x="1.9cm" svg:y="10cm">
          <draw:text-box>
            <text:p text:style-name="P31">User based </text:p>
            <text:p text:style-name="P31">recommender</text:p>
          </draw:text-box>
        </draw:frame>
        <draw:frame draw:style-name="gr31" draw:text-style-name="P32" draw:layer="layout" svg:width="5cm" svg:height="2.384cm" svg:x="11.9cm" svg:y="10cm">
          <draw:text-box>
            <text:p text:style-name="P31">Content based </text:p>
            <text:p text:style-name="P31">recommender</text:p>
          </draw:text-box>
        </draw:frame>
        <draw:frame draw:style-name="gr31" draw:text-style-name="P32" draw:layer="layout" svg:width="5cm" svg:height="2.384cm" svg:x="21.5cm" svg:y="10cm">
          <draw:text-box>
            <text:p text:style-name="P31">Articles populaires</text:p>
          </draw:text-box>
        </draw:frame>
        <draw:line draw:style-name="gr32" draw:text-style-name="P3" draw:layer="layout" svg:x1="6.6cm" svg:y1="8cm" svg:x2="5.5cm" svg:y2="9cm">
          <text:p/>
        </draw:line>
        <draw:line draw:style-name="gr32" draw:text-style-name="P3" draw:layer="layout" svg:x1="14.3cm" svg:y1="8cm" svg:x2="14.3cm" svg:y2="9cm">
          <text:p/>
        </draw:line>
        <draw:line draw:style-name="gr32" draw:text-style-name="P3" draw:layer="layout" svg:x1="21.1cm" svg:y1="8cm" svg:x2="22cm" svg:y2="9cm">
          <text:p/>
        </draw:line>
        <draw:custom-shape draw:style-name="gr34" draw:text-style-name="P30" draw:layer="layout" svg:width="14.5cm" svg:height="2.5cm" svg:x="6.6cm" svg:y="4.8cm">
          <text:p/>
          <draw:enhanced-geometry svg:viewBox="0 0 21600 21600" draw:type="rectangle" draw:enhanced-path="M 0 0 L 21600 0 21600 21600 0 21600 0 0 Z N"/>
        </draw:custom-shape>
        <draw:frame draw:style-name="gr31" draw:text-style-name="P32" draw:layer="layout" svg:width="10.5cm" svg:height="2.384cm" svg:x="9cm" svg:y="5.5cm">
          <draw:text-box>
            <text:p text:style-name="P31">Détermination du type d’utilisateur</text:p>
          </draw:text-box>
        </draw:frame>
        <draw:frame draw:style-name="gr24" draw:text-style-name="P34" draw:layer="layout" svg:width="3.9cm" svg:height="1.361cm" svg:x="12.5cm" svg:y="3cm">
          <draw:text-box>
            <text:p text:style-name="P33"><text:span text:style-name="T11">Utilisateur</text:span><text:span text:style-name="T10"> </text:span></text:p>
          </draw:text-box>
        </draw:frame>
        <draw:line draw:style-name="gr35" draw:text-style-name="P3" draw:layer="layout" svg:x1="14cm" svg:y1="3.8cm" svg:x2="14cm" svg:y2="4.8cm">
          <text:p/>
        </draw:line>
        <draw:frame draw:style-name="gr24" draw:text-style-name="P36" draw:layer="layout" svg:width="4cm" svg:height="1.361cm" svg:x="2.2cm" svg:y="13.3cm">
          <draw:text-box>
            <text:p text:style-name="P35"><text:span text:style-name="T10">cf_model</text:span></text:p>
            <text:p text:style-name="P35"><text:span text:style-name="T10">cf_list_articles</text:span></text:p>
          </draw:text-box>
        </draw:frame>
        <draw:frame draw:style-name="gr36" draw:text-style-name="P36" draw:layer="layout" svg:width="7cm" svg:height="1.916cm" svg:x="11.5cm" svg:y="13.24cm">
          <draw:text-box>
            <text:p text:style-name="P35"><text:span text:style-name="T10">Clicks (articles utilisateur)</text:span></text:p>
            <text:p text:style-name="P35"><text:span text:style-name="T10">articles_embedding</text:span></text:p>
          </draw:text-box>
        </draw:frame>
        <draw:frame draw:style-name="gr33" draw:text-style-name="P36" draw:layer="layout" svg:width="2.572cm" svg:height="0.963cm" svg:x="22.928cm" svg:y="13.637cm">
          <draw:text-box>
            <text:p text:style-name="P35"><text:span text:style-name="T10">Clicks </text:span></text:p>
          </draw:text-box>
        </draw:frame>
        <draw:frame draw:style-name="gr33" draw:text-style-name="P36" draw:layer="layout" svg:width="2.572cm" svg:height="0.963cm" svg:x="22cm" svg:y="5.537cm">
          <draw:text-box>
            <text:p text:style-name="P35"><text:span text:style-name="T10">Clicks </text:span></text:p>
          </draw:text-box>
        </draw:frame>
        <draw:line draw:style-name="gr37" draw:text-style-name="P3" draw:layer="layout" svg:x1="3.5cm" svg:y1="13cm" svg:x2="3.5cm" svg:y2="12cm">
          <text:p/>
        </draw:line>
        <draw:line draw:style-name="gr38" draw:text-style-name="P3" draw:layer="layout" svg:x1="14.5cm" svg:y1="13cm" svg:x2="14.5cm" svg:y2="12cm">
          <text:p/>
        </draw:line>
        <draw:line draw:style-name="gr39" draw:text-style-name="P3" draw:layer="layout" svg:x1="23.8cm" svg:y1="13cm" svg:x2="23.8cm" svg:y2="12cm">
          <text:p/>
        </draw:line>
        <draw:line draw:style-name="gr40" draw:text-style-name="P3" draw:layer="layout" svg:x1="22cm" svg:y1="6cm" svg:x2="21.1cm" svg:y2="6cm">
          <text:p/>
        </draw:line>
        <presentation:notes draw:style-name="dp6">
          <draw:page-thumbnail draw:style-name="gr2" draw:layer="layout" svg:width="19.798cm" svg:height="11.136cm" svg:x="0.6cm" svg:y="2.257cm" draw:page-number="9" presentation:class="page"/>
          <draw:frame presentation:style-name="pr3" draw:text-style-name="P21" draw:layer="layout" svg:width="16.799cm" svg:height="13.364cm" svg:x="2.1cm" svg:y="14.107cm" presentation:class="notes" presentation:placeholder="true">
            <draw:text-box/>
          </draw:frame>
        </presentation:notes>
      </draw:page>
      <draw:page draw:name="page10" draw:style-name="dp5" draw:master-page-name="Standard" presentation:presentation-page-layout-name="AL1T0">
        <office:forms form:automatic-focus="false" form:apply-design-mode="false"/>
        <draw:g draw:name="Google Shape;545;p29_6">
          <draw:custom-shape draw:name="Google Shape;546;p29_7"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7">
            <draw:custom-shape draw:name="Google Shape;548;p29_7" draw:style-name="gr4" draw:text-style-name="P7" draw:layer="layout" svg:width="26.91cm" svg:height="0.671cm" svg:x="0.545cm" svg:y="0.381cm">
              <text:p text:style-name="P6"><text:span text:style-name="T2">DESCRIPTION - NOUVEL ARTICL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7"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7">
          <draw:g draw:name="Google Shape;1683;p46_7">
            <draw:custom-shape draw:name="Google Shape;1684;p46_7"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7"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7"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7"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7">
            <draw:custom-shape draw:name="Google Shape;1689;p46_7"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7"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7"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7"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custom-shape draw:style-name="gr30" draw:text-style-name="P30" draw:layer="layout" svg:width="6.5cm" svg:height="2.5cm" svg:x="1cm" svg:y="9.5cm">
          <text:p/>
          <draw:enhanced-geometry svg:viewBox="0 0 21600 21600" draw:type="rectangle" draw:enhanced-path="M 0 0 L 21600 0 21600 21600 0 21600 0 0 Z N"/>
        </draw:custom-shape>
        <draw:custom-shape draw:style-name="gr30" draw:text-style-name="P30" draw:layer="layout" svg:width="6.5cm" svg:height="2.5cm" svg:x="11.1cm" svg:y="9.5cm">
          <text:p/>
          <draw:enhanced-geometry svg:viewBox="0 0 21600 21600" draw:type="rectangle" draw:enhanced-path="M 0 0 L 21600 0 21600 21600 0 21600 0 0 Z N"/>
        </draw:custom-shape>
        <draw:custom-shape draw:style-name="gr30" draw:text-style-name="P30" draw:layer="layout" svg:width="6.5cm" svg:height="2.5cm" svg:x="1cm" svg:y="9.5cm">
          <text:p/>
          <draw:enhanced-geometry svg:viewBox="0 0 21600 21600" draw:type="rectangle" draw:enhanced-path="M 0 0 L 21600 0 21600 21600 0 21600 0 0 Z N"/>
        </draw:custom-shape>
        <draw:custom-shape draw:style-name="gr30" draw:text-style-name="P30" draw:layer="layout" svg:width="6.5cm" svg:height="2.5cm" svg:x="20.8cm" svg:y="9.5cm">
          <text:p/>
          <draw:enhanced-geometry svg:viewBox="0 0 21600 21600" draw:type="rectangle" draw:enhanced-path="M 0 0 L 21600 0 21600 21600 0 21600 0 0 Z N"/>
        </draw:custom-shape>
        <draw:frame draw:style-name="gr31" draw:text-style-name="P32" draw:layer="layout" svg:width="5cm" svg:height="2.384cm" svg:x="1.9cm" svg:y="10cm">
          <draw:text-box>
            <text:p text:style-name="P31">User based </text:p>
            <text:p text:style-name="P31">recommender</text:p>
          </draw:text-box>
        </draw:frame>
        <draw:frame draw:style-name="gr31" draw:text-style-name="P32" draw:layer="layout" svg:width="5cm" svg:height="2.384cm" svg:x="11.9cm" svg:y="10cm">
          <draw:text-box>
            <text:p text:style-name="P31">Content based </text:p>
            <text:p text:style-name="P31">recommender</text:p>
          </draw:text-box>
        </draw:frame>
        <draw:frame draw:style-name="gr31" draw:text-style-name="P32" draw:layer="layout" svg:width="5cm" svg:height="2.384cm" svg:x="21.5cm" svg:y="10cm">
          <draw:text-box>
            <text:p text:style-name="P31">Articles populaires</text:p>
          </draw:text-box>
        </draw:frame>
        <draw:line draw:style-name="gr32" draw:text-style-name="P3" draw:layer="layout" svg:x1="6.6cm" svg:y1="8cm" svg:x2="5.5cm" svg:y2="9cm">
          <text:p/>
        </draw:line>
        <draw:line draw:style-name="gr32" draw:text-style-name="P3" draw:layer="layout" svg:x1="14.3cm" svg:y1="8cm" svg:x2="14.3cm" svg:y2="9cm">
          <text:p/>
        </draw:line>
        <draw:line draw:style-name="gr32" draw:text-style-name="P3" draw:layer="layout" svg:x1="21.1cm" svg:y1="8cm" svg:x2="22cm" svg:y2="9cm">
          <text:p/>
        </draw:line>
        <draw:custom-shape draw:style-name="gr34" draw:text-style-name="P30" draw:layer="layout" svg:width="14.5cm" svg:height="2.5cm" svg:x="6.6cm" svg:y="4.8cm">
          <text:p/>
          <draw:enhanced-geometry svg:viewBox="0 0 21600 21600" draw:type="rectangle" draw:enhanced-path="M 0 0 L 21600 0 21600 21600 0 21600 0 0 Z N"/>
        </draw:custom-shape>
        <draw:frame draw:style-name="gr31" draw:text-style-name="P32" draw:layer="layout" svg:width="10.5cm" svg:height="2.384cm" svg:x="9cm" svg:y="5.5cm">
          <draw:text-box>
            <text:p text:style-name="P31">Détermination du type d’utilisateur</text:p>
          </draw:text-box>
        </draw:frame>
        <draw:frame draw:style-name="gr24" draw:text-style-name="P34" draw:layer="layout" svg:width="3.9cm" svg:height="1.361cm" svg:x="12.5cm" svg:y="3cm">
          <draw:text-box>
            <text:p text:style-name="P33"><text:span text:style-name="T11">Utilisateur</text:span><text:span text:style-name="T10"> </text:span></text:p>
          </draw:text-box>
        </draw:frame>
        <draw:line draw:style-name="gr35" draw:text-style-name="P3" draw:layer="layout" svg:x1="14cm" svg:y1="3.8cm" svg:x2="14cm" svg:y2="4.8cm">
          <text:p/>
        </draw:line>
        <draw:frame draw:style-name="gr24" draw:text-style-name="P38" draw:layer="layout" svg:width="4cm" svg:height="1.361cm" svg:x="2.2cm" svg:y="13.3cm">
          <draw:text-box>
            <text:p text:style-name="P37"><text:span text:style-name="T10">Process nouvel article</text:span></text:p>
          </draw:text-box>
        </draw:frame>
        <draw:frame draw:style-name="gr41" draw:text-style-name="P36" draw:layer="layout" svg:width="8.5cm" svg:height="2.471cm" svg:x="10.9cm" svg:y="12.901cm">
          <draw:text-box>
            <text:p text:style-name="P35"><text:span text:style-name="T10">Pris en compte</text:span></text:p>
            <text:p text:style-name="P35"><text:span text:style-name="T10">Mise à jour articles_embedding</text:span></text:p>
          </draw:text-box>
        </draw:frame>
        <draw:line draw:style-name="gr42" draw:text-style-name="P3" draw:layer="layout" svg:x1="4cm" svg:y1="12.384cm" svg:x2="4cm" svg:y2="13.3cm">
          <text:p/>
        </draw:line>
        <presentation:notes draw:style-name="dp6">
          <draw:page-thumbnail draw:style-name="gr2" draw:layer="layout" svg:width="19.798cm" svg:height="11.136cm" svg:x="0.6cm" svg:y="2.257cm" draw:page-number="10" presentation:class="page"/>
          <draw:frame presentation:style-name="pr3" draw:text-style-name="P21" draw:layer="layout" svg:width="16.799cm" svg:height="13.364cm" svg:x="2.1cm" svg:y="14.107cm" presentation:class="notes" presentation:placeholder="true">
            <draw:text-box/>
          </draw:frame>
        </presentation:notes>
      </draw:page>
      <draw:page draw:name="page11" draw:style-name="dp5" draw:master-page-name="Standard" presentation:presentation-page-layout-name="AL1T0">
        <office:forms form:automatic-focus="false" form:apply-design-mode="false"/>
        <draw:g draw:name="Google Shape;545;p29_7">
          <draw:custom-shape draw:name="Google Shape;546;p29_8"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8">
            <draw:custom-shape draw:name="Google Shape;548;p29_8" draw:style-name="gr4" draw:text-style-name="P7" draw:layer="layout" svg:width="26.91cm" svg:height="0.671cm" svg:x="0.545cm" svg:y="0.381cm">
              <text:p text:style-name="P6"><text:span text:style-name="T2">DESCRIPTION – NOUVEL ARTICL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8"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8">
          <draw:g draw:name="Google Shape;1683;p46_8">
            <draw:custom-shape draw:name="Google Shape;1684;p46_8"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8"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8"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8"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8">
            <draw:custom-shape draw:name="Google Shape;1689;p46_8"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8"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8"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8"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custom-shape draw:style-name="gr30" draw:text-style-name="P30" draw:layer="layout" svg:width="6.5cm" svg:height="2.5cm" svg:x="4.7cm" svg:y="8.2cm">
          <text:p/>
          <draw:enhanced-geometry svg:viewBox="0 0 21600 21600" draw:type="rectangle" draw:enhanced-path="M 0 0 L 21600 0 21600 21600 0 21600 0 0 Z N"/>
        </draw:custom-shape>
        <draw:custom-shape draw:style-name="gr30" draw:text-style-name="P30" draw:layer="layout" svg:width="6.5cm" svg:height="2.5cm" svg:x="14.8cm" svg:y="8.2cm">
          <text:p/>
          <draw:enhanced-geometry svg:viewBox="0 0 21600 21600" draw:type="rectangle" draw:enhanced-path="M 0 0 L 21600 0 21600 21600 0 21600 0 0 Z N"/>
        </draw:custom-shape>
        <draw:custom-shape draw:style-name="gr30" draw:text-style-name="P30" draw:layer="layout" svg:width="6.5cm" svg:height="2.5cm" svg:x="4.7cm" svg:y="8.2cm">
          <text:p/>
          <draw:enhanced-geometry svg:viewBox="0 0 21600 21600" draw:type="rectangle" draw:enhanced-path="M 0 0 L 21600 0 21600 21600 0 21600 0 0 Z N"/>
        </draw:custom-shape>
        <draw:custom-shape draw:style-name="gr30" draw:text-style-name="P30" draw:layer="layout" svg:width="6.5cm" svg:height="2.5cm" svg:x="9.8cm" svg:y="12.501cm">
          <text:p/>
          <draw:enhanced-geometry svg:viewBox="0 0 21600 21600" draw:type="rectangle" draw:enhanced-path="M 0 0 L 21600 0 21600 21600 0 21600 0 0 Z N"/>
        </draw:custom-shape>
        <draw:frame draw:style-name="gr31" draw:text-style-name="P32" draw:layer="layout" svg:width="5cm" svg:height="2.384cm" svg:x="6.5cm" svg:y="8.9cm">
          <draw:text-box>
            <text:p text:style-name="P31">scores</text:p>
          </draw:text-box>
        </draw:frame>
        <draw:frame draw:style-name="gr31" draw:text-style-name="P32" draw:layer="layout" svg:width="5cm" svg:height="2.384cm" svg:x="16.8cm" svg:y="8.9cm">
          <draw:text-box>
            <text:p text:style-name="P31">scores</text:p>
            <text:p text:style-name="P31"/>
          </draw:text-box>
        </draw:frame>
        <draw:frame draw:style-name="gr31" draw:text-style-name="P32" draw:layer="layout" svg:width="5cm" svg:height="2.384cm" svg:x="11.6cm" svg:y="13.016cm">
          <draw:text-box>
            <text:p text:style-name="P31">Meilleurs scores</text:p>
          </draw:text-box>
        </draw:frame>
        <draw:frame draw:style-name="gr24" draw:text-style-name="P36" draw:layer="layout" svg:width="3.9cm" svg:height="1.361cm" svg:x="11.4cm" svg:y="5.739cm">
          <draw:text-box>
            <text:p text:style-name="P35">Embedding user mean</text:p>
          </draw:text-box>
        </draw:frame>
        <draw:line draw:style-name="gr35" draw:text-style-name="P3" draw:layer="layout" svg:x1="6.5cm" svg:y1="7.2cm" svg:x2="6.5cm" svg:y2="8.2cm">
          <text:p/>
        </draw:line>
        <draw:frame draw:style-name="gr24" draw:text-style-name="P36" draw:layer="layout" svg:width="4cm" svg:height="1.361cm" svg:x="4.9cm" svg:y="13.1cm">
          <draw:text-box>
            <text:p text:style-name="P35"><text:span text:style-name="T10">Max new articles (2)</text:span></text:p>
          </draw:text-box>
        </draw:frame>
        <draw:frame draw:style-name="gr36" draw:text-style-name="P36" draw:layer="layout" svg:width="5.5cm" svg:height="1.916cm" svg:x="4.4cm" svg:y="5.7cm">
          <draw:text-box>
            <text:p text:style-name="P35">Embedding </text:p>
            <text:p text:style-name="P35">cf recommendations</text:p>
          </draw:text-box>
        </draw:frame>
        <draw:frame draw:style-name="gr24" draw:text-style-name="P36" draw:layer="layout" svg:width="3.9cm" svg:height="1.361cm" svg:x="18.4cm" svg:y="5.7cm">
          <draw:text-box>
            <text:p text:style-name="P35">Embedding new articles</text:p>
          </draw:text-box>
        </draw:frame>
        <draw:line draw:style-name="gr42" draw:text-style-name="P3" draw:layer="layout" svg:x1="20cm" svg:y1="7.061cm" svg:x2="20cm" svg:y2="8.2cm">
          <text:p/>
        </draw:line>
        <draw:line draw:style-name="gr42" draw:text-style-name="P3" draw:layer="layout" svg:x1="12cm" svg:y1="7.2cm" svg:x2="11cm" svg:y2="8.2cm">
          <text:p/>
        </draw:line>
        <draw:line draw:style-name="gr42" draw:text-style-name="P3" draw:layer="layout" svg:x1="14cm" svg:y1="7.2cm" svg:x2="15cm" svg:y2="8.2cm">
          <text:p/>
        </draw:line>
        <draw:line draw:style-name="gr42" draw:text-style-name="P3" draw:layer="layout" svg:x1="10cm" svg:y1="10.7cm" svg:x2="11cm" svg:y2="12.501cm">
          <text:p/>
        </draw:line>
        <draw:line draw:style-name="gr42" draw:text-style-name="P3" draw:layer="layout" svg:x1="16cm" svg:y1="10.7cm" svg:x2="15cm" svg:y2="12.501cm">
          <text:p/>
        </draw:line>
        <draw:line draw:style-name="gr42" draw:text-style-name="P3" draw:layer="layout" svg:x1="8cm" svg:y1="13.7cm" svg:x2="9.8cm" svg:y2="13.7cm">
          <text:p/>
        </draw:line>
        <draw:line draw:style-name="gr42" draw:text-style-name="P3" draw:layer="layout" svg:x1="16.3cm" svg:y1="13.7cm" svg:x2="19cm" svg:y2="13.7cm">
          <text:p/>
        </draw:line>
        <draw:frame draw:style-name="gr24" draw:text-style-name="P38" draw:layer="layout" svg:width="4cm" svg:height="1.361cm" svg:x="19cm" svg:y="13.2cm">
          <draw:text-box>
            <text:p text:style-name="P37"><text:span text:style-name="T10">Articles recommandés</text:span></text:p>
          </draw:text-box>
        </draw:frame>
        <draw:frame draw:style-name="gr24" draw:text-style-name="P38" draw:layer="layout" svg:width="3.9cm" svg:height="1.361cm" svg:x="23.2cm" svg:y="5.701cm">
          <draw:text-box>
            <text:p text:style-name="P37">List new articles</text:p>
          </draw:text-box>
        </draw:frame>
        <draw:line draw:style-name="gr42" draw:text-style-name="P3" draw:layer="layout" svg:x1="22.9cm" svg:y1="6.3cm" svg:x2="21.9cm" svg:y2="6.3cm">
          <text:p/>
        </draw:line>
        <draw:custom-shape draw:style-name="gr43" draw:text-style-name="P30" draw:layer="layout" svg:width="3.5cm" svg:height="1.384cm" svg:x="5cm" svg:y="3.316cm">
          <text:p/>
          <draw:enhanced-geometry svg:viewBox="0 0 21600 21600" draw:type="rectangle" draw:enhanced-path="M 0 0 L 21600 0 21600 21600 0 21600 0 0 Z N"/>
        </draw:custom-shape>
        <draw:custom-shape draw:style-name="gr44" draw:text-style-name="P30" draw:layer="layout" svg:width="3.6cm" svg:height="1.384cm" svg:x="4.9cm" svg:y="3.316cm">
          <text:p/>
          <draw:enhanced-geometry svg:viewBox="0 0 21600 21600" draw:type="rectangle" draw:enhanced-path="M 0 0 L 21600 0 21600 21600 0 21600 0 0 Z N"/>
        </draw:custom-shape>
        <draw:frame draw:style-name="gr45" draw:text-style-name="P40" draw:layer="layout" svg:width="3.6cm" svg:height="1.384cm" svg:x="4.9cm" svg:y="3.316cm">
          <draw:text-box>
            <text:p text:style-name="P39"><text:span text:style-name="T10">User based </text:span></text:p>
            <text:p text:style-name="P39"><text:span text:style-name="T10">recommender</text:span></text:p>
          </draw:text-box>
        </draw:frame>
        <draw:frame draw:style-name="gr46" draw:text-style-name="P36" draw:layer="layout" svg:width="3.5cm" svg:height="1.416cm" svg:x="11.5cm" svg:y="3.5cm">
          <draw:text-box>
            <text:p text:style-name="P35"><text:span text:style-name="T12">Utilisateur</text:span></text:p>
          </draw:text-box>
        </draw:frame>
        <draw:line draw:style-name="gr42" draw:text-style-name="P3" draw:layer="layout" svg:x1="11.1cm" svg:y1="3.9cm" svg:x2="9.6cm" svg:y2="3.9cm">
          <text:p/>
        </draw:line>
        <draw:line draw:style-name="gr42" draw:text-style-name="P3" draw:layer="layout" svg:x1="13cm" svg:y1="4.5cm" svg:x2="13cm" svg:y2="5.5cm">
          <text:p/>
        </draw:line>
        <draw:line draw:style-name="gr42" draw:text-style-name="P3" draw:layer="layout" svg:x1="6.5cm" svg:y1="5cm" svg:x2="6.5cm" svg:y2="5.7cm">
          <text:p/>
        </draw:line>
        <presentation:notes draw:style-name="dp6">
          <draw:page-thumbnail draw:style-name="gr2" draw:layer="layout" svg:width="19.798cm" svg:height="11.136cm" svg:x="0.6cm" svg:y="2.257cm" draw:page-number="11" presentation:class="page"/>
          <draw:frame presentation:style-name="pr3" draw:text-style-name="P21" draw:layer="layout" svg:width="16.799cm" svg:height="13.364cm" svg:x="2.1cm" svg:y="14.107cm" presentation:class="notes" presentation:placeholder="true">
            <draw:text-box/>
          </draw:frame>
        </presentation:notes>
      </draw:page>
      <draw:page draw:name="page12" draw:style-name="dp5" draw:master-page-name="Standard" presentation:presentation-page-layout-name="AL1T0">
        <draw:frame draw:style-name="gr1" draw:text-style-name="P3" draw:layer="layout" svg:width="3.112cm" svg:height="3cm" svg:x="2.559cm" svg:y="4.6cm">
          <draw:image xlink:href="Pictures/10000000000000700000006C8A4D18171B422A0F.png" xlink:type="simple" xlink:show="embed" xlink:actuate="onLoad" draw:mime-type="image/png">
            <text:p/>
          </draw:image>
        </draw:frame>
        <draw:frame draw:style-name="gr1" draw:text-style-name="P3" draw:layer="layout" svg:width="4cm" svg:height="4.377cm" svg:x="10.5cm" svg:y="3.4cm">
          <draw:image xlink:href="Pictures/100000000000008A0000009747072402B6F5776E.png" xlink:type="simple" xlink:show="embed" xlink:actuate="onLoad" draw:mime-type="image/png">
            <text:p/>
          </draw:image>
        </draw:frame>
        <draw:line draw:style-name="gr47" draw:text-style-name="P3" draw:layer="layout" svg:x1="6.4cm" svg:y1="5.4cm" svg:x2="10.4cm" svg:y2="5.4cm">
          <text:p/>
        </draw:line>
        <draw:frame draw:style-name="gr48" draw:text-style-name="P42" draw:layer="layout" svg:width="3.414cm" svg:height="0.904cm" svg:x="6.7cm" svg:y="4.6cm">
          <draw:text-box>
            <text:p text:style-name="P41"><text:span text:style-name="T13">Http trigger</text:span></text:p>
          </draw:text-box>
        </draw:frame>
        <draw:frame draw:style-name="gr48" draw:text-style-name="P43" draw:layer="layout" svg:width="3.414cm" svg:height="0.904cm" svg:x="6.9cm" svg:y="5.496cm">
          <draw:text-box>
            <text:p text:style-name="P41"><text:span text:style-name="T14">User id</text:span></text:p>
          </draw:text-box>
        </draw:frame>
        <draw:line draw:style-name="gr49" draw:text-style-name="P3" draw:layer="layout" svg:x1="20.5cm" svg:y1="6.3cm" svg:x2="14.5cm" svg:y2="6.3cm">
          <text:p/>
        </draw:line>
        <draw:frame draw:style-name="gr24" draw:text-style-name="P43" draw:layer="layout" svg:width="6cm" svg:height="3.581cm" svg:x="15cm" svg:y="6.5cm">
          <draw:text-box>
            <text:p text:style-name="P41"><text:span text:style-name="T14">CF model</text:span></text:p>
            <text:p text:style-name="P41"><text:span text:style-name="T14">CF articles</text:span></text:p>
            <text:p text:style-name="P41"><text:span text:style-name="T14">Clicks</text:span></text:p>
            <text:p text:style-name="P41"><text:span text:style-name="T14">Articles embedding</text:span></text:p>
            <text:p text:style-name="P41"><text:span text:style-name="T14">New articles</text:span></text:p>
            <text:p text:style-name="P41"><text:span text:style-name="T14"/></text:p>
          </draw:text-box>
        </draw:frame>
        <draw:line draw:style-name="gr50" draw:text-style-name="P3" draw:layer="layout" svg:x1="10.4cm" svg:y1="7cm" svg:x2="6.4cm" svg:y2="7cm">
          <text:p/>
        </draw:line>
        <draw:frame draw:style-name="gr24" draw:text-style-name="P42" draw:layer="layout" svg:width="4.5cm" svg:height="1.361cm" svg:x="6.7cm" svg:y="7.096cm">
          <draw:text-box>
            <text:p text:style-name="P41"><text:span text:style-name="T14">Recommended</text:span><text:span text:style-name="T13"> </text:span><text:span text:style-name="T14">articles</text:span></text:p>
          </draw:text-box>
        </draw:frame>
        <draw:frame draw:style-name="gr24" draw:text-style-name="P42" draw:layer="layout" svg:width="4.414cm" svg:height="1.361cm" svg:x="15.586cm" svg:y="5.5cm">
          <draw:text-box>
            <text:p text:style-name="P41"><text:span text:style-name="T13">Blob binding</text:span></text:p>
          </draw:text-box>
        </draw:frame>
        <draw:frame draw:style-name="gr1" draw:text-style-name="P3" draw:layer="layout" svg:width="4.041cm" svg:height="4.565cm" svg:x="20.459cm" svg:y="3.335cm">
          <draw:image xlink:href="Pictures/100000000000008B0000009D3E14975A64D24398.png" xlink:type="simple" xlink:show="embed" xlink:actuate="onLoad" draw:mime-type="image/png">
            <text:p/>
          </draw:image>
        </draw:frame>
        <draw:frame draw:style-name="gr48" draw:text-style-name="P42" draw:layer="layout" svg:width="3.414cm" svg:height="0.904cm" svg:x="3.086cm" svg:y="4cm">
          <draw:text-box>
            <text:p text:style-name="P41"><text:span text:style-name="T13">Client</text:span></text:p>
          </draw:text-box>
        </draw:frame>
        <draw:line draw:style-name="gr32" draw:text-style-name="P3" draw:layer="layout" svg:x1="12.5cm" svg:y1="7.8cm" svg:x2="12.5cm" svg:y2="10.3cm">
          <text:p/>
        </draw:line>
        <draw:custom-shape draw:style-name="gr51" draw:text-style-name="P30" draw:layer="layout" svg:width="5.5cm" svg:height="3.5cm" svg:x="10.2cm" svg:y="10.7cm">
          <text:p/>
          <draw:enhanced-geometry svg:viewBox="0 0 21600 21600" draw:type="rectangle" draw:enhanced-path="M 0 0 L 21600 0 21600 21600 0 21600 0 0 Z N"/>
        </draw:custom-shape>
        <draw:frame draw:style-name="gr52" draw:text-style-name="P45" draw:layer="layout" svg:width="5.4cm" svg:height="2.361cm" svg:x="10.4cm" svg:y="11.339cm">
          <draw:text-box>
            <text:p text:style-name="P44"><text:span text:style-name="T15">Calculs </text:span></text:p>
            <text:p text:style-name="P44"><text:span text:style-name="T15">Recommendations utilisateur</text:span></text:p>
          </draw:text-box>
        </draw:frame>
        <draw:custom-shape draw:style-name="gr53" draw:text-style-name="P30" draw:layer="layout" svg:width="5.9cm" svg:height="4.02cm" svg:x="19.9cm" svg:y="10.6cm">
          <text:p/>
          <draw:enhanced-geometry svg:viewBox="0 0 21600 21600" draw:type="rectangle" draw:enhanced-path="M 0 0 L 21600 0 21600 21600 0 21600 0 0 Z N"/>
        </draw:custom-shape>
        <draw:frame draw:style-name="gr54" draw:text-style-name="P45" draw:layer="layout" svg:width="5.5cm" svg:height="3.581cm" svg:x="20.3cm" svg:y="10.839cm">
          <draw:text-box>
            <text:p text:style-name="P44"><text:span text:style-name="T15">Mise à jour </text:span></text:p>
            <text:p text:style-name="P44"><text:span text:style-name="T15">- Clicks </text:span></text:p>
            <text:p text:style-name="P44"><text:span text:style-name="T15">- Articles embedding</text:span></text:p>
            <text:p text:style-name="P44"><text:span text:style-name="T15">- New articles</text:span></text:p>
            <text:p text:style-name="P44"><text:span text:style-name="T15">- CF model</text:span></text:p>
            <text:p text:style-name="P44"><text:span text:style-name="T15">- CF articles</text:span></text:p>
          </draw:text-box>
        </draw:frame>
        <draw:frame draw:style-name="gr33" draw:text-style-name="P47" draw:layer="layout" svg:width="3cm" svg:height="0.963cm" svg:x="21.4cm" svg:y="14.488cm">
          <draw:text-box>
            <text:p text:style-name="P46">BATCH</text:p>
          </draw:text-box>
        </draw:frame>
        <draw:line draw:style-name="gr42" draw:text-style-name="P3" draw:layer="layout" svg:x1="22.6cm" svg:y1="10.2cm" svg:x2="22.6cm" svg:y2="8.1cm">
          <text:p/>
        </draw:line>
        <draw:g draw:name="Google Shape;545;p29_9">
          <draw:custom-shape draw:name="Google Shape;546;p29_10" draw:style-name="gr3" draw:text-style-name="P5" draw:layer="layout" svg:width="28.2cm" svg:height="2.858cm" svg:x="-0.099cm" svg:y="-0.099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10">
            <draw:custom-shape draw:name="Google Shape;548;p29_10" draw:style-name="gr4" draw:text-style-name="P7" draw:layer="layout" svg:width="26.91cm" svg:height="0.671cm" svg:x="0.546cm" svg:y="0.382cm">
              <text:p text:style-name="P6"><text:span text:style-name="T2">ARCHITECTURE MV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10" draw:style-name="gr5" draw:text-style-name="P8" draw:layer="layout" svg:width="26.898cm" svg:height="1.271cm" svg:x="0.552cm" svg:y="1.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9">
          <draw:g draw:name="Google Shape;1683;p46_10">
            <draw:custom-shape draw:name="Google Shape;1684;p46_10" draw:style-name="gr6" draw:text-style-name="P5" draw:layer="layout" svg:width="4.716cm" svg:height="1.238cm" svg:x="22.598cm" svg:y="0.699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10" draw:style-name="gr7" draw:text-style-name="P9" draw:layer="layout" svg:width="3.062cm" svg:height="1.147cm" svg:x="24.364cm" svg:y="1.354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10" draw:style-name="gr8" draw:text-style-name="P10" draw:layer="layout" svg:width="2.023cm" svg:height="1.408cm" svg:x="22.504cm" svg:y="1.093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10" draw:style-name="gr9" draw:text-style-name="P11" draw:layer="layout" svg:width="1.831cm" svg:height="1.23cm" svg:x="22.575cm" svg:y="1.183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10">
            <draw:custom-shape draw:name="Google Shape;1689;p46_10" draw:style-name="gr10" draw:text-style-name="P12" draw:layer="layout" svg:width="4.715cm" svg:height="1.238cm" svg:x="23.176cm" svg:y="0.001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10" draw:style-name="gr11" draw:text-style-name="P13" draw:layer="layout" svg:width="3.062cm" svg:height="1.148cm" svg:x="24.942cm" svg:y="0.656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10" draw:style-name="gr12" draw:text-style-name="P10" draw:layer="layout" svg:width="2.023cm" svg:height="1.409cm" svg:x="23.082cm" svg:y="0.395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10" draw:style-name="gr13" draw:text-style-name="P11" draw:layer="layout" svg:width="1.831cm" svg:height="1.231cm" svg:x="23.153cm" svg:y="0.485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presentation:notes draw:style-name="dp6">
          <draw:page-thumbnail draw:style-name="gr2" draw:layer="layout" svg:width="19.798cm" svg:height="11.136cm" svg:x="0.6cm" svg:y="2.257cm" draw:page-number="12" presentation:class="page"/>
          <draw:frame presentation:style-name="pr3" draw:text-style-name="P21" draw:layer="layout" svg:width="16.799cm" svg:height="13.364cm" svg:x="2.1cm" svg:y="14.107cm" presentation:class="notes" presentation:placeholder="true">
            <draw:text-box/>
          </draw:frame>
        </presentation:notes>
      </draw:page>
      <draw:page draw:name="page13" draw:style-name="dp5" draw:master-page-name="Standard" presentation:presentation-page-layout-name="AL1T0">
        <draw:frame draw:style-name="gr1" draw:text-style-name="P3" draw:layer="layout" svg:width="3.112cm" svg:height="3cm" svg:x="2.559cm" svg:y="4.6cm">
          <draw:image xlink:href="Pictures/10000000000000700000006C8A4D18171B422A0F.png" xlink:type="simple" xlink:show="embed" xlink:actuate="onLoad" draw:mime-type="image/png">
            <text:p/>
          </draw:image>
        </draw:frame>
        <draw:frame draw:style-name="gr1" draw:text-style-name="P3" draw:layer="layout" svg:width="4cm" svg:height="4.377cm" svg:x="10.5cm" svg:y="3.4cm">
          <draw:image xlink:href="Pictures/100000000000008A0000009747072402B6F5776E.png" xlink:type="simple" xlink:show="embed" xlink:actuate="onLoad" draw:mime-type="image/png">
            <text:p/>
          </draw:image>
        </draw:frame>
        <draw:line draw:style-name="gr47" draw:text-style-name="P3" draw:layer="layout" svg:x1="6.4cm" svg:y1="5.4cm" svg:x2="10.4cm" svg:y2="5.4cm">
          <text:p/>
        </draw:line>
        <draw:frame draw:style-name="gr48" draw:text-style-name="P42" draw:layer="layout" svg:width="3.414cm" svg:height="0.904cm" svg:x="6.7cm" svg:y="4.6cm">
          <draw:text-box>
            <text:p text:style-name="P41"><text:span text:style-name="T13">Http trigger</text:span></text:p>
          </draw:text-box>
        </draw:frame>
        <draw:frame draw:style-name="gr48" draw:text-style-name="P43" draw:layer="layout" svg:width="3.414cm" svg:height="0.904cm" svg:x="6.9cm" svg:y="5.496cm">
          <draw:text-box>
            <text:p text:style-name="P41"><text:span text:style-name="T14">User id</text:span></text:p>
          </draw:text-box>
        </draw:frame>
        <draw:line draw:style-name="gr49" draw:text-style-name="P3" draw:layer="layout" svg:x1="20.5cm" svg:y1="6.3cm" svg:x2="14.5cm" svg:y2="6.3cm">
          <text:p/>
        </draw:line>
        <draw:line draw:style-name="gr50" draw:text-style-name="P3" draw:layer="layout" svg:x1="10.4cm" svg:y1="7cm" svg:x2="6.4cm" svg:y2="7cm">
          <text:p/>
        </draw:line>
        <draw:frame draw:style-name="gr24" draw:text-style-name="P42" draw:layer="layout" svg:width="4.5cm" svg:height="1.361cm" svg:x="6.7cm" svg:y="7.096cm">
          <draw:text-box>
            <text:p text:style-name="P41"><text:span text:style-name="T14">Recommended</text:span><text:span text:style-name="T13"> </text:span><text:span text:style-name="T14">articles</text:span></text:p>
          </draw:text-box>
        </draw:frame>
        <draw:frame draw:style-name="gr48" draw:text-style-name="P42" draw:layer="layout" svg:width="3.414cm" svg:height="0.904cm" svg:x="3.086cm" svg:y="4cm">
          <draw:text-box>
            <text:p text:style-name="P41"><text:span text:style-name="T13">Client</text:span></text:p>
          </draw:text-box>
        </draw:frame>
        <draw:frame draw:style-name="gr1" draw:text-style-name="P3" draw:layer="layout" svg:width="4.9cm" svg:height="5.42cm" svg:x="20.1cm" svg:y="2.78cm">
          <draw:image xlink:href="Pictures/10000000000000A0000000B192A67F05ABC35356.png" xlink:type="simple" xlink:show="embed" xlink:actuate="onLoad" draw:mime-type="image/png">
            <text:p/>
          </draw:image>
        </draw:frame>
        <draw:custom-shape draw:style-name="gr55" draw:text-style-name="P30" draw:layer="layout" svg:width="10.6cm" svg:height="3.5cm" svg:x="16.6cm" svg:y="11.1cm">
          <text:p/>
          <draw:enhanced-geometry svg:viewBox="0 0 21600 21600" draw:type="rectangle" draw:enhanced-path="M 0 0 L 21600 0 21600 21600 0 21600 0 0 Z N"/>
        </draw:custom-shape>
        <draw:frame draw:style-name="gr52" draw:text-style-name="P45" draw:layer="layout" svg:width="9.9cm" svg:height="2.471cm" svg:x="16.8cm" svg:y="11.739cm">
          <draw:text-box>
            <text:p text:style-name="P44"><text:span text:style-name="T15">Calculs Recommendations utilisateurs</text:span></text:p>
            <text:p text:style-name="P44"><text:span text:style-name="T15">Mise à jour</text:span></text:p>
            <text:p text:style-name="P44"><text:span text:style-name="T15"><text:tab/></text:span><text:span text:style-name="T15">- clicks / articles_embeddings</text:span></text:p>
            <text:p text:style-name="P48"><text:span text:style-name="T15"><text:tab/></text:span><text:span text:style-name="T15">- CF model / CF articles</text:span></text:p>
          </draw:text-box>
        </draw:frame>
        <draw:frame draw:style-name="gr1" draw:text-style-name="P3" draw:layer="layout" svg:width="4.041cm" svg:height="4.565cm" svg:x="8.2cm" svg:y="9.935cm">
          <draw:image xlink:href="Pictures/100000000000008B0000009D3E14975A64D24398.png" xlink:type="simple" xlink:show="embed" xlink:actuate="onLoad" draw:mime-type="image/png">
            <text:p/>
          </draw:image>
        </draw:frame>
        <draw:frame draw:style-name="gr56" draw:text-style-name="P42" draw:layer="layout" svg:width="4.5cm" svg:height="1.5cm" svg:x="12.2cm" svg:y="13cm">
          <draw:text-box>
            <text:p text:style-name="P41"><text:span text:style-name="T14">CF model</text:span></text:p>
            <text:p text:style-name="P41"><text:span text:style-name="T14">CF articles</text:span><text:span text:style-name="T13"> </text:span></text:p>
          </draw:text-box>
        </draw:frame>
        <draw:frame draw:style-name="gr36" draw:text-style-name="P43" draw:layer="layout" svg:width="5.5cm" svg:height="1.916cm" svg:x="22.9cm" svg:y="8.884cm">
          <draw:text-box>
            <text:p text:style-name="P41"><text:span text:style-name="T14">Clicks</text:span></text:p>
            <text:p text:style-name="P41"><text:span text:style-name="T14">Articles embedding</text:span></text:p>
            <text:p text:style-name="P41"><text:span text:style-name="T14"/></text:p>
          </draw:text-box>
        </draw:frame>
        <draw:line draw:style-name="gr28" draw:text-style-name="P29" draw:layer="layout" svg:x1="22.9cm" svg:y1="8cm" svg:x2="22.9cm" svg:y2="10.5cm">
          <text:p/>
        </draw:line>
        <draw:line draw:style-name="gr42" draw:text-style-name="P3" draw:layer="layout" svg:x1="21.5cm" svg:y1="10.5cm" svg:x2="21.5cm" svg:y2="8cm">
          <text:p/>
        </draw:line>
        <draw:frame draw:style-name="gr24" draw:text-style-name="P42" draw:layer="layout" svg:width="4.5cm" svg:height="1.361cm" svg:x="17.4cm" svg:y="8.939cm">
          <draw:text-box>
            <text:p text:style-name="P41"><text:span text:style-name="T14">Recommended</text:span><text:span text:style-name="T13"> </text:span><text:span text:style-name="T14">articles</text:span></text:p>
          </draw:text-box>
        </draw:frame>
        <draw:frame draw:style-name="gr24" draw:text-style-name="P42" draw:layer="layout" svg:width="4.5cm" svg:height="1.361cm" svg:x="15cm" svg:y="6.4cm">
          <draw:text-box>
            <text:p text:style-name="P41"><text:span text:style-name="T14">Recommended</text:span><text:span text:style-name="T13"> </text:span><text:span text:style-name="T14">articles</text:span></text:p>
          </draw:text-box>
        </draw:frame>
        <draw:frame draw:style-name="gr33" draw:text-style-name="P47" draw:layer="layout" svg:width="3cm" svg:height="0.963cm" svg:x="20.5cm" svg:y="14.487cm">
          <draw:text-box>
            <text:p text:style-name="P46">BATCH</text:p>
          </draw:text-box>
        </draw:frame>
        <draw:line draw:style-name="gr28" draw:text-style-name="P29" draw:layer="layout" svg:x1="11.941cm" svg:y1="12.9cm" svg:x2="16.2cm" svg:y2="12.9cm">
          <text:p/>
        </draw:line>
        <draw:g draw:name="Google Shape;545;p29_10">
          <draw:custom-shape draw:name="Google Shape;546;p29_11" draw:style-name="gr3" draw:text-style-name="P5" draw:layer="layout" svg:width="28.2cm" svg:height="2.858cm" svg:x="-0.098cm" svg:y="-0.098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11">
            <draw:custom-shape draw:name="Google Shape;548;p29_11" draw:style-name="gr4" draw:text-style-name="P7" draw:layer="layout" svg:width="26.91cm" svg:height="0.671cm" svg:x="0.547cm" svg:y="0.383cm">
              <text:p text:style-name="P6"><text:span text:style-name="T2">ARCHITECTURE CIBL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11" draw:style-name="gr5" draw:text-style-name="P8" draw:layer="layout" svg:width="26.898cm" svg:height="1.271cm" svg:x="0.553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10">
          <draw:g draw:name="Google Shape;1683;p46_11">
            <draw:custom-shape draw:name="Google Shape;1684;p46_11" draw:style-name="gr6" draw:text-style-name="P5" draw:layer="layout" svg:width="4.716cm" svg:height="1.238cm" svg:x="22.602cm" svg:y="0.7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11" draw:style-name="gr7" draw:text-style-name="P9" draw:layer="layout" svg:width="3.062cm" svg:height="1.147cm" svg:x="24.368cm" svg:y="1.3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11" draw:style-name="gr8" draw:text-style-name="P10" draw:layer="layout" svg:width="2.023cm" svg:height="1.408cm" svg:x="22.508cm" svg:y="1.0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11" draw:style-name="gr9" draw:text-style-name="P11" draw:layer="layout" svg:width="1.831cm" svg:height="1.23cm" svg:x="22.579cm" svg:y="1.1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11">
            <draw:custom-shape draw:name="Google Shape;1689;p46_11" draw:style-name="gr10" draw:text-style-name="P12" draw:layer="layout" svg:width="4.715cm" svg:height="1.238cm" svg:x="23.18cm" svg:y="0.002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11" draw:style-name="gr11" draw:text-style-name="P13" draw:layer="layout" svg:width="3.062cm" svg:height="1.148cm" svg:x="24.946cm" svg:y="0.657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11" draw:style-name="gr12" draw:text-style-name="P10" draw:layer="layout" svg:width="2.023cm" svg:height="1.409cm" svg:x="23.086cm" svg:y="0.396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11" draw:style-name="gr13" draw:text-style-name="P11" draw:layer="layout" svg:width="1.831cm" svg:height="1.231cm" svg:x="23.157cm" svg:y="0.486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presentation:notes draw:style-name="dp6">
          <draw:page-thumbnail draw:style-name="gr2" draw:layer="layout" svg:width="19.798cm" svg:height="11.136cm" svg:x="0.6cm" svg:y="2.257cm" draw:page-number="13" presentation:class="page"/>
          <draw:frame presentation:style-name="pr3" draw:text-style-name="P21"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office:forms form:automatic-focus="false" form:apply-design-mode="false"/>
        <draw:g draw:name="Google Shape;545;p29_12">
          <draw:custom-shape draw:name="Google Shape;546;p29_13" draw:style-name="gr3" draw:text-style-name="P5" draw:layer="layout" svg:width="28.2cm" svg:height="2.858cm" svg:x="-0.1cm" svg:y="-0.1cm">
            <text:p/>
            <draw:enhanced-geometry draw:mirror-horizontal="false" draw:mirror-vertical="false" svg:viewBox="0 0 0 0" drawooo:sub-view-size="31245 10371" draw:text-areas="0 0 ?f0 ?f1"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g draw:name="Google Shape;547;p29_13">
            <draw:custom-shape draw:name="Google Shape;548;p29_13" draw:style-name="gr4" draw:text-style-name="P7" draw:layer="layout" svg:width="26.91cm" svg:height="0.671cm" svg:x="0.545cm" svg:y="0.381cm">
              <text:p text:style-name="P6"><text:span text:style-name="T2">CONCLUS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9_13" draw:style-name="gr5" draw:text-style-name="P8" draw:layer="layout" svg:width="26.898cm" svg:height="1.271cm" svg:x="0.551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82;p46_12">
          <draw:g draw:name="Google Shape;1683;p46_13">
            <draw:custom-shape draw:name="Google Shape;1684;p46_13" draw:style-name="gr6" draw:text-style-name="P5" draw:layer="layout" svg:width="4.716cm" svg:height="1.238cm" svg:x="22.594cm" svg:y="0.698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85;p46_13" draw:style-name="gr7" draw:text-style-name="P9" draw:layer="layout" svg:width="3.062cm" svg:height="1.147cm" svg:x="24.36cm" svg:y="1.353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86;p46_13" draw:style-name="gr8" draw:text-style-name="P10" draw:layer="layout" svg:width="2.023cm" svg:height="1.408cm" svg:x="22.5cm" svg:y="1.092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87;p46_13" draw:style-name="gr9" draw:text-style-name="P11" draw:layer="layout" svg:width="1.831cm" svg:height="1.23cm" svg:x="22.571cm" svg:y="1.182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name="Google Shape;1688;p46_13">
            <draw:custom-shape draw:name="Google Shape;1689;p46_13" draw:style-name="gr10" draw:text-style-name="P12" draw:layer="layout" svg:width="4.715cm" svg:height="1.238cm" svg:x="23.172cm" svg:y="0cm">
              <text:p/>
              <draw:enhanced-geometry draw:mirror-horizontal="false" draw:mirror-vertical="false" svg:viewBox="0 0 0 0" drawooo:sub-view-size="31421 9568" draw:text-areas="0 0 ?f0 ?f1" draw:type="ooxml-non-primitive" draw:enhanced-path="M 18865 0 L 0 3051 11768 9567 31421 5061 18865 0 Z N">
                <draw:equation draw:name="f0" draw:formula="logwidth"/>
                <draw:equation draw:name="f1" draw:formula="logheight"/>
              </draw:enhanced-geometry>
            </draw:custom-shape>
            <draw:custom-shape draw:name="Google Shape;1690;p46_13" draw:style-name="gr11" draw:text-style-name="P13" draw:layer="layout" svg:width="3.062cm" svg:height="1.148cm" svg:x="24.938cm" svg:y="0.655cm">
              <text:p/>
              <draw:enhanced-geometry draw:mirror-horizontal="false" draw:mirror-vertical="false" svg:viewBox="0 0 0 0" drawooo:sub-view-size="20408 8865" draw:text-areas="0 0 ?f0 ?f1" draw:type="ooxml-non-primitive" draw:enhanced-path="M 19654 0 L 1 4506 C 1 4506 677 4991 677 6742 677 8068 1 8865 1 8865 L 19481 3943 C 19481 3943 20408 3492 20408 1950 20408 407 19654 0 19654 0 Z N">
                <draw:equation draw:name="f0" draw:formula="logwidth"/>
                <draw:equation draw:name="f1" draw:formula="logheight"/>
              </draw:enhanced-geometry>
            </draw:custom-shape>
            <draw:custom-shape draw:name="Google Shape;1691;p46_13" draw:style-name="gr12" draw:text-style-name="P10" draw:layer="layout" svg:width="2.023cm" svg:height="1.409cm" svg:x="23.078cm" svg:y="0.394cm">
              <text:p/>
              <draw:enhanced-geometry draw:mirror-horizontal="false" draw:mirror-vertical="false" svg:viewBox="0 0 0 0" drawooo:sub-view-size="13484 10884" draw:text-areas="0 0 ?f0 ?f1" draw:type="ooxml-non-primitive" draw:enhanced-path="M 583 0 C 392 0 182 526 538 728 910 936 11907 6924 11907 6924 11907 6924 12687 7522 12539 8830 12392 10147 12115 10208 12115 10208 12115 10208 711 3977 399 3795 343 3763 295 3749 253 3749 4 3749 0 4255 156 4359 954 4870 12392 10884 12392 10884 12392 10884 13276 10641 13388 8787 13484 6950 12392 6525 12392 6525 12392 6525 1101 277 624 9 611 3 597 0 583 0 Z N">
                <draw:equation draw:name="f0" draw:formula="logwidth"/>
                <draw:equation draw:name="f1" draw:formula="logheight"/>
              </draw:enhanced-geometry>
            </draw:custom-shape>
            <draw:custom-shape draw:name="Google Shape;1692;p46_13" draw:style-name="gr13" draw:text-style-name="P11" draw:layer="layout" svg:width="1.831cm" svg:height="1.231cm" svg:x="23.149cm" svg:y="0.484cm">
              <text:p/>
              <draw:enhanced-geometry draw:mirror-horizontal="false" draw:mirror-vertical="false" svg:viewBox="0 0 0 0" drawooo:sub-view-size="12202 9507" draw:text-areas="0 0 ?f0 ?f1" draw:type="ooxml-non-primitive" draw:enhanced-path="M 1 1 L 1 3138 11639 9507 C 11639 9507 11916 9446 12063 8129 12202 6812 11431 6223 11431 6223 L 1 1 Z N">
                <draw:equation draw:name="f0" draw:formula="logwidth"/>
                <draw:equation draw:name="f1" draw:formula="logheight"/>
              </draw:enhanced-geometry>
            </draw:custom-shape>
          </draw:g>
        </draw:g>
        <draw:g draw:name="Google Shape;1309;p40_1">
          <draw:custom-shape draw:name="Google Shape;1310;p40_6" draw:style-name="gr14" draw:text-style-name="P15" draw:layer="layout" svg:width="1.947cm" svg:height="1.186cm" svg:x="3.256cm" svg:y="5.802cm">
            <text:p text:style-name="P14"><text:span text:style-name="T3">01</text:span></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13;p40_3">
            <draw:custom-shape draw:name="Google Shape;1315;p40_4" draw:style-name="gr15" draw:text-style-name="P8" draw:layer="layout" svg:width="2.813cm" svg:height="1.638cm" svg:x="0.274cm" svg:y="7.5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13;p40_4">
            <draw:custom-shape draw:name="Google Shape;1314;p40_4" draw:style-name="gr16" draw:text-style-name="P16" draw:layer="layout" svg:width="1.948cm" svg:height="1.186cm" svg:x="3.258cm" svg:y="7.527cm">
              <text:p text:style-name="P14"><text:span text:style-name="T3"/></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5;p40_5" draw:style-name="gr17" draw:text-style-name="P8" draw:layer="layout" svg:width="2.866cm" svg:height="1.638cm" svg:x="0.181cm" svg:y="7.5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17;p40_1">
            <draw:custom-shape draw:name="Google Shape;1318;p40_2" draw:style-name="gr18" draw:text-style-name="P17" draw:layer="layout" svg:width="1.947cm" svg:height="1.186cm" svg:x="3.256cm" svg:y="9.352cm">
              <text:p text:style-name="P14"><text:span text:style-name="T3"/></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9;p40_2" draw:style-name="gr17" draw:text-style-name="P8" draw:layer="layout" svg:width="2.866cm" svg:height="1.638cm" svg:x="0.181cm" svg:y="9.42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5;p40_1">
            <draw:custom-shape draw:name="Google Shape;1326;p40_2" draw:style-name="gr19" draw:text-style-name="P18" draw:layer="layout" svg:width="1.947cm" svg:height="1.186cm" svg:x="3.256cm" svg:y="11.124cm">
              <text:p text:style-name="P14"><text:span text:style-name="T3"/></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27;p40_2" draw:style-name="gr17" draw:text-style-name="P8" draw:layer="layout" svg:width="2.866cm" svg:height="1.638cm" svg:x="0.181cm" svg:y="11.2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11;p40_2" draw:style-name="gr17" draw:text-style-name="P8" draw:layer="layout" svg:width="2.866cm" svg:height="1.638cm" svg:x="13.234cm" svg:y="7.0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0;p40_7" draw:style-name="gr14" draw:text-style-name="P15" draw:layer="layout" svg:width="1.947cm" svg:height="1.186cm" svg:x="3.257cm" svg:y="5.802cm">
            <text:p text:style-name="P14"><text:span text:style-name="T3"/></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style-name="gr57" draw:text-style-name="P20" draw:layer="layout" svg:width="14.6cm" svg:height="2.235cm" svg:x="5.9cm" svg:y="6.052cm">
          <draw:text-box>
            <text:p><text:span text:style-name="T4">Application fonctionnelle</text:span></text:p>
          </draw:text-box>
        </draw:frame>
        <draw:frame draw:style-name="gr57" draw:text-style-name="P20" draw:layer="layout" svg:width="14.6cm" svg:height="2.235cm" svg:x="5.9cm" svg:y="7.752cm">
          <draw:text-box>
            <text:p><text:span text:style-name="T4">Système hybride / Switch</text:span></text:p>
          </draw:text-box>
        </draw:frame>
        <draw:frame draw:style-name="gr23" draw:text-style-name="P20" draw:layer="layout" svg:width="10cm" svg:height="1.348cm" svg:x="5.9cm" svg:y="9.652cm">
          <draw:text-box>
            <text:p><text:span text:style-name="T4">Nouveaux utilisateurs / Nouveaux articles</text:span></text:p>
          </draw:text-box>
        </draw:frame>
        <draw:frame draw:style-name="gr23" draw:text-style-name="P20" draw:layer="layout" svg:width="10cm" svg:height="1.348cm" svg:x="6cm" svg:y="11.452cm">
          <draw:text-box>
            <text:p><text:span text:style-name="T4">Architecture cible</text:span></text:p>
          </draw:text-box>
        </draw:frame>
        <presentation:notes draw:style-name="dp6">
          <draw:page-thumbnail draw:style-name="gr2" draw:layer="layout" svg:width="19.798cm" svg:height="11.136cm" svg:x="0.6cm" svg:y="2.257cm" draw:page-number="14" presentation:class="page"/>
          <draw:frame presentation:style-name="pr3"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2" svg:font-family="Arial"/>
    <style:font-face style:name="Fira Sans Extra Condensed Medium" svg:font-family="'Fira Sans Extra Condensed Medium'"/>
    <style:font-face style:name="Fira Sans Extra Condensed SemiBold" svg:font-family="'Fira Sans Extra Condensed SemiBold'"/>
    <style:font-face style:name="Lato1" svg:font-family="Lato"/>
    <style:font-face style:name="Roboto" svg:font-family="Roboto"/>
    <style:font-face style:name="Arial1" svg:font-family="Arial" style:font-pitch="variable"/>
    <style:font-face style:name="Lato" svg:font-family="Lato" style:font-pitch="variable"/>
    <style:font-face style:name="Liberation Sans2" svg:font-family="'Liberation Sans'" style:font-pitch="variable"/>
    <style:font-face style:name="Lucida Sans1" svg:font-family="'Lucida Sans'" style:font-pitch="variable"/>
    <style:font-face style:name="Microsoft YaHei1" svg:font-family="'Microsoft YaHei'"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20" svg:d="M0 20l10-20 10 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5pt" style:font-style-asian="normal" style:font-weight-asian="normal" style:font-name-complex="Lucida Sans" style:font-family-complex="'Lucida 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3f959e" draw:textarea-vertical-align="middle" draw:auto-grow-height="false" draw:fit-to-size="false" style:shrink-to-fit="false" fo:min-height="3.083cm" fo:min-width="3.079cm" fo:padding-top="0.254cm" fo:padding-bottom="0.254cm" fo:padding-left="0.254cm" fo:padding-right="0.254cm" fo:wrap-option="wrap"/>
    </style:style>
    <style:style style:name="Mgr4" style:family="graphic" style:parent-style-name="standard">
      <style:graphic-properties draw:stroke="none" svg:stroke-width="0cm" draw:fill="solid" draw:fill-color="#3f959e" draw:textarea-vertical-align="middle" draw:auto-grow-height="false" draw:fit-to-size="false" style:shrink-to-fit="false" fo:min-height="0.168cm" fo:min-width="0.104cm" fo:padding-top="0.254cm" fo:padding-bottom="0.254cm" fo:padding-left="0.254cm" fo:padding-right="0.254cm" fo:wrap-option="wrap"/>
    </style:style>
    <style:style style:name="Mgr5" style:family="graphic" style:parent-style-name="standard">
      <style:graphic-properties draw:stroke="none" svg:stroke-width="0cm" draw:fill="solid" draw:fill-color="#3f959e" draw:textarea-vertical-align="middle" draw:auto-grow-height="false" draw:fit-to-size="false" style:shrink-to-fit="false" fo:min-height="3.263cm" fo:min-width="2.554cm" fo:padding-top="0.254cm" fo:padding-bottom="0.254cm" fo:padding-left="0.254cm" fo:padding-right="0.254cm" fo:wrap-option="wrap"/>
    </style:style>
    <style:style style:name="Mgr6" style:family="graphic" style:parent-style-name="standard">
      <style:graphic-properties draw:stroke="none" svg:stroke-width="0cm" draw:fill="solid" draw:fill-color="#f3f3e9" draw:textarea-vertical-align="middle" draw:auto-grow-height="false" draw:fit-to-size="false" style:shrink-to-fit="false" fo:min-height="2.9cm" fo:min-width="2.424cm" fo:padding-top="0.254cm" fo:padding-bottom="0.254cm" fo:padding-left="0.254cm" fo:padding-right="0.254cm" fo:wrap-option="wrap"/>
    </style:style>
    <style:style style:name="Mgr7" style:family="graphic" style:parent-style-name="standard">
      <style:graphic-properties draw:stroke="none" svg:stroke-width="0cm" draw:fill="solid" draw:fill-color="#bdb99d" draw:textarea-vertical-align="middle" draw:auto-grow-height="false" draw:fit-to-size="false" style:shrink-to-fit="false" fo:min-height="2.881cm" fo:min-width="0.191cm" fo:padding-top="0.254cm" fo:padding-bottom="0.254cm" fo:padding-left="0.254cm" fo:padding-right="0.254cm" fo:wrap-option="wrap"/>
    </style:style>
    <style:style style:name="Mgr8" style:family="graphic" style:parent-style-name="standard">
      <style:graphic-properties draw:stroke="none" svg:stroke-width="0cm" draw:fill="solid" draw:fill-color="#f3f3e9" draw:textarea-vertical-align="middle" draw:auto-grow-height="false" draw:fit-to-size="false" style:shrink-to-fit="false" fo:min-height="0.617cm" fo:min-width="2.663cm" fo:padding-top="0.254cm" fo:padding-bottom="0.254cm" fo:padding-left="0.254cm" fo:padding-right="0.254cm" fo:wrap-option="wrap"/>
    </style:style>
    <style:style style:name="Mgr9" style:family="graphic" style:parent-style-name="standard">
      <style:graphic-properties draw:stroke="none" svg:stroke-width="0cm" draw:fill="solid" draw:fill-color="#bdb99d" draw:textarea-vertical-align="middle" draw:auto-grow-height="false" draw:fit-to-size="false" style:shrink-to-fit="false" fo:min-height="2.474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bdb99d" draw:textarea-vertical-align="middle" draw:auto-grow-height="false" draw:fit-to-size="false" style:shrink-to-fit="false" fo:min-height="0.136cm" fo:min-width="1.943cm" fo:padding-top="0.254cm" fo:padding-bottom="0.254cm" fo:padding-left="0.254cm" fo:padding-right="0.254cm" fo:wrap-option="wrap"/>
    </style:style>
    <style:style style:name="Mgr11" style:family="graphic" style:parent-style-name="standard">
      <style:graphic-properties draw:stroke="none" svg:stroke-width="0cm" draw:fill="solid" draw:fill-color="#f3f3e9" draw:textarea-vertical-align="middle" draw:auto-grow-height="false" draw:fit-to-size="false" style:shrink-to-fit="false" fo:min-height="3.017cm" fo:min-width="1.943cm" fo:padding-top="0.254cm" fo:padding-bottom="0.254cm" fo:padding-left="0.254cm" fo:padding-right="0.254cm" fo:wrap-option="wrap"/>
    </style:style>
    <style:style style:name="Mgr12" style:family="graphic" style:parent-style-name="standard">
      <style:graphic-properties draw:stroke="none" svg:stroke-width="0cm" draw:fill="solid" draw:fill-color="#76c2c8" draw:textarea-vertical-align="middle" draw:auto-grow-height="false" draw:fit-to-size="false" style:shrink-to-fit="false" fo:min-height="2.938cm" fo:min-width="2.68cm" fo:padding-top="0.254cm" fo:padding-bottom="0.254cm" fo:padding-left="0.254cm" fo:padding-right="0.254cm" fo:wrap-option="wrap"/>
    </style:style>
    <style:style style:name="Mgr13" style:family="graphic" style:parent-style-name="standard">
      <style:graphic-properties draw:stroke="none" svg:stroke-width="0cm" draw:fill="solid" draw:fill-color="#76c2c8" draw:textarea-vertical-align="middle" draw:auto-grow-height="false" draw:fit-to-size="false" style:shrink-to-fit="false" fo:min-height="3.295cm" fo:min-width="5.98cm" fo:padding-top="0.254cm" fo:padding-bottom="0.254cm" fo:padding-left="0.254cm" fo:padding-right="0.254cm" fo:wrap-option="wrap"/>
    </style:style>
    <style:style style:name="Mgr14" style:family="graphic" style:parent-style-name="standard">
      <style:graphic-properties draw:stroke="none" svg:stroke-width="0cm" draw:fill="solid" draw:fill-color="#bdb99d" draw:textarea-vertical-align="middle" draw:auto-grow-height="false" draw:fit-to-size="false" style:shrink-to-fit="false" fo:min-height="0.053cm" fo:min-width="1.936cm" fo:padding-top="0.254cm" fo:padding-bottom="0.254cm" fo:padding-left="0.254cm" fo:padding-right="0.254cm" fo:wrap-option="wrap"/>
    </style:style>
    <style:style style:name="Mgr15" style:family="graphic" style:parent-style-name="standard">
      <style:graphic-properties draw:stroke="none" svg:stroke-width="0cm" draw:fill="solid" draw:fill-color="#bdb99d" draw:textarea-vertical-align="middle" draw:auto-grow-height="false" draw:fit-to-size="false" style:shrink-to-fit="false" fo:min-height="0.045cm" fo:min-width="1.916cm" fo:padding-top="0.254cm" fo:padding-bottom="0.254cm" fo:padding-left="0.254cm" fo:padding-right="0.254cm" fo:wrap-option="wrap"/>
    </style:style>
    <style:style style:name="Mgr16" style:family="graphic" style:parent-style-name="standard">
      <style:graphic-properties draw:stroke="none" svg:stroke-width="0cm" draw:fill="solid" draw:fill-color="#bdb99d" draw:textarea-vertical-align="middle" draw:auto-grow-height="false" draw:fit-to-size="false" style:shrink-to-fit="false" fo:min-height="0.046cm" fo:min-width="1.917cm" fo:padding-top="0.254cm" fo:padding-bottom="0.254cm" fo:padding-left="0.254cm" fo:padding-right="0.254cm" fo:wrap-option="wrap"/>
    </style:style>
    <style:style style:name="Mgr17" style:family="graphic" style:parent-style-name="standard">
      <style:graphic-properties draw:stroke="none" svg:stroke-width="0cm" draw:fill="solid" draw:fill-color="#bdb99d" draw:textarea-vertical-align="middle" draw:auto-grow-height="false" draw:fit-to-size="false" style:shrink-to-fit="false" fo:min-height="0.043cm" fo:min-width="1.903cm" fo:padding-top="0.254cm" fo:padding-bottom="0.254cm" fo:padding-left="0.254cm" fo:padding-right="0.254cm" fo:wrap-option="wrap"/>
    </style:style>
    <style:style style:name="Mgr18" style:family="graphic" style:parent-style-name="standard">
      <style:graphic-properties draw:stroke="none" svg:stroke-width="0cm" draw:fill="solid" draw:fill-color="#3f959e" draw:textarea-vertical-align="middle" draw:auto-grow-height="false" draw:fit-to-size="false" style:shrink-to-fit="false" fo:min-height="2.401cm" fo:min-width="0.187cm" fo:padding-top="0.254cm" fo:padding-bottom="0.254cm" fo:padding-left="0.254cm" fo:padding-right="0.254cm" fo:wrap-option="wrap"/>
    </style:style>
    <style:style style:name="Mgr19" style:family="graphic" style:parent-style-name="standard">
      <style:graphic-properties draw:stroke="none" svg:stroke-width="0cm" draw:fill="solid" draw:fill-color="#3f959e" draw:textarea-vertical-align="middle" draw:auto-grow-height="false" draw:fit-to-size="false" style:shrink-to-fit="false" fo:min-height="2.687cm" fo:min-width="1.242cm" fo:padding-top="0.254cm" fo:padding-bottom="0.254cm" fo:padding-left="0.254cm" fo:padding-right="0.254cm" fo:wrap-option="wrap"/>
    </style:style>
    <style:style style:name="Mgr20" style:family="graphic" style:parent-style-name="standard">
      <style:graphic-properties draw:stroke="none" svg:stroke-width="0cm" draw:fill="solid" draw:fill-color="#3f959e" draw:textarea-vertical-align="middle" draw:auto-grow-height="false" draw:fit-to-size="false" style:shrink-to-fit="false" fo:min-height="0.15cm" fo:min-width="0.729cm" fo:padding-top="0.254cm" fo:padding-bottom="0.254cm" fo:padding-left="0.254cm" fo:padding-right="0.254cm" fo:wrap-option="wrap"/>
    </style:style>
    <style:style style:name="Mgr21" style:family="graphic" style:parent-style-name="standard">
      <style:graphic-properties draw:stroke="none" svg:stroke-width="0cm" draw:fill="solid" draw:fill-color="#3f959e" draw:textarea-vertical-align="middle" draw:auto-grow-height="false" draw:fit-to-size="false" style:shrink-to-fit="false" fo:min-height="2.637cm" fo:min-width="2.154cm" fo:padding-top="0.254cm" fo:padding-bottom="0.254cm" fo:padding-left="0.254cm" fo:padding-right="0.254cm" fo:wrap-option="wrap"/>
    </style:style>
    <style:style style:name="Mgr22" style:family="graphic" style:parent-style-name="standard">
      <style:graphic-properties draw:stroke="none" svg:stroke-width="0cm" draw:fill="solid" draw:fill-color="#f3f3e9" draw:textarea-vertical-align="middle" draw:auto-grow-height="false" draw:fit-to-size="false" style:shrink-to-fit="false" fo:min-height="2.464cm" fo:min-width="4.199cm" fo:padding-top="0.254cm" fo:padding-bottom="0.254cm" fo:padding-left="0.254cm" fo:padding-right="0.254cm" fo:wrap-option="wrap"/>
    </style:style>
    <style:style style:name="Mgr23" style:family="graphic" style:parent-style-name="standard">
      <style:graphic-properties draw:stroke="none" svg:stroke-width="0cm" draw:fill="solid" draw:fill-color="#bdb99d" draw:textarea-vertical-align="middle" draw:auto-grow-height="false" draw:fit-to-size="false" style:shrink-to-fit="false" fo:min-height="0.206cm" fo:min-width="4.299cm" fo:padding-top="0.254cm" fo:padding-bottom="0.254cm" fo:padding-left="0.254cm" fo:padding-right="0.254cm" fo:wrap-option="wrap"/>
    </style:style>
    <style:style style:name="Mgr24" style:family="graphic" style:parent-style-name="standard">
      <style:graphic-properties draw:stroke="none" svg:stroke-width="0cm" draw:fill="solid" draw:fill-color="#f3f3e9" draw:textarea-vertical-align="middle" draw:auto-grow-height="false" draw:fit-to-size="false" style:shrink-to-fit="false" fo:min-height="2.549cm" fo:min-width="3.73cm" fo:padding-top="0.254cm" fo:padding-bottom="0.254cm" fo:padding-left="0.254cm" fo:padding-right="0.254cm" fo:wrap-option="wrap"/>
    </style:style>
    <style:style style:name="Mgr25" style:family="graphic" style:parent-style-name="standard">
      <style:graphic-properties draw:stroke="none" svg:stroke-width="0cm" draw:fill="solid" draw:fill-color="#bdb99d" draw:textarea-vertical-align="middle" draw:auto-grow-height="false" draw:fit-to-size="false" style:shrink-to-fit="false" fo:min-height="0.849cm" fo:min-width="3.644cm" fo:padding-top="0.254cm" fo:padding-bottom="0.254cm" fo:padding-left="0.254cm" fo:padding-right="0.254cm" fo:wrap-option="wrap"/>
    </style:style>
    <style:style style:name="Mgr26" style:family="graphic" style:parent-style-name="standard">
      <style:graphic-properties draw:stroke="none" svg:stroke-width="0cm" draw:fill="solid" draw:fill-color="#f3f3e9" draw:textarea-vertical-align="middle" draw:auto-grow-height="false" draw:fit-to-size="false" style:shrink-to-fit="false" fo:min-height="2.464cm" fo:min-width="4.256cm" fo:padding-top="0.254cm" fo:padding-bottom="0.254cm" fo:padding-left="0.254cm" fo:padding-right="0.254cm" fo:wrap-option="wrap"/>
    </style:style>
    <style:style style:name="Mgr27" style:family="graphic" style:parent-style-name="standard">
      <style:graphic-properties draw:stroke="none" svg:stroke-width="0cm" draw:fill="solid" draw:fill-color="#bdb99d" draw:textarea-vertical-align="middle" draw:auto-grow-height="false" draw:fit-to-size="false" style:shrink-to-fit="false" fo:min-height="0.207cm" fo:min-width="4.365cm" fo:padding-top="0.254cm" fo:padding-bottom="0.254cm" fo:padding-left="0.254cm" fo:padding-right="0.254cm" fo:wrap-option="wrap"/>
    </style:style>
    <style:style style:name="Mgr28" style:family="graphic" style:parent-style-name="standard">
      <style:graphic-properties draw:stroke="none" svg:stroke-width="0cm" draw:fill="solid" draw:fill-color="#f3f3e9" draw:textarea-vertical-align="middle" draw:auto-grow-height="false" draw:fit-to-size="false" style:shrink-to-fit="false" fo:min-height="2.56cm" fo:min-width="3.672cm" fo:padding-top="0.254cm" fo:padding-bottom="0.254cm" fo:padding-left="0.254cm" fo:padding-right="0.254cm" fo:wrap-option="wrap"/>
    </style:style>
    <style:style style:name="Mgr29" style:family="graphic" style:parent-style-name="standard">
      <style:graphic-properties draw:stroke="none" svg:stroke-width="0cm" draw:fill="solid" draw:fill-color="#f3f3e9" draw:textarea-vertical-align="middle" draw:auto-grow-height="false" draw:fit-to-size="false" style:shrink-to-fit="false" fo:min-height="3.042cm" fo:min-width="0.995cm" fo:padding-top="0.254cm" fo:padding-bottom="0.254cm" fo:padding-left="0.254cm" fo:padding-right="0.254cm" fo:wrap-option="wrap"/>
    </style:style>
    <style:style style:name="Mgr30" style:family="graphic" style:parent-style-name="standard">
      <style:graphic-properties draw:stroke="none" svg:stroke-width="0cm" draw:fill="solid" draw:fill-color="#bdb99d" draw:textarea-vertical-align="middle" draw:auto-grow-height="false" draw:fit-to-size="false" style:shrink-to-fit="false" fo:min-height="2.503cm" fo:min-width="0.357cm" fo:padding-top="0.254cm" fo:padding-bottom="0.254cm" fo:padding-left="0.254cm" fo:padding-right="0.254cm" fo:wrap-option="wrap"/>
    </style:style>
    <style:style style:name="Mgr31" style:family="graphic" style:parent-style-name="standard">
      <style:graphic-properties draw:stroke="none" svg:stroke-width="0cm" draw:fill="solid" draw:fill-color="#bdb99d" draw:textarea-vertical-align="middle" draw:auto-grow-height="false" draw:fit-to-size="false" style:shrink-to-fit="false" fo:min-height="2.002cm" fo:min-width="0.436cm" fo:padding-top="0.254cm" fo:padding-bottom="0.254cm" fo:padding-left="0.254cm" fo:padding-right="0.254cm" fo:wrap-option="wrap"/>
    </style:style>
    <style:style style:name="Mgr32" style:family="graphic" style:parent-style-name="standard">
      <style:graphic-properties draw:stroke="none" svg:stroke-width="0cm" draw:fill="solid" draw:fill-color="#f3f3e9" draw:textarea-vertical-align="middle" draw:auto-grow-height="false" draw:fit-to-size="false" style:shrink-to-fit="false" fo:min-height="3.081cm" fo:min-width="1.071cm" fo:padding-top="0.254cm" fo:padding-bottom="0.254cm" fo:padding-left="0.254cm" fo:padding-right="0.254cm" fo:wrap-option="wrap"/>
    </style:style>
    <style:style style:name="Mgr33" style:family="graphic" style:parent-style-name="standard">
      <style:graphic-properties draw:stroke="none" svg:stroke-width="0cm" draw:fill="solid" draw:fill-color="#bdb99d" draw:textarea-vertical-align="middle" draw:auto-grow-height="false" draw:fit-to-size="false" style:shrink-to-fit="false" fo:min-height="1.529cm" fo:min-width="0cm" fo:padding-top="0.254cm" fo:padding-bottom="0.254cm" fo:padding-left="0.254cm" fo:padding-right="0.254cm" fo:wrap-option="wrap"/>
    </style:style>
    <style:style style:name="Mgr34" style:family="graphic" style:parent-style-name="standard">
      <style:graphic-properties draw:stroke="none" svg:stroke-width="0cm" draw:fill="solid" draw:fill-color="#76c2c8" draw:textarea-vertical-align="middle" draw:auto-grow-height="false" draw:fit-to-size="false" style:shrink-to-fit="false" fo:min-height="0cm" fo:min-width="9.454cm" fo:padding-top="0.254cm" fo:padding-bottom="0.254cm" fo:padding-left="0.254cm" fo:padding-right="0.254cm" fo:wrap-option="wrap"/>
    </style:style>
    <style:style style:name="Mgr35" style:family="graphic" style:parent-style-name="standard">
      <style:graphic-properties draw:stroke="none" svg:stroke-width="0cm" draw:fill="solid" draw:fill-color="#bdb99d" draw:textarea-vertical-align="middle" draw:auto-grow-height="false" draw:fit-to-size="false" style:shrink-to-fit="false" fo:min-height="0.429cm" fo:min-width="2.561cm" fo:padding-top="0.254cm" fo:padding-bottom="0.254cm" fo:padding-left="0.254cm" fo:padding-right="0.254cm" fo:wrap-option="wrap"/>
    </style:style>
    <style:style style:name="Mgr36" style:family="graphic" style:parent-style-name="standard">
      <style:graphic-properties draw:stroke="none" svg:stroke-width="0cm" draw:fill="solid" draw:fill-color="#bdb99d" draw:textarea-vertical-align="middle" draw:auto-grow-height="false" draw:fit-to-size="false" style:shrink-to-fit="false" fo:min-height="0.183cm" fo:min-width="2.204cm" fo:padding-top="0.254cm" fo:padding-bottom="0.254cm" fo:padding-left="0.254cm" fo:padding-right="0.254cm" fo:wrap-option="wrap"/>
    </style:style>
    <style:style style:name="Mgr37" style:family="graphic" style:parent-style-name="standard">
      <style:graphic-properties draw:stroke="none" svg:stroke-width="0cm" draw:fill="solid" draw:fill-color="#bdb99d" draw:textarea-vertical-align="middle" draw:auto-grow-height="false" draw:fit-to-size="false" style:shrink-to-fit="false" fo:min-height="0.062cm" fo:min-width="2.016cm" fo:padding-top="0.254cm" fo:padding-bottom="0.254cm" fo:padding-left="0.254cm" fo:padding-right="0.254cm" fo:wrap-option="wrap"/>
    </style:style>
    <style:style style:name="Mgr38" style:family="graphic" style:parent-style-name="standard">
      <style:graphic-properties draw:stroke="none" svg:stroke-width="0cm" draw:fill="solid" draw:fill-color="#bdb99d" draw:textarea-vertical-align="middle" draw:auto-grow-height="false" draw:fit-to-size="false" style:shrink-to-fit="false" fo:min-height="0.405cm" fo:min-width="2.833cm" fo:padding-top="0.254cm" fo:padding-bottom="0.254cm" fo:padding-left="0.254cm" fo:padding-right="0.254cm" fo:wrap-option="wrap"/>
    </style:style>
    <style:style style:name="Mgr39" style:family="graphic" style:parent-style-name="standard">
      <style:graphic-properties draw:stroke="none" svg:stroke-width="0cm" draw:fill="solid" draw:fill-color="#bdb99d" draw:textarea-vertical-align="middle" draw:auto-grow-height="false" draw:fit-to-size="false" style:shrink-to-fit="false" fo:min-height="0.288cm" fo:min-width="2.605cm" fo:padding-top="0.254cm" fo:padding-bottom="0.254cm" fo:padding-left="0.254cm" fo:padding-right="0.254cm" fo:wrap-option="wrap"/>
    </style:style>
    <style:style style:name="Mgr40" style:family="graphic" style:parent-style-name="standard">
      <style:graphic-properties draw:stroke="none" svg:stroke-width="0cm" draw:fill="solid" draw:fill-color="#bdb99d" draw:textarea-vertical-align="middle" draw:auto-grow-height="false" draw:fit-to-size="false" style:shrink-to-fit="false" fo:min-height="0.043cm" fo:min-width="2.056cm" fo:padding-top="0.254cm" fo:padding-bottom="0.254cm" fo:padding-left="0.254cm" fo:padding-right="0.254cm" fo:wrap-option="wrap"/>
    </style:style>
    <style:style style:name="Mgr41" style:family="graphic" style:parent-style-name="standard">
      <style:graphic-properties draw:stroke="none" svg:stroke-width="0cm" draw:fill="solid" draw:fill-color="#bdb99d" draw:textarea-vertical-align="middle" draw:auto-grow-height="false" draw:fit-to-size="false" style:shrink-to-fit="false" fo:min-height="1.979cm" fo:min-width="0.642cm" fo:padding-top="0.254cm" fo:padding-bottom="0.254cm" fo:padding-left="0.254cm" fo:padding-right="0.254cm" fo:wrap-option="wrap"/>
    </style:style>
    <style:style style:name="Mgr42" style:family="graphic" style:parent-style-name="standard">
      <style:graphic-properties draw:stroke="none" svg:stroke-width="0cm" draw:fill="solid" draw:fill-color="#bdb99d" draw:textarea-vertical-align="middle" draw:auto-grow-height="false" draw:fit-to-size="false" style:shrink-to-fit="false" fo:min-height="3.054cm" fo:min-width="2.569cm" fo:padding-top="0.254cm" fo:padding-bottom="0.254cm" fo:padding-left="0.254cm" fo:padding-right="0.254cm" fo:wrap-option="wrap"/>
    </style:style>
    <style:style style:name="Mgr43" style:family="graphic" style:parent-style-name="standard">
      <style:graphic-properties draw:stroke="none" svg:stroke-width="0cm" draw:fill="solid" draw:fill-color="#bdb99d" draw:textarea-vertical-align="middle" draw:auto-grow-height="false" draw:fit-to-size="false" style:shrink-to-fit="false" fo:min-height="3.829cm" fo:min-width="1.916cm" fo:padding-top="0.254cm" fo:padding-bottom="0.254cm" fo:padding-left="0.254cm" fo:padding-right="0.254cm" fo:wrap-option="wrap"/>
    </style:style>
    <style:style style:name="Mgr44" style:family="graphic" style:parent-style-name="standard">
      <style:graphic-properties draw:stroke="none" svg:stroke-width="0cm" draw:fill="solid" draw:fill-color="#f3f3e9" draw:textarea-vertical-align="middle" draw:auto-grow-height="false" draw:fit-to-size="false" style:shrink-to-fit="false" fo:min-height="4.358cm" fo:min-width="3.526cm" fo:padding-top="0.254cm" fo:padding-bottom="0.254cm" fo:padding-left="0.254cm" fo:padding-right="0.254cm" fo:wrap-option="wrap"/>
    </style:style>
    <style:style style:name="Mgr45" style:family="graphic" style:parent-style-name="standard">
      <style:graphic-properties draw:stroke="none" svg:stroke-width="0cm" draw:fill="solid" draw:fill-color="#9e5a5a" draw:textarea-vertical-align="middle" draw:auto-grow-height="false" draw:fit-to-size="false" style:shrink-to-fit="false" fo:min-height="3.04cm" fo:min-width="2.27cm" fo:padding-top="0.254cm" fo:padding-bottom="0.254cm" fo:padding-left="0.254cm" fo:padding-right="0.254cm" fo:wrap-option="wrap"/>
    </style:style>
    <style:style style:name="Mgr46" style:family="graphic" style:parent-style-name="standard">
      <style:graphic-properties draw:stroke="none" svg:stroke-width="0cm" draw:fill="solid" draw:fill-color="#ce8a8a" draw:textarea-vertical-align="middle" draw:auto-grow-height="false" draw:fit-to-size="false" style:shrink-to-fit="false" fo:min-height="2.014cm" fo:min-width="1.645cm" fo:padding-top="0.254cm" fo:padding-bottom="0.254cm" fo:padding-left="0.254cm" fo:padding-right="0.254cm" fo:wrap-option="wrap"/>
    </style:style>
    <style:style style:name="Mgr47" style:family="graphic" style:parent-style-name="standard">
      <style:graphic-properties draw:stroke="none" svg:stroke-width="0cm" draw:fill="solid" draw:fill-color="#9e5a5a" draw:textarea-vertical-align="middle" draw:auto-grow-height="false" draw:fit-to-size="false" style:shrink-to-fit="false" fo:min-height="4.851cm" fo:min-width="3.529cm" fo:padding-top="0.254cm" fo:padding-bottom="0.254cm" fo:padding-left="0.254cm" fo:padding-right="0.254cm" fo:wrap-option="wrap"/>
    </style:style>
    <style:style style:name="Mgr48" style:family="graphic" style:parent-style-name="standard">
      <style:graphic-properties draw:stroke="none" svg:stroke-width="0cm" draw:fill="solid" draw:fill-color="#ce8a8a" draw:textarea-vertical-align="middle" draw:auto-grow-height="false" draw:fit-to-size="false" style:shrink-to-fit="false" fo:min-height="2.261cm" fo:min-width="1.507cm" fo:padding-top="0.254cm" fo:padding-bottom="0.254cm" fo:padding-left="0.254cm" fo:padding-right="0.254cm" fo:wrap-option="wrap"/>
    </style:style>
    <style:style style:name="Mgr49" style:family="graphic" style:parent-style-name="standard">
      <style:graphic-properties draw:stroke="none" svg:stroke-width="0cm" draw:fill="solid" draw:fill-color="#9e5a5a" draw:textarea-vertical-align="middle" draw:auto-grow-height="false" draw:fit-to-size="false" style:shrink-to-fit="false" fo:min-height="4.857cm" fo:min-width="3.933cm" fo:padding-top="0.254cm" fo:padding-bottom="0.254cm" fo:padding-left="0.254cm" fo:padding-right="0.254cm" fo:wrap-option="wrap"/>
    </style:style>
    <style:style style:name="Mgr50" style:family="graphic" style:parent-style-name="standard">
      <style:graphic-properties draw:stroke="none" svg:stroke-width="0cm" draw:fill="solid" draw:fill-color="#9e5a5a" draw:textarea-vertical-align="middle" draw:auto-grow-height="false" draw:fit-to-size="false" style:shrink-to-fit="false" fo:min-height="1.059cm" fo:min-width="0.965cm" fo:padding-top="0.254cm" fo:padding-bottom="0.254cm" fo:padding-left="0.254cm" fo:padding-right="0.254cm" fo:wrap-option="wrap"/>
    </style:style>
    <style:style style:name="Mgr51" style:family="graphic" style:parent-style-name="standard">
      <style:graphic-properties draw:stroke="none" svg:stroke-width="0cm" draw:fill="solid" draw:fill-color="#bdb99d" draw:textarea-vertical-align="middle" draw:auto-grow-height="false" draw:fit-to-size="false" style:shrink-to-fit="false" fo:min-height="2.92cm" fo:min-width="2.186cm" fo:padding-top="0.254cm" fo:padding-bottom="0.254cm" fo:padding-left="0.254cm" fo:padding-right="0.254cm" fo:wrap-option="wrap"/>
    </style:style>
    <style:style style:name="Mgr52" style:family="graphic" style:parent-style-name="standard">
      <style:graphic-properties draw:stroke="none" svg:stroke-width="0cm" draw:fill="solid" draw:fill-color="#bdb99d" draw:textarea-vertical-align="middle" draw:auto-grow-height="false" draw:fit-to-size="false" style:shrink-to-fit="false" fo:min-height="2.894cm" fo:min-width="2.166cm" fo:padding-top="0.254cm" fo:padding-bottom="0.254cm" fo:padding-left="0.254cm" fo:padding-right="0.254cm" fo:wrap-option="wrap"/>
    </style:style>
    <style:style style:name="Mgr53" style:family="graphic" style:parent-style-name="standard">
      <style:graphic-properties draw:stroke="none" svg:stroke-width="0cm" draw:fill="solid" draw:fill-color="#bdb99d" draw:textarea-vertical-align="middle" draw:auto-grow-height="false" draw:fit-to-size="false" style:shrink-to-fit="false" fo:min-height="2.869cm" fo:min-width="2.148cm" fo:padding-top="0.254cm" fo:padding-bottom="0.254cm" fo:padding-left="0.254cm" fo:padding-right="0.254cm" fo:wrap-option="wrap"/>
    </style:style>
    <style:style style:name="Mgr54" style:family="graphic" style:parent-style-name="standard">
      <style:graphic-properties draw:stroke="none" svg:stroke-width="0cm" draw:fill="solid" draw:fill-color="#bdb99d" draw:textarea-vertical-align="middle" draw:auto-grow-height="false" draw:fit-to-size="false" style:shrink-to-fit="false" fo:min-height="2.842cm" fo:min-width="2.132cm" fo:padding-top="0.254cm" fo:padding-bottom="0.254cm" fo:padding-left="0.254cm" fo:padding-right="0.254cm" fo:wrap-option="wrap"/>
    </style:style>
    <style:style style:name="Mgr55" style:family="graphic" style:parent-style-name="standard">
      <style:graphic-properties draw:stroke="none" svg:stroke-width="0cm" draw:fill="solid" draw:fill-color="#bdb99d" draw:textarea-vertical-align="middle" draw:auto-grow-height="false" draw:fit-to-size="false" style:shrink-to-fit="false" fo:min-height="2.818cm" fo:min-width="2.108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3f959e"/>
      <style:paragraph-properties fo:text-align="start" style:font-independent-line-spacing="true"/>
      <style:text-properties fo:font-size="14pt"/>
    </style:style>
    <style:style style:name="MP8" style:family="paragraph">
      <loext:graphic-properties draw:fill="solid" draw:fill-color="#f3f3e9"/>
      <style:paragraph-properties fo:text-align="start" style:font-independent-line-spacing="true"/>
      <style:text-properties fo:font-size="14pt"/>
    </style:style>
    <style:style style:name="MP9" style:family="paragraph">
      <loext:graphic-properties draw:fill="solid" draw:fill-color="#bdb99d"/>
      <style:paragraph-properties fo:text-align="start" style:font-independent-line-spacing="true"/>
      <style:text-properties fo:font-size="14pt"/>
    </style:style>
    <style:style style:name="MP10" style:family="paragraph">
      <loext:graphic-properties draw:fill="solid" draw:fill-color="#76c2c8"/>
      <style:paragraph-properties fo:text-align="start" style:font-independent-line-spacing="true"/>
      <style:text-properties fo:font-size="14pt"/>
    </style:style>
    <style:style style:name="MP11" style:family="paragraph">
      <loext:graphic-properties draw:fill="solid" draw:fill-color="#9e5a5a"/>
      <style:paragraph-properties fo:text-align="start" style:font-independent-line-spacing="true"/>
      <style:text-properties fo:font-size="14pt"/>
    </style:style>
    <style:style style:name="MP12" style:family="paragraph">
      <loext:graphic-properties draw:fill="solid" draw:fill-color="#ce8a8a"/>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1.276cm" svg:y="15.0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draw:frame draw:name="Google Shape;9;p2" presentation:style-name="TITLE-title" draw:layer="backgroundobjects" svg:width="14.789cm" svg:height="7.729cm" svg:x="11.763cm" svg:y="3.404cm" presentation:class="title" presentation:placeholder="true" presentation:user-transformed="true">
        <draw:text-box/>
      </draw:frame>
      <draw:g draw:name="Google Shape;11;p2">
        <draw:g draw:name="Google Shape;12;p2">
          <draw:custom-shape draw:name="Google Shape;13;p2" draw:style-name="Mgr3" draw:text-style-name="MP7" draw:layer="backgroundobjects" svg:width="3.586cm" svg:height="3.59cm" draw:transform="rotate (-0.261799387799149) translate (5.738cm 2.777cm)">
            <text:p/>
            <draw:enhanced-geometry draw:mirror-horizontal="false" draw:mirror-vertical="false" svg:viewBox="0 0 0 0" drawooo:sub-view-size="47449 47509" draw:text-areas="0 0 ?f0 ?f1" draw:type="ooxml-non-primitive" draw:enhanced-path="M 37509 0 L 1 5320 8663 47509 47448 39150 37509 0 Z N">
              <draw:equation draw:name="f0" draw:formula="logwidth"/>
              <draw:equation draw:name="f1" draw:formula="logheight"/>
            </draw:enhanced-geometry>
          </draw:custom-shape>
          <draw:custom-shape draw:name="Google Shape;14;p2" draw:style-name="Mgr4" draw:text-style-name="MP7" draw:layer="backgroundobjects" svg:width="0.611cm" svg:height="0.675cm" draw:transform="skewX (-0.00139626340159552) rotate (-0.261799387799149) translate (8.624cm 2.873cm)">
            <text:p/>
            <draw:enhanced-geometry draw:mirror-horizontal="false" draw:mirror-vertical="false" svg:viewBox="0 0 0 0" drawooo:sub-view-size="8087 8937" draw:text-areas="0 0 ?f0 ?f1" draw:type="ooxml-non-primitive" draw:enhanced-path="M 6445 1 C 6445 1 2797 700 1551 3466 366 6232 1 8329 1 8329 L 2220 8937 8086 4378 8086 1 Z N">
              <draw:equation draw:name="f0" draw:formula="logwidth"/>
              <draw:equation draw:name="f1" draw:formula="logheight"/>
            </draw:enhanced-geometry>
          </draw:custom-shape>
          <draw:custom-shape draw:name="Google Shape;15;p2" draw:style-name="Mgr5" draw:text-style-name="MP7" draw:layer="backgroundobjects" svg:width="3.061cm" svg:height="3.77cm" draw:transform="skewX (0.000349065850398848) rotate (-0.261799387799149) translate (9.18cm 3.021cm)">
            <text:p/>
            <draw:enhanced-geometry draw:mirror-horizontal="false" draw:mirror-vertical="false" svg:viewBox="0 0 0 0" drawooo:sub-view-size="40519 49880" draw:text-areas="0 0 ?f0 ?f1" draw:type="ooxml-non-primitive" draw:enhanced-path="M 943 1 L 1 305 24530 15229 33527 48451 40184 49880 40518 48451 37539 6505 943 1 Z N">
              <draw:equation draw:name="f0" draw:formula="logwidth"/>
              <draw:equation draw:name="f1" draw:formula="logheight"/>
            </draw:enhanced-geometry>
          </draw:custom-shape>
          <draw:custom-shape draw:name="Google Shape;16;p2" draw:style-name="Mgr6" draw:text-style-name="MP8" draw:layer="backgroundobjects" svg:width="2.931cm" svg:height="3.407cm" draw:transform="rotate (-0.261799387799149) translate (8.492cm 3.467cm)">
            <text:p/>
            <draw:enhanced-geometry draw:mirror-horizontal="false" draw:mirror-vertical="false" svg:viewBox="0 0 0 0" drawooo:sub-view-size="38786 45078" draw:text-areas="0 0 ?f0 ?f1" draw:type="ooxml-non-primitive" draw:enhanced-path="M 0 0 L 3192 20366 23375 39971 37053 45077 38785 41825 36657 5259 6900 244 0 0 Z N">
              <draw:equation draw:name="f0" draw:formula="logwidth"/>
              <draw:equation draw:name="f1" draw:formula="logheight"/>
            </draw:enhanced-geometry>
          </draw:custom-shape>
          <draw:custom-shape draw:name="Google Shape;17;p2" draw:style-name="Mgr7" draw:text-style-name="MP9" draw:layer="backgroundobjects" svg:width="0.698cm" svg:height="3.388cm" draw:transform="skewX (-0.00052359877559835) rotate (-0.261799387799149) translate (11.015cm 4.163cm)">
            <text:p/>
            <draw:enhanced-geometry draw:mirror-horizontal="false" draw:mirror-vertical="false" svg:viewBox="0 0 0 0" drawooo:sub-view-size="9242 44835" draw:text-areas="0 0 ?f0 ?f1" draw:type="ooxml-non-primitive" draw:enhanced-path="M 7326 1 L 2433 1277 639 3101 1 6931 2433 44834 9241 40792 7326 1 Z N">
              <draw:equation draw:name="f0" draw:formula="logwidth"/>
              <draw:equation draw:name="f1" draw:formula="logheight"/>
            </draw:enhanced-geometry>
          </draw:custom-shape>
          <draw:custom-shape draw:name="Google Shape;18;p2" draw:style-name="Mgr8" draw:text-style-name="MP8" draw:layer="backgroundobjects" svg:width="3.17cm" svg:height="1.124cm" draw:transform="rotate (-0.261799387799149) translate (8.643cm 2.904cm)">
            <text:p/>
            <draw:enhanced-geometry draw:mirror-horizontal="false" draw:mirror-vertical="false" svg:viewBox="0 0 0 0" drawooo:sub-view-size="41947 14895" draw:text-areas="0 0 ?f0 ?f1" draw:type="ooxml-non-primitive" draw:enhanced-path="M 7265 1 L 7265 1 C 7630 5594 0 7721 0 7721 L 34621 14895 35411 14135 36141 13466 36992 12615 37721 11946 38603 11095 39332 10427 40305 9484 41034 8785 41946 7965 7265 1 Z N">
              <draw:equation draw:name="f0" draw:formula="logwidth"/>
              <draw:equation draw:name="f1" draw:formula="logheight"/>
            </draw:enhanced-geometry>
          </draw:custom-shape>
          <draw:custom-shape draw:name="Google Shape;19;p2" draw:style-name="Mgr9" draw:text-style-name="MP9" draw:layer="backgroundobjects" svg:width="0.276cm" svg:height="2.981cm" draw:transform="skewX (0.00174532925199429) rotate (-0.261799387799149) translate (10.426cm 4.593cm)">
            <text:p/>
            <draw:enhanced-geometry draw:mirror-horizontal="false" draw:mirror-vertical="false" svg:viewBox="0 0 0 0" drawooo:sub-view-size="3679 39454" draw:text-areas="0 0 ?f0 ?f1" draw:type="ooxml-non-primitive" draw:enhanced-path="M 2645 0 L 1520 760 0 1672 942 33739 2645 39454 3678 38937 2645 0 Z N">
              <draw:equation draw:name="f0" draw:formula="logwidth"/>
              <draw:equation draw:name="f1" draw:formula="logheight"/>
            </draw:enhanced-geometry>
          </draw:custom-shape>
          <draw:custom-shape draw:name="Google Shape;20;p2" draw:style-name="Mgr10" draw:text-style-name="MP9" draw:layer="backgroundobjects" svg:width="2.45cm" svg:height="0.643cm" draw:transform="rotate (-0.261799387799149) translate (8.402cm 3.443cm)">
            <text:p/>
            <draw:enhanced-geometry draw:mirror-horizontal="false" draw:mirror-vertical="false" svg:viewBox="0 0 0 0" drawooo:sub-view-size="32433 8512" draw:text-areas="0 0 ?f0 ?f1" draw:type="ooxml-non-primitive" draw:enhanced-path="M 1216 0 L 0 578 31308 8511 32433 7751 1216 0 Z N">
              <draw:equation draw:name="f0" draw:formula="logwidth"/>
              <draw:equation draw:name="f1" draw:formula="logheight"/>
            </draw:enhanced-geometry>
          </draw:custom-shape>
          <draw:custom-shape draw:name="Google Shape;21;p2" draw:style-name="Mgr11" draw:text-style-name="MP8" draw:layer="backgroundobjects" svg:width="2.45cm" svg:height="3.524cm" draw:transform="rotate (-0.261799387799149) translate (8.391cm 3.486cm)">
            <text:p/>
            <draw:enhanced-geometry draw:mirror-horizontal="false" draw:mirror-vertical="false" svg:viewBox="0 0 0 0" drawooo:sub-view-size="32433 46628" draw:text-areas="0 0 ?f0 ?f1" draw:type="ooxml-non-primitive" draw:enhanced-path="M 0 1 L 7660 38512 32433 46628 31308 7934 0 1 Z N">
              <draw:equation draw:name="f0" draw:formula="logwidth"/>
              <draw:equation draw:name="f1" draw:formula="logheight"/>
            </draw:enhanced-geometry>
          </draw:custom-shape>
          <draw:custom-shape draw:name="Google Shape;22;p2" draw:style-name="Mgr12" draw:text-style-name="MP10" draw:layer="backgroundobjects" svg:width="3.187cm" svg:height="3.445cm" draw:transform="skewX (0.000349065850398888) rotate (-0.261799387799149) translate (5.878cm 2.788cm)">
            <text:p/>
            <draw:enhanced-geometry draw:mirror-horizontal="false" draw:mirror-vertical="false" svg:viewBox="0 0 0 0" drawooo:sub-view-size="42160 45563" draw:text-areas="0 0 ?f0 ?f1" draw:type="ooxml-non-primitive" draw:enhanced-path="M 35381 0 L 0 5076 8481 45563 42159 38815 35381 0 Z N">
              <draw:equation draw:name="f0" draw:formula="logwidth"/>
              <draw:equation draw:name="f1" draw:formula="logheight"/>
            </draw:enhanced-geometry>
          </draw:custom-shape>
          <draw:custom-shape draw:name="Google Shape;23;p2" draw:style-name="Mgr13" draw:text-style-name="MP10" draw:layer="backgroundobjects" svg:width="6.487cm" svg:height="3.802cm" draw:transform="skewX (0.00034906585039887) rotate (-0.261799387799149) translate (5.906cm 2.115cm)">
            <text:p/>
            <draw:enhanced-geometry draw:mirror-horizontal="false" draw:mirror-vertical="false" svg:viewBox="0 0 0 0" drawooo:sub-view-size="85839 50313" draw:text-areas="0 0 ?f0 ?f1" draw:type="ooxml-non-primitive" draw:enhanced-path="M 45456 1 C 43064 1 41137 757 39728 2166 37570 4324 37266 7394 37236 8397 L 1 13686 123 14355 37600 9035 C 37813 9035 37904 8883 37904 8701 37904 8671 37874 5023 40245 2652 41583 1344 43386 676 45655 676 45706 676 45756 676 45807 677 L 82161 7303 85109 50313 85838 49583 82829 6999 C 82799 6847 82677 6725 82525 6695 L 45898 8 45868 8 C 45729 3 45592 1 45456 1 Z N">
              <draw:equation draw:name="f0" draw:formula="logwidth"/>
              <draw:equation draw:name="f1" draw:formula="logheight"/>
            </draw:enhanced-geometry>
          </draw:custom-shape>
          <draw:custom-shape draw:name="Google Shape;24;p2" draw:style-name="Mgr14" draw:text-style-name="MP9" draw:layer="backgroundobjects" svg:width="2.443cm" svg:height="0.56cm" draw:transform="rotate (-0.261799387799149) translate (9.236cm 3.227cm)">
            <text:p/>
            <draw:enhanced-geometry draw:mirror-horizontal="false" draw:mirror-vertical="false" svg:viewBox="0 0 0 0" drawooo:sub-view-size="32342 7417" draw:text-areas="0 0 ?f0 ?f1" draw:type="ooxml-non-primitive" draw:enhanced-path="M 0 0 L 31612 7417 32341 6718 0 0 Z N">
              <draw:equation draw:name="f0" draw:formula="logwidth"/>
              <draw:equation draw:name="f1" draw:formula="logheight"/>
            </draw:enhanced-geometry>
          </draw:custom-shape>
          <draw:custom-shape draw:name="Google Shape;25;p2" draw:style-name="Mgr15" draw:text-style-name="MP9" draw:layer="backgroundobjects" svg:width="2.423cm" svg:height="0.552cm" draw:transform="rotate (-0.261799387799149) translate (9.099cm 3.321cm)">
            <text:p/>
            <draw:enhanced-geometry draw:mirror-horizontal="false" draw:mirror-vertical="false" svg:viewBox="0 0 0 0" drawooo:sub-view-size="32069 7326" draw:text-areas="0 0 ?f0 ?f1" draw:type="ooxml-non-primitive" draw:enhanced-path="M 1 0 L 31339 7325 32068 6687 1 0 Z N">
              <draw:equation draw:name="f0" draw:formula="logwidth"/>
              <draw:equation draw:name="f1" draw:formula="logheight"/>
            </draw:enhanced-geometry>
          </draw:custom-shape>
          <draw:custom-shape draw:name="Google Shape;26;p2" draw:style-name="Mgr16" draw:text-style-name="MP9" draw:layer="backgroundobjects" svg:width="2.424cm" svg:height="0.553cm" draw:transform="rotate (-0.261799387799149) translate (8.951cm 3.4cm)">
            <text:p/>
            <draw:enhanced-geometry draw:mirror-horizontal="false" draw:mirror-vertical="false" svg:viewBox="0 0 0 0" drawooo:sub-view-size="32069 7327" draw:text-areas="0 0 ?f0 ?f1" draw:type="ooxml-non-primitive" draw:enhanced-path="M 1 1 L 31339 7326 32068 6657 1 1 Z N">
              <draw:equation draw:name="f0" draw:formula="logwidth"/>
              <draw:equation draw:name="f1" draw:formula="logheight"/>
            </draw:enhanced-geometry>
          </draw:custom-shape>
          <draw:custom-shape draw:name="Google Shape;27;p2" draw:style-name="Mgr17" draw:text-style-name="MP9" draw:layer="backgroundobjects" svg:width="2.41cm" svg:height="0.55cm" draw:transform="rotate (-0.261799387799149) translate (8.819cm 3.486cm)">
            <text:p/>
            <draw:enhanced-geometry draw:mirror-horizontal="false" draw:mirror-vertical="false" svg:viewBox="0 0 0 0" drawooo:sub-view-size="31886 7295" draw:text-areas="0 0 ?f0 ?f1" draw:type="ooxml-non-primitive" draw:enhanced-path="M 1 0 L 31156 7295 31886 6626 1 0 Z N">
              <draw:equation draw:name="f0" draw:formula="logwidth"/>
              <draw:equation draw:name="f1" draw:formula="logheight"/>
            </draw:enhanced-geometry>
          </draw:custom-shape>
          <draw:custom-shape draw:name="Google Shape;28;p2" draw:style-name="Mgr18" draw:text-style-name="MP7" draw:layer="backgroundobjects" svg:width="0.694cm" svg:height="2.908cm" draw:transform="skewX (-0.000698131700797742) rotate (-0.261799387799149) translate (8.28cm 3.458cm)">
            <text:p/>
            <draw:enhanced-geometry draw:mirror-horizontal="false" draw:mirror-vertical="false" svg:viewBox="0 0 0 0" drawooo:sub-view-size="9181 38482" draw:text-areas="0 0 ?f0 ?f1" draw:type="ooxml-non-primitive" draw:enhanced-path="M 2706 0 L 1 396 9180 38481 2706 0 Z N">
              <draw:equation draw:name="f0" draw:formula="logwidth"/>
              <draw:equation draw:name="f1" draw:formula="logheight"/>
            </draw:enhanced-geometry>
          </draw:custom-shape>
        </draw:g>
        <draw:g draw:name="Google Shape;29;p2">
          <draw:custom-shape draw:name="Google Shape;30;p2" draw:style-name="Mgr19" draw:text-style-name="MP7" draw:layer="backgroundobjects" svg:width="1.749cm" svg:height="3.194cm" svg:x="9.779cm" svg:y="10.155cm">
            <text:p/>
            <draw:enhanced-geometry draw:mirror-horizontal="false" draw:mirror-vertical="false" svg:viewBox="0 0 0 0" drawooo:sub-view-size="14743 37631" draw:text-areas="0 0 ?f0 ?f1" draw:type="ooxml-non-primitive" draw:enhanced-path="M 1 1 L 12980 37509 14743 37631 4408 579 1 1 Z N">
              <draw:equation draw:name="f0" draw:formula="logwidth"/>
              <draw:equation draw:name="f1" draw:formula="logheight"/>
            </draw:enhanced-geometry>
          </draw:custom-shape>
          <draw:custom-shape draw:name="Google Shape;31;p2" draw:style-name="Mgr20" draw:text-style-name="MP7" draw:layer="backgroundobjects" svg:width="1.236cm" svg:height="0.657cm" svg:x="5.945cm" svg:y="12.936cm">
            <text:p/>
            <draw:enhanced-geometry draw:mirror-horizontal="false" draw:mirror-vertical="false" svg:viewBox="0 0 0 0" drawooo:sub-view-size="10426 7752" draw:text-areas="0 0 ?f0 ?f1" draw:type="ooxml-non-primitive" draw:enhanced-path="M 5198 0 C 2341 0 0 1733 0 3861 0 6019 2341 7751 5198 7751 8086 7751 10426 6019 10426 3861 10426 1733 8086 0 5198 0 Z N">
              <draw:equation draw:name="f0" draw:formula="logwidth"/>
              <draw:equation draw:name="f1" draw:formula="logheight"/>
            </draw:enhanced-geometry>
          </draw:custom-shape>
          <draw:custom-shape draw:name="Google Shape;32;p2" draw:style-name="Mgr21" draw:text-style-name="MP7" draw:layer="backgroundobjects" svg:width="2.661cm" svg:height="3.144cm" svg:x="1.549cm" svg:y="10.207cm">
            <text:p/>
            <draw:enhanced-geometry draw:mirror-horizontal="false" draw:mirror-vertical="false" svg:viewBox="0 0 0 0" drawooo:sub-view-size="22433 37054" draw:text-areas="0 0 ?f0 ?f1" draw:type="ooxml-non-primitive" draw:enhanced-path="M 10183 1 L 1 36445 5533 37053 7083 37053 22433 305 10183 1 Z N">
              <draw:equation draw:name="f0" draw:formula="logwidth"/>
              <draw:equation draw:name="f1" draw:formula="logheight"/>
            </draw:enhanced-geometry>
          </draw:custom-shape>
          <draw:custom-shape draw:name="Google Shape;33;p2" draw:style-name="Mgr22" draw:text-style-name="MP8" draw:layer="backgroundobjects" svg:width="4.706cm" svg:height="2.971cm" svg:x="6.518cm" svg:y="10.105cm">
            <text:p/>
            <draw:enhanced-geometry draw:mirror-horizontal="false" draw:mirror-vertical="false" svg:viewBox="0 0 0 0" drawooo:sub-view-size="39667 35017" draw:text-areas="0 0 ?f0 ?f1" draw:type="ooxml-non-primitive" draw:enhanced-path="M 29849 0 L 8025 5776 7569 5897 5046 6536 578 31460 456 32068 274 33071 122 33831 0 34469 821 34469 C 912 34469 973 34499 1064 34499 1125 34499 1186 34560 1246 34560 1277 34560 1368 34591 1398 34591 L 1429 34591 6687 35016 36171 35016 39667 32554 29849 0 Z N">
              <draw:equation draw:name="f0" draw:formula="logwidth"/>
              <draw:equation draw:name="f1" draw:formula="logheight"/>
            </draw:enhanced-geometry>
          </draw:custom-shape>
          <draw:custom-shape draw:name="Google Shape;34;p2" draw:style-name="Mgr23" draw:text-style-name="MP9" draw:layer="backgroundobjects" svg:width="4.806cm" svg:height="0.713cm" svg:x="6.512cm" svg:y="12.726cm">
            <text:p/>
            <draw:enhanced-geometry draw:mirror-horizontal="false" draw:mirror-vertical="false" svg:viewBox="0 0 0 0" drawooo:sub-view-size="40518 8413" draw:text-areas="0 0 ?f0 ?f1" draw:type="ooxml-non-primitive" draw:enhanced-path="M 10467 1 C 7107 1 4586 839 2858 1726 2736 1786 2645 1817 2523 1908 2402 1969 2250 2060 2128 2121 1642 2394 1277 2668 973 2881 L 912 2941 C 882 2972 821 3002 760 3033 730 3093 669 3124 608 3154 578 3185 548 3185 517 3245 456 3245 426 3276 426 3276 365 3306 304 3336 274 3397 L 0 3640 851 3640 C 943 3640 1003 3701 1095 3701 1155 3701 1186 3732 1277 3732 1307 3732 1368 3762 1429 3762 L 1459 3762 C 3435 4218 4894 6011 4894 8139 L 4894 8382 4894 8413 40518 7227 39728 1756 C 37813 2202 35472 2401 32838 2401 27569 2401 21125 1604 14560 388 13078 116 11715 1 10467 1 Z N">
              <draw:equation draw:name="f0" draw:formula="logwidth"/>
              <draw:equation draw:name="f1" draw:formula="logheight"/>
            </draw:enhanced-geometry>
          </draw:custom-shape>
          <draw:custom-shape draw:name="Google Shape;35;p2" draw:style-name="Mgr24" draw:text-style-name="MP8" draw:layer="backgroundobjects" svg:width="4.237cm" svg:height="3.056cm" svg:x="6.558cm" svg:y="9.988cm">
            <text:p/>
            <draw:enhanced-geometry draw:mirror-horizontal="false" draw:mirror-vertical="false" svg:viewBox="0 0 0 0" drawooo:sub-view-size="35716 36020" draw:text-areas="0 0 ?f0 ?f1" draw:type="ooxml-non-primitive" draw:enhanced-path="M 30153 0 C 30153 0 15502 0 7296 5289 6444 5806 5685 6444 5016 7082 4286 8481 3618 10031 3040 11672 2554 13040 2098 14469 1703 15988 L 1703 16049 C 821 19484 274 23283 61 27144 1 29058 1 31034 122 32979 L 213 34469 C 213 34742 274 35046 304 35290 L 304 35442 C 304 35533 335 35654 335 35715 365 35806 365 35867 365 35958 456 35958 517 35989 608 35989 669 35989 730 36019 791 36019 L 912 35867 2037 34135 2797 32949 4894 30578 7812 27782 9636 26323 10791 25533 13435 23891 15229 23071 16445 22523 19606 21460 21430 20973 22311 20821 24651 20487 25715 20335 27691 20213 28755 20213 30487 20305 32463 20426 34621 20760 34925 20791 35715 20912 35715 20912 35624 20882 30153 0 Z N">
              <draw:equation draw:name="f0" draw:formula="logwidth"/>
              <draw:equation draw:name="f1" draw:formula="logheight"/>
            </draw:enhanced-geometry>
          </draw:custom-shape>
          <draw:custom-shape draw:name="Google Shape;36;p2" draw:style-name="Mgr25" draw:text-style-name="MP9" draw:layer="backgroundobjects" svg:width="4.151cm" svg:height="1.356cm" svg:x="6.645cm" svg:y="11.685cm">
            <text:p/>
            <draw:enhanced-geometry draw:mirror-horizontal="false" draw:mirror-vertical="false" svg:viewBox="0 0 0 0" drawooo:sub-view-size="34986 15982" draw:text-areas="0 0 ?f0 ?f1" draw:type="ooxml-non-primitive" draw:enhanced-path="M 27890 1 C 18682 1 12057 3567 7842 6924 4620 9568 2401 12334 1064 14279 608 14918 213 15495 0 15890 61 15890 122 15951 182 15951 213 15951 304 15982 334 15982 L 365 15982 C 669 15465 1125 14735 1733 13884 3100 12030 5167 9568 8055 7258 12201 3916 18756 409 27857 409 29766 409 31787 563 33922 905 34226 936 34499 997 34803 1057 34814 1063 34826 1065 34839 1065 34902 1065 34985 1006 34985 905 L 34985 753 C 34955 693 34925 662 34864 662 34530 601 34195 541 33861 480 31762 150 29772 1 27890 1 Z N">
              <draw:equation draw:name="f0" draw:formula="logwidth"/>
              <draw:equation draw:name="f1" draw:formula="logheight"/>
            </draw:enhanced-geometry>
          </draw:custom-shape>
          <draw:custom-shape draw:name="Google Shape;37;p2" draw:style-name="Mgr26" draw:text-style-name="MP8" draw:layer="backgroundobjects" svg:width="4.763cm" svg:height="2.971cm" svg:x="1.852cm" svg:y="10.103cm">
            <text:p/>
            <draw:enhanced-geometry draw:mirror-horizontal="false" draw:mirror-vertical="false" svg:viewBox="0 0 0 0" drawooo:sub-view-size="40153 35016" draw:text-areas="0 0 ?f0 ?f1" draw:type="ooxml-non-primitive" draw:enhanced-path="M 10335 0 L 0 32341 2584 34803 33466 35016 38724 34590 38785 34590 C 38815 34560 38876 34560 38907 34560 38967 34560 39028 34499 39089 34499 L 40153 34499 40153 34286 40122 34043 40092 33891 39970 33253 39788 32159 39575 31095 39271 29332 35472 8268 35168 6596 31186 5532 30426 5319 10335 0 Z N">
              <draw:equation draw:name="f0" draw:formula="logwidth"/>
              <draw:equation draw:name="f1" draw:formula="logheight"/>
            </draw:enhanced-geometry>
          </draw:custom-shape>
          <draw:custom-shape draw:name="Google Shape;38;p2" draw:style-name="Mgr27" draw:text-style-name="MP9" draw:layer="backgroundobjects" svg:width="4.872cm" svg:height="0.714cm" svg:x="1.736cm" svg:y="12.716cm">
            <text:p/>
            <draw:enhanced-geometry draw:mirror-horizontal="false" draw:mirror-vertical="false" svg:viewBox="0 0 0 0" drawooo:sub-view-size="41066 8430" draw:text-areas="0 0 ?f0 ?f1" draw:type="ooxml-non-primitive" draw:enhanced-path="M 30701 0 C 29459 0 28101 112 26627 375 20274 1547 13858 2255 8559 2255 5619 2255 3023 2037 973 1560 L 0 7122 36263 8429 36293 8369 36293 8186 C 36293 6059 37752 4296 39697 3809 L 39758 3809 C 39788 3779 39849 3779 39880 3779 39940 3779 40001 3718 40062 3718 L 41065 3718 41065 3657 C 40974 3566 40883 3505 40700 3323 L 40670 3262 C 40640 3232 40548 3201 40518 3171 40488 3110 40396 3080 40366 3049 40336 3019 40244 2928 40184 2897 40153 2867 40062 2806 40032 2776 40001 2745 39910 2715 39880 2654 L 39849 2624 C 39606 2472 39333 2320 39029 2137 38937 2046 38816 1986 38664 1894 38542 1834 38451 1773 38329 1712 36597 824 34071 0 30701 0 Z N">
              <draw:equation draw:name="f0" draw:formula="logwidth"/>
              <draw:equation draw:name="f1" draw:formula="logheight"/>
            </draw:enhanced-geometry>
          </draw:custom-shape>
          <draw:custom-shape draw:name="Google Shape;39;p2" draw:style-name="Mgr28" draw:text-style-name="MP8" draw:layer="backgroundobjects" svg:width="4.179cm" svg:height="3.067cm" svg:x="2.321cm" svg:y="9.972cm">
            <text:p/>
            <draw:enhanced-geometry draw:mirror-horizontal="false" draw:mirror-vertical="false" svg:viewBox="0 0 0 0" drawooo:sub-view-size="35230 36142" draw:text-areas="0 0 ?f0 ?f1" draw:type="ooxml-non-primitive" draw:enhanced-path="M 5502 1 L 31 20852 1 21004 791 20913 1095 20852 3253 20518 5229 20396 6961 20336 8025 20336 10001 20457 11065 20609 13405 20943 14287 21095 16110 21582 19271 22646 20487 23193 22250 24013 24925 25655 26050 26445 27873 27904 30822 30700 32889 33071 33649 34226 34804 35989 34925 36141 C 34986 36141 35047 36111 35108 36111 L 35229 36111 34834 34925 27083 6992 26627 5411 C 26354 5168 26050 4986 25715 4743 19150 548 5502 1 5502 1 Z N">
              <draw:equation draw:name="f0" draw:formula="logwidth"/>
              <draw:equation draw:name="f1" draw:formula="logheight"/>
            </draw:enhanced-geometry>
          </draw:custom-shape>
          <draw:custom-shape draw:name="Google Shape;40;p2" draw:style-name="Mgr29" draw:text-style-name="MP8" draw:layer="backgroundobjects" svg:width="1.502cm" svg:height="3.549cm" svg:x="6.004cm" svg:y="9.482cm">
            <text:p/>
            <draw:enhanced-geometry draw:mirror-horizontal="false" draw:mirror-vertical="false" svg:viewBox="0 0 0 0" drawooo:sub-view-size="12676 41826" draw:text-areas="0 0 ?f0 ?f1" draw:type="ooxml-non-primitive" draw:enhanced-path="M 6566 1 C 6566 1 4651 2128 2858 6353 2767 6566 2675 6809 2584 7022 2128 8177 1703 9423 1338 10822 943 12281 609 13831 335 15533 183 16506 92 17478 1 18542 L 3922 40548 3982 40883 4195 41825 5077 41825 5077 41795 5077 41764 C 5107 41673 5107 41643 5107 41612 L 5107 41521 C 5107 41369 5137 41217 5168 41035 6019 36020 8724 20609 12280 13101 12402 12919 12463 12706 12584 12493 12676 12433 12615 12311 12432 12189 L 11885 11095 6566 1 Z N">
              <draw:equation draw:name="f0" draw:formula="logwidth"/>
              <draw:equation draw:name="f1" draw:formula="logheight"/>
            </draw:enhanced-geometry>
          </draw:custom-shape>
          <draw:custom-shape draw:name="Google Shape;41;p2" draw:style-name="Mgr30" draw:text-style-name="MP9" draw:layer="backgroundobjects" svg:width="0.864cm" svg:height="3.01cm" svg:x="6.166cm" svg:y="10.021cm">
            <text:p/>
            <draw:enhanced-geometry draw:mirror-horizontal="false" draw:mirror-vertical="false" svg:viewBox="0 0 0 0" drawooo:sub-view-size="7296 35473" draw:text-areas="0 0 ?f0 ?f1" draw:type="ooxml-non-primitive" draw:enhanced-path="M 1520 0 C 1459 213 1338 456 1247 669 791 1824 396 3070 0 4469 L 1946 13253 2584 34195 2675 34530 2858 35472 3739 35472 3739 35442 C 2219 23435 7295 11551 7235 11460 L 1520 0 Z N">
              <draw:equation draw:name="f0" draw:formula="logwidth"/>
              <draw:equation draw:name="f1" draw:formula="logheight"/>
            </draw:enhanced-geometry>
          </draw:custom-shape>
          <draw:custom-shape draw:name="Google Shape;42;p2" draw:style-name="Mgr31" draw:text-style-name="MP9" draw:layer="backgroundobjects" svg:width="0.943cm" svg:height="2.509cm" svg:x="6.563cm" svg:y="10.522cm">
            <text:p/>
            <draw:enhanced-geometry draw:mirror-horizontal="false" draw:mirror-vertical="false" svg:viewBox="0 0 0 0" drawooo:sub-view-size="7965 29564" draw:text-areas="0 0 ?f0 ?f1" draw:type="ooxml-non-primitive" draw:enhanced-path="M 7706 0 C 7645 0 7589 22 7569 79 7417 353 7266 657 7114 991 3740 8347 1156 22542 244 28104 244 28165 183 28256 183 28317 123 28621 92 28894 62 29168 L 62 29229 C 62 29350 1 29441 1 29563 L 366 29563 366 29502 C 396 29411 396 29381 396 29350 L 396 29259 C 426 29107 426 28955 457 28773 1308 23758 4013 8347 7569 839 7691 657 7752 444 7873 231 7965 171 7904 49 7813 19 7779 7 7742 0 7706 0 Z N">
              <draw:equation draw:name="f0" draw:formula="logwidth"/>
              <draw:equation draw:name="f1" draw:formula="logheight"/>
            </draw:enhanced-geometry>
          </draw:custom-shape>
          <draw:custom-shape draw:name="Google Shape;43;p2" draw:style-name="Mgr25" draw:text-style-name="MP9" draw:layer="backgroundobjects" svg:width="4.151cm" svg:height="1.356cm" svg:x="2.339cm" svg:y="11.685cm">
            <text:p/>
            <draw:enhanced-geometry draw:mirror-horizontal="false" draw:mirror-vertical="false" svg:viewBox="0 0 0 0" drawooo:sub-view-size="34987 15981" draw:text-areas="0 0 ?f0 ?f1" draw:type="ooxml-non-primitive" draw:enhanced-path="M 7141 0 C 5263 0 3279 149 1186 479 821 570 487 600 153 661 122 722 61 722 31 752 1 783 1 813 1 904 1 1005 42 1064 126 1064 143 1064 162 1062 183 1056 487 1026 760 935 1064 904 3213 554 5247 397 7167 397 16249 397 22791 3920 26931 7257 29819 9567 31916 12029 33253 13883 33861 14734 34317 15464 34621 15981 L 34682 15981 C 34743 15950 34773 15950 34804 15950 34895 15950 34925 15920 34986 15920 34743 15494 34378 14947 33953 14278 32646 12333 30396 9537 27174 6953 22959 3571 16334 0 7141 0 Z N">
              <draw:equation draw:name="f0" draw:formula="logwidth"/>
              <draw:equation draw:name="f1" draw:formula="logheight"/>
            </draw:enhanced-geometry>
          </draw:custom-shape>
          <draw:custom-shape draw:name="Google Shape;44;p2" draw:style-name="Mgr32" draw:text-style-name="MP8" draw:layer="backgroundobjects" svg:width="1.578cm" svg:height="3.588cm" svg:x="5.38cm" svg:y="9.443cm">
            <text:p/>
            <draw:enhanced-geometry draw:mirror-horizontal="false" draw:mirror-vertical="false" svg:viewBox="0 0 0 0" drawooo:sub-view-size="13314 42282" draw:text-areas="0 0 ?f0 ?f1" draw:type="ooxml-non-primitive" draw:enhanced-path="M 4256 1 C 4256 1 821 3557 0 11004 L 608 13071 9028 41156 9362 42281 9818 42281 9818 42038 9818 41764 C 9788 41491 9788 41187 9788 40883 L 9788 38846 C 9818 37327 9879 35503 10061 33436 10426 29029 11307 23709 13283 18633 13313 18573 13313 18512 13222 18481 L 13131 18390 12949 17965 7903 7539 4256 1 Z N">
              <draw:equation draw:name="f0" draw:formula="logwidth"/>
              <draw:equation draw:name="f1" draw:formula="logheight"/>
            </draw:enhanced-geometry>
          </draw:custom-shape>
          <draw:custom-shape draw:name="Google Shape;45;p2" draw:style-name="Mgr33" draw:text-style-name="MP9" draw:layer="backgroundobjects" svg:width="0.467cm" svg:height="2.036cm" svg:x="6.49cm" svg:y="10.995cm">
            <text:p/>
            <draw:enhanced-geometry draw:mirror-horizontal="false" draw:mirror-vertical="false" svg:viewBox="0 0 0 0" drawooo:sub-view-size="3952 23995" draw:text-areas="0 0 ?f0 ?f1" draw:type="ooxml-non-primitive" draw:enhanced-path="M 3718 1 C 3656 1 3580 41 3556 134 3040 1441 2644 2687 2249 3994 L 2249 4024 C 699 9435 213 14845 61 18796 0 20590 0 22110 61 23173 61 23477 91 23781 91 23994 L 456 23994 456 23751 456 23477 C 426 23204 426 22900 426 22596 L 426 20559 C 456 19040 517 17216 699 15149 1064 10742 1945 5422 3921 346 3951 286 3951 225 3860 103 L 3769 12 C 3755 5 3737 1 3718 1 Z N">
              <draw:equation draw:name="f0" draw:formula="logwidth"/>
              <draw:equation draw:name="f1" draw:formula="logheight"/>
            </draw:enhanced-geometry>
          </draw:custom-shape>
          <draw:custom-shape draw:name="Google Shape;46;p2" draw:style-name="Mgr34" draw:text-style-name="MP10" draw:layer="backgroundobjects" svg:width="9.961cm" svg:height="0.332cm" svg:x="1.552cm" svg:y="13.3cm">
            <text:p/>
            <draw:enhanced-geometry draw:mirror-horizontal="false" draw:mirror-vertical="false" svg:viewBox="0 0 0 0" drawooo:sub-view-size="83954 3922" draw:text-areas="0 0 ?f0 ?f1" draw:type="ooxml-non-primitive" draw:enhanced-path="M 0 0 L 0 760 37752 1976 C 38147 2462 39515 3921 42311 3921 L 42767 3921 C 45108 3648 46475 2401 46870 1976 L 83953 790 83953 31 83923 31 46688 1216 C 46567 1216 46445 1246 46415 1368 46415 1368 45108 2888 42676 3161 42531 3170 42390 3174 42253 3174 39461 3174 38326 1485 38268 1398 38208 1277 38086 1216 37965 1216 L 0 0 Z N">
              <draw:equation draw:name="f0" draw:formula="logwidth"/>
              <draw:equation draw:name="f1" draw:formula="logheight"/>
            </draw:enhanced-geometry>
          </draw:custom-shape>
          <draw:custom-shape draw:name="Google Shape;47;p2" draw:style-name="Mgr35" draw:text-style-name="MP9" draw:layer="backgroundobjects" svg:width="3.068cm" svg:height="0.936cm" svg:x="2.876cm" svg:y="11.29cm">
            <text:p/>
            <draw:enhanced-geometry draw:mirror-horizontal="false" draw:mirror-vertical="false" svg:viewBox="0 0 0 0" drawooo:sub-view-size="25868 11034" draw:text-areas="0 0 ?f0 ?f1" draw:type="ooxml-non-primitive" draw:enhanced-path="M 335 0 C 152 0 1 152 1 365 1 547 152 699 335 699 517 699 18512 821 25138 10882 25229 11003 25351 11034 25442 11034 25503 11034 25536 11020 25579 11020 25600 11020 25624 11024 25654 11034 25837 10912 25867 10699 25746 10547 18907 122 1095 0 335 0 Z N">
              <draw:equation draw:name="f0" draw:formula="logwidth"/>
              <draw:equation draw:name="f1" draw:formula="logheight"/>
            </draw:enhanced-geometry>
          </draw:custom-shape>
          <draw:custom-shape draw:name="Google Shape;48;p2" draw:style-name="Mgr36" draw:text-style-name="MP9" draw:layer="backgroundobjects" svg:width="2.711cm" svg:height="0.69cm" svg:x="2.999cm" svg:y="10.877cm">
            <text:p/>
            <draw:enhanced-geometry draw:mirror-horizontal="false" draw:mirror-vertical="false" svg:viewBox="0 0 0 0" drawooo:sub-view-size="22859 8147" draw:text-areas="0 0 ?f0 ?f1" draw:type="ooxml-non-primitive" draw:enhanced-path="M 335 1 C 153 1 1 153 1 366 1 548 153 700 335 700 487 700 14773 761 22220 8025 22251 8116 22372 8147 22433 8147 22524 8147 22585 8116 22707 8025 22859 7873 22859 7691 22707 7539 15077 92 487 1 335 1 Z N">
              <draw:equation draw:name="f0" draw:formula="logwidth"/>
              <draw:equation draw:name="f1" draw:formula="logheight"/>
            </draw:enhanced-geometry>
          </draw:custom-shape>
          <draw:custom-shape draw:name="Google Shape;49;p2" draw:style-name="Mgr37" draw:text-style-name="MP9" draw:layer="backgroundobjects" svg:width="2.523cm" svg:height="0.569cm" svg:x="2.988cm" svg:y="10.509cm">
            <text:p/>
            <draw:enhanced-geometry draw:mirror-horizontal="false" draw:mirror-vertical="false" svg:viewBox="0 0 0 0" drawooo:sub-view-size="21278 6718" draw:text-areas="0 0 ?f0 ?f1" draw:type="ooxml-non-primitive" draw:enhanced-path="M 335 0 C 153 0 1 152 1 335 1 517 153 669 335 669 487 669 12949 760 20670 6626 20761 6687 20822 6718 20913 6718 21004 6718 21126 6687 21156 6596 21278 6444 21247 6231 21095 6110 13193 61 457 0 335 0 Z N">
              <draw:equation draw:name="f0" draw:formula="logwidth"/>
              <draw:equation draw:name="f1" draw:formula="logheight"/>
            </draw:enhanced-geometry>
          </draw:custom-shape>
          <draw:custom-shape draw:name="Google Shape;50;p2" draw:style-name="Mgr38" draw:text-style-name="MP9" draw:layer="backgroundobjects" svg:width="3.34cm" svg:height="0.912cm" svg:x="7.132cm" svg:y="11.368cm">
            <text:p/>
            <draw:enhanced-geometry draw:mirror-horizontal="false" draw:mirror-vertical="false" svg:viewBox="0 0 0 0" drawooo:sub-view-size="28147 10764" draw:text-areas="0 0 ?f0 ?f1" draw:type="ooxml-non-primitive" draw:enhanced-path="M 22003 1 C 15592 1 5499 1516 122 10247 0 10430 61 10612 213 10734 304 10764 335 10764 426 10764 517 10764 639 10703 669 10582 5882 2169 15650 672 21904 672 25276 672 27627 1107 27691 1129 27710 1132 27729 1133 27748 1133 27915 1133 28089 1019 28116 855 28147 673 28025 460 27843 429 27780 429 25412 1 22003 1 Z N">
              <draw:equation draw:name="f0" draw:formula="logwidth"/>
              <draw:equation draw:name="f1" draw:formula="logheight"/>
            </draw:enhanced-geometry>
          </draw:custom-shape>
          <draw:custom-shape draw:name="Google Shape;51;p2" draw:style-name="Mgr39" draw:text-style-name="MP9" draw:layer="backgroundobjects" svg:width="3.112cm" svg:height="0.795cm" svg:x="7.172cm" svg:y="10.96cm">
            <text:p/>
            <draw:enhanced-geometry draw:mirror-horizontal="false" draw:mirror-vertical="false" svg:viewBox="0 0 0 0" drawooo:sub-view-size="26233 9370" draw:text-areas="0 0 ?f0 ?f1" draw:type="ooxml-non-primitive" draw:enhanced-path="M 22091 0 C 16231 0 5107 1079 122 8853 1 9005 92 9217 244 9339 305 9369 335 9369 426 9369 548 9369 639 9308 730 9187 5545 1724 16333 659 22064 659 24292 659 25756 820 25807 828 25823 831 25838 832 25853 832 26014 832 26144 691 26172 524 26232 342 26080 190 25868 159 25817 159 24343 0 22091 0 Z N">
              <draw:equation draw:name="f0" draw:formula="logwidth"/>
              <draw:equation draw:name="f1" draw:formula="logheight"/>
            </draw:enhanced-geometry>
          </draw:custom-shape>
          <draw:custom-shape draw:name="Google Shape;52;p2" draw:style-name="Mgr40" draw:text-style-name="MP9" draw:layer="backgroundobjects" svg:width="2.563cm" svg:height="0.55cm" svg:x="7.366cm" svg:y="10.528cm">
            <text:p/>
            <draw:enhanced-geometry draw:mirror-horizontal="false" draw:mirror-vertical="false" svg:viewBox="0 0 0 0" drawooo:sub-view-size="21612 6497" draw:text-areas="0 0 ?f0 ?f1" draw:type="ooxml-non-primitive" draw:enhanced-path="M 18142 0 C 13779 0 5779 772 152 5889 0 6010 0 6223 122 6375 183 6466 243 6497 365 6497 456 6497 547 6497 638 6375 6068 1451 13784 693 18049 693 19944 693 21158 843 21186 843 21204 846 21222 847 21239 847 21424 847 21553 703 21581 509 21612 326 21460 174 21277 144 21231 144 20025 0 18142 0 Z N">
              <draw:equation draw:name="f0" draw:formula="logwidth"/>
              <draw:equation draw:name="f1" draw:formula="logheight"/>
            </draw:enhanced-geometry>
          </draw:custom-shape>
          <draw:custom-shape draw:name="Google Shape;53;p2" draw:style-name="Mgr41" draw:text-style-name="MP9" draw:layer="backgroundobjects" svg:width="1.149cm" svg:height="2.486cm" svg:x="5.261cm" svg:y="10.33cm">
            <text:p/>
            <draw:enhanced-geometry draw:mirror-horizontal="false" draw:mirror-vertical="false" svg:viewBox="0 0 0 0" drawooo:sub-view-size="9697 29303" draw:text-areas="0 0 ?f0 ?f1" draw:type="ooxml-non-primitive" draw:enhanced-path="M 0 1 L 9696 29302 1064 609 0 1 Z N">
              <draw:equation draw:name="f0" draw:formula="logwidth"/>
              <draw:equation draw:name="f1" draw:formula="logheight"/>
            </draw:enhanced-geometry>
          </draw:custom-shape>
        </draw:g>
        <draw:g draw:name="Google Shape;54;p2">
          <draw:custom-shape draw:name="Google Shape;55;p2" draw:style-name="Mgr42" draw:text-style-name="MP9" draw:layer="backgroundobjects" svg:width="3.076cm" svg:height="3.561cm" svg:x="2.698cm" svg:y="4.75cm">
            <text:p/>
            <draw:enhanced-geometry draw:mirror-horizontal="true" draw:mirror-vertical="false" svg:viewBox="0 0 0 0" drawooo:sub-view-size="34622 35776" draw:text-areas="0 0 ?f0 ?f1" draw:type="ooxml-non-primitive" draw:enhanced-path="M 3527 0 L 1 10578 31582 35776 34622 31946 5898 1550 3527 0 Z N">
              <draw:equation draw:name="f0" draw:formula="logwidth"/>
              <draw:equation draw:name="f1" draw:formula="logheight"/>
            </draw:enhanced-geometry>
          </draw:custom-shape>
          <draw:custom-shape draw:name="Google Shape;56;p2" draw:style-name="Mgr43" draw:text-style-name="MP9" draw:layer="backgroundobjects" svg:width="2.423cm" svg:height="4.336cm" svg:x="1.426cm" svg:y="2.789cm">
            <text:p/>
            <draw:enhanced-geometry draw:mirror-horizontal="true" draw:mirror-vertical="false" svg:viewBox="0 0 0 0" drawooo:sub-view-size="27266 43558" draw:text-areas="0 0 ?f0 ?f1" draw:type="ooxml-non-primitive" draw:enhanced-path="M 5685 1 L 1 8177 26354 43558 27266 41491 6293 244 5685 1 Z N">
              <draw:equation draw:name="f0" draw:formula="logwidth"/>
              <draw:equation draw:name="f1" draw:formula="logheight"/>
            </draw:enhanced-geometry>
          </draw:custom-shape>
          <draw:custom-shape draw:name="Google Shape;57;p2" draw:style-name="Mgr44" draw:text-style-name="MP8" draw:layer="backgroundobjects" svg:width="4.033cm" svg:height="4.865cm" svg:x="1.431cm" svg:y="3.195cm">
            <text:p/>
            <draw:enhanced-geometry draw:mirror-horizontal="true" draw:mirror-vertical="false" svg:viewBox="0 0 0 0" drawooo:sub-view-size="45381 48877" draw:text-areas="0 0 ?f0 ?f1" draw:type="ooxml-non-primitive" draw:enhanced-path="M 18116 1 C 18116 1 16323 1521 13861 3587 13557 3861 13253 4135 12918 4408 12341 4894 11702 5472 11034 5989 10730 6262 10395 6536 10091 6779 9484 7326 8845 7843 8237 8390 7903 8664 7599 8907 7295 9180 6626 9727 6018 10244 5411 10791 L 4499 11581 C 3830 12159 3222 12676 2645 13192 2310 13436 2006 13709 1733 13983 638 14955 0 15563 61 15594 365 15715 26140 44895 29666 48877 31368 48451 33131 48117 34742 47570 36353 46992 37843 46202 39241 45229 40791 44196 42311 43011 43375 41400 43831 40792 44135 40123 44530 39485 44895 38816 45290 38178 45381 37418 L 18116 1 Z N">
              <draw:equation draw:name="f0" draw:formula="logwidth"/>
              <draw:equation draw:name="f1" draw:formula="logheight"/>
            </draw:enhanced-geometry>
          </draw:custom-shape>
          <draw:custom-shape draw:name="Google Shape;58;p2" draw:style-name="Mgr45" draw:text-style-name="MP11" draw:layer="backgroundobjects" svg:width="2.777cm" svg:height="3.547cm" svg:x="1.395cm" svg:y="6.909cm">
            <text:p/>
            <draw:enhanced-geometry draw:mirror-horizontal="true" draw:mirror-vertical="false" svg:viewBox="0 0 0 0" drawooo:sub-view-size="31248 35641" draw:text-areas="0 0 ?f0 ?f1" draw:type="ooxml-non-primitive" draw:enhanced-path="M 31247 0 L 30852 91 30852 183 C 29849 3435 27508 6322 24682 8177 24499 8298 24347 8420 24226 8481 22706 9392 21064 10031 19393 10699 18365 11073 17069 11859 15889 11859 15533 11859 15188 11787 14864 11611 L 14712 12067 6231 18815 C 6231 18815 0 30943 0 31277 L 0 33678 0 34803 C 0 34803 1611 35502 3891 35624 4071 35635 4252 35641 4432 35641 7159 35641 9781 34358 11520 32219 16384 26384 28572 10791 31247 0 Z N">
              <draw:equation draw:name="f0" draw:formula="logwidth"/>
              <draw:equation draw:name="f1" draw:formula="logheight"/>
            </draw:enhanced-geometry>
          </draw:custom-shape>
          <draw:custom-shape draw:name="Google Shape;59;p2" draw:style-name="Mgr46" draw:text-style-name="MP12" draw:layer="backgroundobjects" svg:width="2.152cm" svg:height="2.521cm" svg:x="2.023cm" svg:y="7.753cm">
            <text:p/>
            <draw:enhanced-geometry draw:mirror-horizontal="true" draw:mirror-vertical="false" svg:viewBox="0 0 0 0" drawooo:sub-view-size="24226 25337" draw:text-areas="0 0 ?f0 ?f1" draw:type="ooxml-non-primitive" draw:enhanced-path="M 24226 1 C 22706 912 21064 1520 19393 2219 18365 2593 17069 3379 15889 3379 15533 3379 15188 3307 14864 3131 L 14712 3587 6231 10335 C 6231 10335 0 22463 0 22797 L 0 25198 C 395 25229 821 25259 1216 25320 1399 25331 1581 25337 1762 25337 4511 25337 7108 24054 8876 21916 12280 17782 19393 8754 24226 1 Z N">
              <draw:equation draw:name="f0" draw:formula="logwidth"/>
              <draw:equation draw:name="f1" draw:formula="logheight"/>
            </draw:enhanced-geometry>
          </draw:custom-shape>
          <draw:custom-shape draw:name="Google Shape;60;p2" draw:style-name="Mgr47" draw:text-style-name="MP11" draw:layer="backgroundobjects" svg:width="4.036cm" svg:height="5.358cm" svg:x="2.841cm" svg:y="5.014cm">
            <text:p/>
            <draw:enhanced-geometry draw:mirror-horizontal="true" draw:mirror-vertical="false" svg:viewBox="0 0 0 0" drawooo:sub-view-size="45412 53832" draw:text-areas="0 0 ?f0 ?f1" draw:type="ooxml-non-primitive" draw:enhanced-path="M 11672 1 L 1 29727 12220 39393 16688 42949 30396 53831 45412 30943 32585 18967 28481 15138 12372 122 11672 1 Z N">
              <draw:equation draw:name="f0" draw:formula="logwidth"/>
              <draw:equation draw:name="f1" draw:formula="logheight"/>
            </draw:enhanced-geometry>
          </draw:custom-shape>
          <draw:custom-shape draw:name="Google Shape;61;p2" draw:style-name="Mgr48" draw:text-style-name="MP12" draw:layer="backgroundobjects" svg:width="2.014cm" svg:height="2.768cm" svg:x="3.921cm" svg:y="6.524cm">
            <text:p/>
            <draw:enhanced-geometry draw:mirror-horizontal="true" draw:mirror-vertical="false" svg:viewBox="0 0 0 0" drawooo:sub-view-size="22676 27813" draw:text-areas="0 0 ?f0 ?f1" draw:type="ooxml-non-primitive" draw:enhanced-path="M 17812 1 C 17235 518 16627 1034 15958 1399 14742 2098 13344 2554 11855 2585 7903 2737 4012 5168 1885 9180 152 12524 0 16263 1216 19302 1824 20883 1976 22615 1581 24226 L 6079 27813 C 7447 26567 9180 25807 11095 25685 14955 25412 18754 23010 20821 19059 22463 15959 22675 12554 21672 9697 21064 7752 21186 5685 21916 3831 L 17812 1 Z N">
              <draw:equation draw:name="f0" draw:formula="logwidth"/>
              <draw:equation draw:name="f1" draw:formula="logheight"/>
            </draw:enhanced-geometry>
          </draw:custom-shape>
          <draw:custom-shape draw:name="Google Shape;62;p2" draw:style-name="Mgr49" draw:text-style-name="MP11" draw:layer="backgroundobjects" svg:width="4.44cm" svg:height="5.364cm" svg:x="1.399cm" svg:y="2.753cm">
            <text:p/>
            <draw:enhanced-geometry draw:mirror-horizontal="true" draw:mirror-vertical="false" svg:viewBox="0 0 0 0" drawooo:sub-view-size="49972 53892" draw:text-areas="0 0 ?f0 ?f1" draw:type="ooxml-non-primitive" draw:enhanced-path="M 28664 0 L 28056 365 49242 41672 C 46840 50913 35290 52919 33831 53131 L 456 22189 0 22706 33466 53800 C 33527 53861 33618 53891 33709 53891 L 33740 53891 C 33892 53861 47387 52189 49971 41733 49971 41672 49971 41551 49941 41490 L 28664 0 Z N">
              <draw:equation draw:name="f0" draw:formula="logwidth"/>
              <draw:equation draw:name="f1" draw:formula="logheight"/>
            </draw:enhanced-geometry>
          </draw:custom-shape>
          <draw:custom-shape draw:name="Google Shape;63;p2" draw:style-name="Mgr50" draw:text-style-name="MP11" draw:layer="backgroundobjects" svg:width="1.472cm" svg:height="1.566cm" svg:x="4.191cm" svg:y="7.146cm">
            <text:p/>
            <draw:enhanced-geometry draw:mirror-horizontal="true" draw:mirror-vertical="false" svg:viewBox="0 0 0 0" drawooo:sub-view-size="16566 15746" draw:text-areas="0 0 ?f0 ?f1" draw:type="ooxml-non-primitive" draw:enhanced-path="M 9179 1 C 8937 1 8694 15 8450 45 5836 349 3435 2112 2098 4665 0 8616 1094 13267 4529 15060 5395 15517 6357 15746 7338 15746 7597 15746 7856 15730 8116 15699 10730 15395 13162 13662 14469 11109 16566 7157 15472 2476 12037 713 11156 249 10177 1 9179 1 Z N">
              <draw:equation draw:name="f0" draw:formula="logwidth"/>
              <draw:equation draw:name="f1" draw:formula="logheight"/>
            </draw:enhanced-geometry>
          </draw:custom-shape>
          <draw:custom-shape draw:name="Google Shape;64;p2" draw:style-name="Mgr51" draw:text-style-name="MP9" draw:layer="backgroundobjects" svg:width="2.693cm" svg:height="3.427cm" svg:x="1.619cm" svg:y="3.549cm">
            <text:p/>
            <draw:enhanced-geometry draw:mirror-horizontal="true" draw:mirror-vertical="false" svg:viewBox="0 0 0 0" drawooo:sub-view-size="30306 34439" draw:text-areas="0 0 ?f0 ?f1" draw:type="ooxml-non-primitive" draw:enhanced-path="M 943 0 C 639 274 335 547 1 790 L 30305 34438 943 0 Z N">
              <draw:equation draw:name="f0" draw:formula="logwidth"/>
              <draw:equation draw:name="f1" draw:formula="logheight"/>
            </draw:enhanced-geometry>
          </draw:custom-shape>
          <draw:custom-shape draw:name="Google Shape;65;p2" draw:style-name="Mgr52" draw:text-style-name="MP9" draw:layer="backgroundobjects" svg:width="2.673cm" svg:height="3.401cm" svg:x="1.89cm" svg:y="3.791cm">
            <text:p/>
            <draw:enhanced-geometry draw:mirror-horizontal="true" draw:mirror-vertical="false" svg:viewBox="0 0 0 0" drawooo:sub-view-size="30093 34166" draw:text-areas="0 0 ?f0 ?f1" draw:type="ooxml-non-primitive" draw:enhanced-path="M 974 1 C 670 274 305 548 1 821 L 30093 34165 974 1 Z N">
              <draw:equation draw:name="f0" draw:formula="logwidth"/>
              <draw:equation draw:name="f1" draw:formula="logheight"/>
            </draw:enhanced-geometry>
          </draw:custom-shape>
          <draw:custom-shape draw:name="Google Shape;66;p2" draw:style-name="Mgr53" draw:text-style-name="MP9" draw:layer="backgroundobjects" svg:width="2.655cm" svg:height="3.376cm" svg:x="2.161cm" svg:y="4.031cm">
            <text:p/>
            <draw:enhanced-geometry draw:mirror-horizontal="true" draw:mirror-vertical="false" svg:viewBox="0 0 0 0" drawooo:sub-view-size="29880 33923" draw:text-areas="0 0 ?f0 ?f1" draw:type="ooxml-non-primitive" draw:enhanced-path="M 942 1 C 608 275 274 518 0 791 L 29879 33922 942 1 Z N">
              <draw:equation draw:name="f0" draw:formula="logwidth"/>
              <draw:equation draw:name="f1" draw:formula="logheight"/>
            </draw:enhanced-geometry>
          </draw:custom-shape>
          <draw:custom-shape draw:name="Google Shape;67;p2" draw:style-name="Mgr54" draw:text-style-name="MP9" draw:layer="backgroundobjects" svg:width="2.639cm" svg:height="3.349cm" svg:x="2.426cm" svg:y="4.272cm">
            <text:p/>
            <draw:enhanced-geometry draw:mirror-horizontal="true" draw:mirror-vertical="false" svg:viewBox="0 0 0 0" drawooo:sub-view-size="29698 33649" draw:text-areas="0 0 ?f0 ?f1" draw:type="ooxml-non-primitive" draw:enhanced-path="M 913 1 L 1 791 29697 33648 913 1 Z N">
              <draw:equation draw:name="f0" draw:formula="logwidth"/>
              <draw:equation draw:name="f1" draw:formula="logheight"/>
            </draw:enhanced-geometry>
          </draw:custom-shape>
          <draw:custom-shape draw:name="Google Shape;68;p2" draw:style-name="Mgr55" draw:text-style-name="MP9" draw:layer="backgroundobjects" svg:width="2.615cm" svg:height="3.325cm" svg:x="2.696cm" svg:y="4.511cm">
            <text:p/>
            <draw:enhanced-geometry draw:mirror-horizontal="true" draw:mirror-vertical="false" svg:viewBox="0 0 0 0" drawooo:sub-view-size="29424 33406" draw:text-areas="0 0 ?f0 ?f1" draw:type="ooxml-non-primitive" draw:enhanced-path="M 913 1 C 578 244 274 518 1 791 L 29424 33406 913 1 Z N">
              <draw:equation draw:name="f0" draw:formula="logwidth"/>
              <draw:equation draw:name="f1" draw:formula="logheight"/>
            </draw:enhanced-geometry>
          </draw:custom-shape>
        </draw:g>
      </draw:g>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08T08:14:13.841000000</meta:creation-date>
    <dc:date>2022-04-14T11:22:05.456000000</dc:date>
    <meta:editing-duration>PT10H3M51S</meta:editing-duration>
    <meta:editing-cycles>58</meta:editing-cycles>
    <meta:generator>LibreOffice/7.0.4.2$Windows_X86_64 LibreOffice_project/dcf040e67528d9187c66b2379df5ea4407429775</meta:generator>
    <meta:document-statistic meta:object-count="515"/>
  </office:meta>
</office:document-meta>
</file>