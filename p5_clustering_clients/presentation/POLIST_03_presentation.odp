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000000161639999C218EF2E4C.png" manifest:media-type="image/png"/>
  <manifest:file-entry manifest:full-path="Pictures/10000201000007D00000019789470736F9A0E07E.png" manifest:media-type="image/png"/>
  <manifest:file-entry manifest:full-path="Pictures/10000000000003840000014C4910E32BE3BBFD80.png" manifest:media-type="image/png"/>
  <manifest:file-entry manifest:full-path="Pictures/1000020100000BB800000109BBD43BE04ED92AD7.png" manifest:media-type="image/png"/>
  <manifest:file-entry manifest:full-path="Pictures/10000000000009B4000005DA481A117AA54EF740.png" manifest:media-type="image/png"/>
  <manifest:file-entry manifest:full-path="Pictures/10000201000002E7000000EA472D2C27AC393934.png" manifest:media-type="image/png"/>
  <manifest:file-entry manifest:full-path="Pictures/100000000000015C0000015C093D11CDAF98931E.png" manifest:media-type="image/png"/>
  <manifest:file-entry manifest:full-path="Pictures/10000000000000770000004FED432FE34CACC50B.png" manifest:media-type="image/png"/>
  <manifest:file-entry manifest:full-path="Pictures/100000000000015C0000015CC591DAD9B00CA183.png" manifest:media-type="image/png"/>
  <manifest:file-entry manifest:full-path="Pictures/10000000000009B6000005E2A546E1F75529450F.png" manifest:media-type="image/png"/>
  <manifest:file-entry manifest:full-path="Pictures/10000000000001D0000001579E765E59C9415A35.png" manifest:media-type="image/png"/>
  <manifest:file-entry manifest:full-path="Pictures/10000201000009B6000005D81E84DCA191BA7925.png" manifest:media-type="image/png"/>
  <manifest:file-entry manifest:full-path="Pictures/10000000000009B6000005D6E437A2F2A8DC7247.png" manifest:media-type="image/png"/>
  <manifest:file-entry manifest:full-path="Pictures/10000000000000E1000000E10F6130F9AF46E2D3.png" manifest:media-type="image/png"/>
  <manifest:file-entry manifest:full-path="Pictures/100000000000038A000001400824C94F03BE845F.png" manifest:media-type="image/png"/>
  <manifest:file-entry manifest:full-path="Pictures/10000000000001EF000001813B33DC91D7CCEC9C.png" manifest:media-type="image/png"/>
  <manifest:file-entry manifest:full-path="Pictures/10000000000001C4000001F0473B63F6D22DAA8F.png" manifest:media-type="image/png"/>
  <manifest:file-entry manifest:full-path="Pictures/10000000000001EF000001C6AE158DD6E002E6E9.png" manifest:media-type="image/png"/>
  <manifest:file-entry manifest:full-path="Pictures/100000000000049B00000290C16BF6C67D869B16.png" manifest:media-type="image/png"/>
  <manifest:file-entry manifest:full-path="Pictures/10000000000001FD00000158B650A61821EC477A.png" manifest:media-type="image/png"/>
  <manifest:file-entry manifest:full-path="Pictures/100000000000020300000157A14234AF7F2F0B16.png" manifest:media-type="image/png"/>
  <manifest:file-entry manifest:full-path="Pictures/10000000000001FD00000159B87200B9DBC16A90.png" manifest:media-type="image/png"/>
  <manifest:file-entry manifest:full-path="Pictures/10000000000001ED000001E71929CC127EE813D4.png" manifest:media-type="image/png"/>
  <manifest:file-entry manifest:full-path="Pictures/10000000000001F800000167F466A2516682443A.png" manifest:media-type="image/png"/>
  <manifest:file-entry manifest:full-path="Pictures/10000000000001C7000001E5E4C82A5FB633BABA.png" manifest:media-type="image/png"/>
  <manifest:file-entry manifest:full-path="Pictures/10000000000001E700000157ACC110ABE6339A61.png" manifest:media-type="image/png"/>
  <manifest:file-entry manifest:full-path="Pictures/10000000000001B0000001A30F1FF5BFD181BDBE.png" manifest:media-type="image/png"/>
  <manifest:file-entry manifest:full-path="Pictures/100000000000015C0000015C48CEE529DC89ADA2.png" manifest:media-type="image/png"/>
  <manifest:file-entry manifest:full-path="Pictures/1000000000000108000000BFF95658377D3F048A.png" manifest:media-type="image/png"/>
  <manifest:file-entry manifest:full-path="Pictures/10000000000001EA000001E8BEF73FB3EF4D7B4F.png" manifest:media-type="image/png"/>
  <manifest:file-entry manifest:full-path="Pictures/1000000000000115000000B6DC0202E8ECF6E7FD.png" manifest:media-type="image/png"/>
  <manifest:file-entry manifest:full-path="Pictures/10000000000001CC000001E0CBA411160860B18F.png" manifest:media-type="image/png"/>
  <manifest:file-entry manifest:full-path="Pictures/100000000000010F000000BAA4975F6EDC1DA7E1.png" manifest:media-type="image/png"/>
  <manifest:file-entry manifest:full-path="Pictures/10000000000001F800000157A37F36EF185BF915.png" manifest:media-type="image/png"/>
  <manifest:file-entry manifest:full-path="Pictures/1000000000000352000003B92F0CE8289B75CB95.png" manifest:media-type="image/png"/>
  <manifest:file-entry manifest:full-path="Pictures/100000000000025D000001A8DA8E7A56E0CFF793.png" manifest:media-type="image/png"/>
  <manifest:file-entry manifest:full-path="Pictures/100000000000046E000001C129A2AEFDF556585C.png" manifest:media-type="image/png"/>
  <manifest:file-entry manifest:full-path="Pictures/1000000000000271000001AC1A47438462ECCC8A.png" manifest:media-type="image/png"/>
  <manifest:file-entry manifest:full-path="Pictures/100000000000023D000001C3F3F059BC266797EB.png" manifest:media-type="image/png"/>
  <manifest:file-entry manifest:full-path="Pictures/1000000000000480000001C2DB0A502BDEE81761.png" manifest:media-type="image/png"/>
  <manifest:file-entry manifest:full-path="Pictures/1000000000000254000001BE0EA64233FB505FA9.png" manifest:media-type="image/png"/>
  <manifest:file-entry manifest:full-path="Pictures/1000000000000279000001B50E7B1A07F31FE179.png" manifest:media-type="image/png"/>
  <manifest:file-entry manifest:full-path="Pictures/10000000000001D1000001E4C0A737290E0BB9A3.png" manifest:media-type="image/png"/>
  <manifest:file-entry manifest:full-path="Pictures/10000000000001C8000001EBDAAFCB03D86CD958.png" manifest:media-type="image/png"/>
  <manifest:file-entry manifest:full-path="Pictures/10000000000003AA0000025F5DC767282DEA30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fcbdc" draw:opacity="40%" fo:min-height="0cm" fo:min-width="0cm"/>
    </style:style>
    <style:style style:name="gr2" style:family="graphic" style:parent-style-name="standard">
      <style:graphic-properties draw:stroke="none" draw:fill="solid" draw:fill-color="#000000" draw:opacity="100%" fo:min-height="0cm" fo:min-width="0cm"/>
    </style:style>
    <style:style style:name="gr3" style:family="graphic" style:parent-style-name="Objet_20_sans_20_remplissage_20_et_20_sans_20_ligne">
      <style:graphic-properties draw:stroke="none" draw:fill="none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3.777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1.651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937cm" fo:min-width="1.046cm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color="#ff0000" draw:fill="none" draw:textarea-vertical-align="middle"/>
    </style:style>
    <style:style style:name="pr1" style:family="presentation" style:parent-style-name="Standard-subtitle">
      <style:graphic-properties draw:fill-color="#ffffff" fo:min-height="9.1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 style:list-style-name="L2">
      <style:graphic-properties fo:min-height="9.226cm"/>
      <style:paragraph-properties style:writing-mode="lr-tb"/>
    </style:style>
    <style:style style:name="pr5" style:family="presentation" style:parent-style-name="Standard-title" style:list-style-name="L2">
      <style:graphic-properties fo:min-height="2cm"/>
      <style:paragraph-properties style:writing-mode="lr-tb"/>
    </style:style>
    <style:style style:name="pr6" style:family="presentation" style:parent-style-name="Standard-title" style:list-style-name="L2">
      <style:graphic-properties fo:min-height="2cm"/>
      <style:paragraph-properties style:writing-mode="lr-tb"/>
    </style:style>
    <style:style style:name="pr7" style:family="presentation" style:parent-style-name="Standard-title" style:list-style-name="L2">
      <style:graphic-properties fo:min-height="2cm"/>
      <style:paragraph-properties style:writing-mode="lr-tb"/>
    </style:style>
    <style:style style:name="pr8" style:family="presentation" style:parent-style-name="Standard-title" style:list-style-name="L2">
      <style:graphic-properties fo:min-height="2cm"/>
      <style:paragraph-properties style:writing-mode="lr-tb"/>
    </style:style>
    <style:style style:name="pr9" style:family="presentation" style:parent-style-name="Standard-title" style:list-style-name="L2">
      <style:graphic-properties fo:min-height="2cm"/>
      <style:paragraph-properties style:writing-mode="lr-tb"/>
    </style:style>
    <style:style style:name="pr10" style:family="presentation" style:parent-style-name="Standard-title" style:list-style-name="L2">
      <style:graphic-properties fo:min-height="3.076cm"/>
      <style:paragraph-properties style:writing-mode="lr-tb"/>
    </style:style>
    <style:style style:name="pr11" style:family="presentation" style:parent-style-name="Standard-title" style:list-style-name="L2">
      <style:graphic-properties fo:min-height="2cm"/>
      <style:paragraph-properties style:writing-mode="lr-tb"/>
    </style:style>
    <style:style style:name="pr12" style:family="presentation" style:parent-style-name="Standard-title" style:list-style-name="L2">
      <style:graphic-properties fo:min-height="2cm"/>
      <style:paragraph-properties style:writing-mode="lr-tb"/>
    </style:style>
    <style:style style:name="pr13" style:family="presentation" style:parent-style-name="Standard-title" style:list-style-name="L2">
      <style:graphic-properties fo:min-height="2cm"/>
      <style:paragraph-properties style:writing-mode="lr-tb"/>
    </style:style>
    <style:style style:name="pr14" style:family="presentation" style:parent-style-name="Standard-title" style:list-style-name="L2">
      <style:graphic-properties fo:min-height="2.051cm"/>
      <style:paragraph-properties style:writing-mode="lr-tb"/>
    </style:style>
    <style:style style:name="pr15" style:family="presentation" style:parent-style-name="Standard-title" style:list-style-name="L2">
      <style:graphic-properties fo:min-height="2.051cm"/>
      <style:paragraph-properties style:writing-mode="lr-tb"/>
    </style:style>
    <style:style style:name="pr16" style:family="presentation" style:parent-style-name="Standard-title" style:list-style-name="L2">
      <style:graphic-properties fo:min-height="2.051cm"/>
      <style:paragraph-properties style:writing-mode="lr-tb"/>
    </style:style>
    <style:style style:name="pr17" style:family="presentation" style:parent-style-name="Standard-title" style:list-style-name="L2">
      <style:graphic-properties fo:min-height="2cm"/>
      <style:paragraph-properties style:writing-mode="lr-tb"/>
    </style:style>
    <style:style style:name="pr18" style:family="presentation" style:parent-style-name="Standard-title" style:list-style-name="L2">
      <style:graphic-properties fo:min-height="2cm"/>
      <style:paragraph-properties style:writing-mode="lr-tb"/>
    </style:style>
    <style:style style:name="pr19" style:family="presentation" style:parent-style-name="Standard-title" style:list-style-name="L2">
      <style:graphic-properties fo:min-height="2cm"/>
      <style:paragraph-properties style:writing-mode="lr-tb"/>
    </style:style>
    <style:style style:name="pr20" style:family="presentation" style:parent-style-name="Standard-title" style:list-style-name="L2">
      <style:graphic-properties fo:min-height="2.051cm"/>
      <style:paragraph-properties style:writing-mode="lr-tb"/>
    </style:style>
    <style:style style:name="pr21" style:family="presentation" style:parent-style-name="Standard-title" style:list-style-name="L2">
      <style:graphic-properties fo:min-height="2.051cm"/>
      <style:paragraph-properties style:writing-mode="lr-tb"/>
    </style:style>
    <style:style style:name="pr22" style:family="presentation" style:parent-style-name="Standard-title" style:list-style-name="L2">
      <style:graphic-properties fo:min-height="2cm"/>
      <style:paragraph-properties style:writing-mode="lr-tb"/>
    </style:style>
    <style:style style:name="pr23" style:family="presentation" style:parent-style-name="Standard-title" style:list-style-name="L2">
      <style:graphic-properties fo:min-height="2.051cm"/>
      <style:paragraph-properties style:writing-mode="lr-tb"/>
    </style:style>
    <style:style style:name="pr24" style:family="presentation" style:parent-style-name="Standard-title" style:list-style-name="L2">
      <style:graphic-properties fo:min-height="3.076cm"/>
      <style:paragraph-properties style:writing-mode="lr-tb"/>
    </style:style>
    <style:style style:name="pr25" style:family="presentation" style:parent-style-name="Standard-title" style:list-style-name="L2">
      <style:graphic-properties fo:min-height="2cm"/>
      <style:paragraph-properties style:writing-mode="lr-tb"/>
    </style:style>
    <style:style style:name="pr26" style:family="presentation" style:parent-style-name="Standard-title" style:list-style-name="L2">
      <style:graphic-properties fo:min-height="2.051cm"/>
      <style:paragraph-properties style:writing-mode="lr-tb"/>
    </style:style>
    <style:style style:name="pr27" style:family="presentation" style:parent-style-name="Standard-title" style:list-style-name="L2">
      <style:graphic-properties fo:min-height="2.051cm"/>
      <style:paragraph-properties style:writing-mode="lr-tb"/>
    </style:style>
    <style:style style:name="pr28" style:family="presentation" style:parent-style-name="Standard-title" style:list-style-name="L2">
      <style:graphic-properties fo:min-height="3.936cm"/>
      <style:paragraph-properties style:writing-mode="lr-tb"/>
    </style:style>
    <style:style style:name="pr29" style:family="presentation" style:parent-style-name="Standard-title" style:list-style-name="L2">
      <style:graphic-properties fo:min-height="2.051cm"/>
      <style:paragraph-properties style:writing-mode="lr-tb"/>
    </style:style>
    <style:style style:name="pr30" style:family="presentation" style:parent-style-name="Standard-title" style:list-style-name="L2">
      <style:graphic-properties fo:min-height="3.936cm"/>
      <style:paragraph-properties style:writing-mode="lr-tb"/>
    </style:style>
    <style:style style:name="pr31" style:family="presentation" style:parent-style-name="Standard-title" style:list-style-name="L2">
      <style:graphic-properties fo:min-height="2.051cm"/>
      <style:paragraph-properties style:writing-mode="lr-tb"/>
    </style:style>
    <style:style style:name="pr32" style:family="presentation" style:parent-style-name="Standard-title" style:list-style-name="L2">
      <style:graphic-properties fo:min-height="2.051cm"/>
      <style:paragraph-properties style:writing-mode="lr-tb"/>
    </style:style>
    <style:style style:name="pr33" style:family="presentation" style:parent-style-name="Standard-title" style:list-style-name="L2">
      <style:graphic-properties fo:min-height="2.051cm"/>
      <style:paragraph-properties style:writing-mode="lr-tb"/>
    </style:style>
    <style:style style:name="pr34" style:family="presentation" style:parent-style-name="Standard-title" style:list-style-name="L2">
      <style:graphic-properties fo:min-height="2.051cm"/>
      <style:paragraph-properties style:writing-mode="lr-tb"/>
    </style:style>
    <style:style style:name="pr35" style:family="presentation" style:parent-style-name="Standard-title" style:list-style-name="L2">
      <style:graphic-properties fo:min-height="2.051cm"/>
      <style:paragraph-properties style:writing-mode="lr-tb"/>
    </style:style>
    <style:style style:name="pr36" style:family="presentation" style:parent-style-name="Standard-title" style:list-style-name="L2">
      <style:graphic-properties fo:min-height="2.051cm"/>
      <style:paragraph-properties style:writing-mode="lr-tb"/>
    </style:style>
    <style:style style:name="pr37" style:family="presentation" style:parent-style-name="Standard-title" style:list-style-name="L2">
      <style:graphic-properties fo:min-height="2.051cm"/>
      <style:paragraph-properties style:writing-mode="lr-tb"/>
    </style:style>
    <style:style style:name="pr38" style:family="presentation" style:parent-style-name="Standard-title" style:list-style-name="L2">
      <style:graphic-properties fo:min-height="2.134cm"/>
      <style:paragraph-properties style:writing-mode="lr-tb"/>
    </style:style>
    <style:style style:name="pr39" style:family="presentation" style:parent-style-name="Standard-title" style:list-style-name="L2">
      <style:graphic-properties fo:min-height="2.051cm"/>
      <style:paragraph-properties style:writing-mode="lr-tb"/>
    </style:style>
    <style:style style:name="pr40" style:family="presentation" style:parent-style-name="Standard-title" style:list-style-name="L2">
      <style:graphic-properties fo:min-height="2.051cm"/>
      <style:paragraph-properties style:writing-mode="lr-tb"/>
    </style:style>
    <style:style style:name="pr41" style:family="presentation" style:parent-style-name="Standard-title" style:list-style-name="L2">
      <style:graphic-properties fo:min-height="2.134cm"/>
      <style:paragraph-properties style:writing-mode="lr-tb"/>
    </style:style>
    <style:style style:name="pr42" style:family="presentation" style:parent-style-name="Standard-title" style:list-style-name="L2">
      <style:graphic-properties fo:min-height="2.051cm"/>
      <style:paragraph-properties style:writing-mode="lr-tb"/>
    </style:style>
    <style:style style:name="pr43" style:family="presentation" style:parent-style-name="Standard-title" style:list-style-name="L2">
      <style:graphic-properties fo:min-height="1.441cm"/>
      <style:paragraph-properties style:writing-mode="lr-tb"/>
    </style:style>
    <style:style style:name="pr44" style:family="presentation" style:parent-style-name="Standard-title" style:list-style-name="L2">
      <style:graphic-properties fo:min-height="8.68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solid" draw:fill-color="#9fcbdc" draw:opacity="40%"/>
      <style:text-properties fo:font-size="11pt"/>
    </style:style>
    <style:style style:name="P4" style:family="paragraph">
      <loext:graphic-properties draw:fill="solid" draw:fill-color="#000000" draw:opacity="100%"/>
      <style:text-properties fo:font-size="11pt"/>
    </style:style>
    <style:style style:name="P5" style:family="paragraph">
      <loext:graphic-properties draw:fill="none"/>
      <style:text-properties fo:font-size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start" style:writing-mode="lr-tb"/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ffffff"/>
      <style:paragraph-properties style:writing-mode="lr-tb"/>
      <style:text-properties fo:font-size="24pt" fo:font-weight="bold"/>
    </style:style>
    <style:style style:name="P16" style:family="paragraph">
      <loext:graphic-properties draw:fill="solid" draw:fill-color="#ffffff"/>
      <style:paragraph-properties style:writing-mode="lr-tb"/>
      <style:text-properties fo:font-size="18pt" fo:font-weight="bold"/>
    </style:style>
    <style:style style:name="P17" style:family="paragraph">
      <loext:graphic-properties draw:fill="solid" draw:fill-color="#ffffff"/>
      <style:paragraph-properties style:writing-mode="lr-tb"/>
      <style:text-properties fo:font-size="28pt" fo:font-weight="bold"/>
    </style:style>
    <style:style style:name="P18" style:family="paragraph">
      <style:paragraph-properties fo:text-align="start" style:writing-mode="lr-tb"/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text-align="start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start" style:writing-mode="lr-tb"/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  <style:paragraph-properties fo:text-align="center"/>
      <style:text-properties fo:color="#ff0000" loext:opacity="100%" fo:font-weight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fo:font-weight="bold"/>
    </style:style>
    <style:style style:name="T6" style:family="text">
      <style:text-properties fo:font-size="18pt" fo:font-weight="bold"/>
    </style:style>
    <style:style style:name="T7" style:family="text">
      <style:text-properties fo:font-size="28pt" fo:font-weight="bold"/>
    </style:style>
    <style:style style:name="T8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8pt"/>
    </style:style>
    <style:style style:name="T10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2.485cm" presentation:class="subtitle" presentation:user-transformed="true">
          <draw:text-box>
            <text:p text:style-name="P1"><text:span text:style-name="T1">Segmentation des clients </text:span></text:p>
            <text:p text:style-name="P1"><text:span text:style-name="T1">d’un site e-commerce</text:span></text:p>
          </draw:text-box>
        </draw:frame>
        <draw:g draw:name="Group 1348">
          <draw:custom-shape draw:name="Shape 7_1" draw:style-name="gr1" draw:text-style-name="P3" draw:layer="layout" svg:width="22.833cm" svg:height="1.355cm" svg:x="5.167cm" svg:y="10.465cm">
            <text:p/>
            <draw:enhanced-geometry svg:viewBox="0 0 7456933 487680" draw:text-areas="?f8 ?f10 ?f9 ?f11" draw:type="non-primitive" draw:enhanced-path="M 7456933 0 L 7456933 487680 0 289687 745693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56933"/>
              <draw:equation draw:name="f7" draw:formula="?f4 / 487680"/>
              <draw:equation draw:name="f8" draw:formula="0 / ?f6"/>
              <draw:equation draw:name="f9" draw:formula="7456933 / ?f6"/>
              <draw:equation draw:name="f10" draw:formula="0 / ?f7"/>
              <draw:equation draw:name="f11" draw:formula="487680 / ?f7"/>
            </draw:enhanced-geometry>
          </draw:custom-shape>
          <draw:custom-shape draw:name="Shape 8_1" draw:style-name="gr2" draw:text-style-name="P4" draw:layer="layout" svg:width="27.66cm" svg:height="2.19cm" svg:x="0.34cm" svg:y="11.257cm">
            <text:p/>
            <draw:enhanced-geometry svg:viewBox="0 0 9033040 787908" draw:text-areas="?f8 ?f10 ?f9 ?f11" draw:type="non-primitive" draw:enhanced-path="M 0 0 L 9033040 0 9033040 78790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33040"/>
              <draw:equation draw:name="f7" draw:formula="?f4 / 787908"/>
              <draw:equation draw:name="f8" draw:formula="0 / ?f6"/>
              <draw:equation draw:name="f9" draw:formula="9033040 / ?f6"/>
              <draw:equation draw:name="f10" draw:formula="0 / ?f7"/>
              <draw:equation draw:name="f11" draw:formula="787908 / ?f7"/>
            </draw:enhanced-geometry>
          </draw:custom-shape>
          <draw:custom-shape draw:name="Shape 9_1" draw:style-name="gr2" draw:text-style-name="P4" draw:layer="layout" svg:width="0.232cm" svg:height="0.003cm" svg:x="0.107cm" svg:y="11.257cm">
            <text:p/>
            <draw:enhanced-geometry svg:viewBox="0 0 75908 0" draw:text-areas="?f8 ?f10 ?f9 ?f10" draw:type="non-primitive" draw:enhanced-path="M 75908 0 L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908"/>
              <draw:equation draw:name="f7" draw:formula="?f4 / 0"/>
              <draw:equation draw:name="f8" draw:formula="0 / ?f6"/>
              <draw:equation draw:name="f9" draw:formula="75908 / ?f6"/>
              <draw:equation draw:name="f10" draw:formula="0 / ?f7"/>
            </draw:enhanced-geometry>
          </draw:custom-shape>
          <draw:frame draw:name="Picture 11_1" draw:style-name="gr3" draw:text-style-name="P5" draw:layer="layout" svg:width="27.993cm" svg:height="5.158cm" svg:x="0cm" svg:y="10.592cm">
            <draw:image xlink:href="Pictures/10000201000007D00000019789470736F9A0E07E.png" xlink:type="simple" xlink:show="embed" xlink:actuate="onLoad" draw:mime-type="image/png">
              <text:p/>
            </draw:image>
          </draw:frame>
          <draw:frame draw:name="Picture 1582_1" draw:style-name="gr3" draw:text-style-name="P5" draw:layer="layout" svg:width="28cm" svg:height="2.244cm" svg:x="0cm" svg:y="10.559cm">
            <draw:image xlink:href="Pictures/1000020100000BB800000109BBD43BE04ED92AD7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4.775cm" svg:height="3.169cm" svg:x="22.5cm" svg:y="1cm">
          <draw:image xlink:href="Pictures/10000000000000770000004FED432FE34CACC5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Sommaire</text:p>
          </draw:text-box>
        </draw:frame>
        <draw:g draw:name="Group 1630">
          <draw:custom-shape draw:name="Shape 1631_1" draw:style-name="gr1" draw:text-style-name="P3" draw:layer="layout" svg:width="13.368cm" svg:height="2.477cm" svg:x="1.632cm" svg:y="13.265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" draw:style-name="gr1" draw:text-style-name="P3" draw:layer="layout" svg:width="0.237cm" svg:height="0.059cm" svg:x="1.394cm" svg:y="13.205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" draw:style-name="gr2" draw:text-style-name="P4" draw:layer="layout" svg:width="10.15cm" svg:height="2.553cm" svg:x="1.355cm" svg:y="13.189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" draw:style-name="gr3" draw:text-style-name="P5" draw:layer="layout" svg:width="9.434cm" svg:height="2.961cm" svg:x="0.005cm" svg:y="12.773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" draw:style-name="gr3" draw:text-style-name="P5" draw:layer="layout" svg:width="9.348cm" svg:height="2.989cm" svg:x="0.005cm" svg:y="12.748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4" draw:text-style-name="P9" draw:layer="layout" svg:width="25cm" svg:height="9.226cm" svg:x="2cm" svg:y="3.748cm" presentation:class="title" presentation:user-transformed="true">
          <draw:text-box>
            <text:list text:style-name="L2">
              <text:list-header>
                <text:p text:style-name="P8"><text:span text:style-name="T2">- Contexte et problématique</text:span><text:span text:style-name="T2"><text:line-break/></text:span><text:span text:style-name="T2">- Pistes envisagées</text:span><text:span text:style-name="T2"><text:line-break/></text:span><text:span text:style-name="T2">- Données - Visualisations - Cleaning - Feature engineering</text:span><text:span text:style-name="T2"><text:line-break/></text:span><text:span text:style-name="T2">- Modélisation</text:span><text:span text:style-name="T2"><text:line-break/></text:span><text:span text:style-name="T2">- Modèle final</text:span><text:span text:style-name="T2"><text:line-break/></text:span><text:span text:style-name="T2">- Maintenance</text:span><text:span text:style-name="T2"><text:line-break/></text:span><text:span text:style-name="T2">- Conclusion</text:span><text:span text:style-name="T2"><text:line-break/></text:span><text:span text:style-name="T2"/></text:p>
              </text:list-header>
            </text:list>
          </draw:text-box>
        </draw:frame>
        <draw:frame draw:style-name="gr6" draw:text-style-name="P10" draw:layer="layout" svg:width="3.393cm" svg:height="1.187cm" svg:x="25.831cm" svg:y="14.66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Contexte et problématique</text:p>
          </draw:text-box>
        </draw:frame>
        <draw:g draw:name="Group 1630_1">
          <draw:custom-shape draw:name="Shape 1631_3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3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3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3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3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5" draw:text-style-name="P9" draw:layer="layout" svg:width="20cm" svg:height="2cm" svg:x="3cm" svg:y="4.5cm" presentation:class="title" presentation:user-transformed="true">
          <draw:text-box>
            <text:list text:style-name="L2">
              <text:list-item>
                <text:p text:style-name="P8"><text:span text:style-name="T2">Marketplace en ligne</text:span></text:p>
              </text:list-item>
            </text:list>
          </draw:text-box>
        </draw:frame>
        <draw:frame presentation:style-name="pr6" draw:text-style-name="P9" draw:layer="layout" svg:width="20cm" svg:height="2cm" svg:x="4.5cm" svg:y="6.4cm" presentation:class="title" presentation:user-transformed="true">
          <draw:text-box>
            <text:list text:style-name="L2">
              <text:list-item>
                <text:p text:style-name="P8"><text:span text:style-name="T2">Campagne de communication</text:span></text:p>
              </text:list-item>
            </text:list>
          </draw:text-box>
        </draw:frame>
        <draw:frame presentation:style-name="pr7" draw:text-style-name="P9" draw:layer="layout" svg:width="20cm" svg:height="2cm" svg:x="6cm" svg:y="8.2cm" presentation:class="title" presentation:user-transformed="true">
          <draw:text-box>
            <text:list text:style-name="L2">
              <text:list-item>
                <text:p text:style-name="P8"><text:span text:style-name="T2">Différents types d’utilisateurs</text:span></text:p>
              </text:list-item>
            </text:list>
          </draw:text-box>
        </draw:frame>
        <draw:frame presentation:style-name="pr8" draw:text-style-name="P9" draw:layer="layout" svg:width="20cm" svg:height="2cm" svg:x="7.5cm" svg:y="10.1cm" presentation:class="title" presentation:user-transformed="true">
          <draw:text-box>
            <text:list text:style-name="L2">
              <text:list-item>
                <text:p text:style-name="P8"><text:span text:style-name="T2">Segments actionnables</text:span></text:p>
              </text:list-item>
            </text:list>
          </draw:text-box>
        </draw:frame>
        <draw:frame draw:style-name="gr6" draw:text-style-name="P10" draw:layer="layout" svg:width="3.393cm" svg:height="1.187cm" svg:x="25.831cm" svg:y="14.66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Pistes envisagées</text:p>
          </draw:text-box>
        </draw:frame>
        <draw:g draw:name="Group 1630_0">
          <draw:custom-shape draw:name="Shape 1631_2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9" draw:text-style-name="P9" draw:layer="layout" svg:width="5.5cm" svg:height="2cm" svg:x="5.4cm" svg:y="4.5cm" presentation:class="title" presentation:user-transformed="true">
          <draw:text-box>
            <text:list text:style-name="L2">
              <text:list-header>
                <text:p text:style-name="P8"><text:span text:style-name="T2">RFM</text:span></text:p>
              </text:list-header>
            </text:list>
          </draw:text-box>
        </draw:frame>
        <draw:frame presentation:style-name="pr10" draw:text-style-name="P9" draw:layer="layout" svg:width="11cm" svg:height="3.076cm" svg:x="5.5cm" svg:y="8.5cm" presentation:class="title" presentation:user-transformed="true">
          <draw:text-box>
            <text:list text:style-name="L2">
              <text:list-header>
                <text:p text:style-name="P8"><text:span text:style-name="T2">RFM</text:span><text:span text:style-name="T2"><text:line-break/></text:span><text:span text:style-name="T2">+ autres caractéristiques</text:span></text:p>
              </text:list-header>
            </text:list>
          </draw:text-box>
        </draw:frame>
        <draw:frame presentation:style-name="pr11" draw:text-style-name="P9" draw:layer="layout" svg:width="8cm" svg:height="2cm" svg:x="14cm" svg:y="5.9cm" presentation:class="title" presentation:user-transformed="true">
          <draw:text-box>
            <text:list text:style-name="L2">
              <text:list-header>
                <text:p text:style-name="P8"><text:span text:style-name="T2">Machine learning</text:span></text:p>
              </text:list-header>
            </text:list>
          </draw:text-box>
        </draw:frame>
        <draw:frame draw:style-name="gr6" draw:text-style-name="P10" draw:layer="layout" svg:width="3.393cm" svg:height="1.187cm" svg:x="25.831cm" svg:y="14.664cm">
          <draw:text-box>
            <text:p><text:page-number>&lt;numéro&gt;</text:page-number></text:p>
          </draw:text-box>
        </draw:frame>
        <draw:line draw:style-name="gr7" draw:text-style-name="P6" draw:layer="layout" svg:x1="9cm" svg:y1="9cm" svg:x2="14cm" svg:y2="7.5cm">
          <text:p/>
        </draw:line>
        <draw:line draw:style-name="gr7" draw:text-style-name="P6" draw:layer="layout" svg:x1="14cm" svg:y1="6.5cm" svg:x2="9cm" svg:y2="6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Les données</text:p>
          </draw:text-box>
        </draw:frame>
        <draw:g draw:name="Group 1630_2">
          <draw:custom-shape draw:name="Shape 1631_4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4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4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4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4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17.2cm" svg:height="10.65cm" svg:x="5.8cm" svg:y="3.13cm">
          <draw:image xlink:href="Pictures/10000201000009B6000005D81E84DCA191BA7925.png" xlink:type="simple" xlink:show="embed" xlink:actuate="onLoad" draw:mime-type="image/png">
            <text:p/>
          </draw:image>
        </draw:frame>
        <draw:frame draw:style-name="gr6" draw:text-style-name="P10" draw:layer="layout" svg:width="3.393cm" svg:height="1.187cm" svg:x="25.831cm" svg:y="14.66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Les données</text:p>
          </draw:text-box>
        </draw:frame>
        <draw:g draw:name="Group 1630_3">
          <draw:custom-shape draw:name="Shape 1631_5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5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5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5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5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17.2cm" svg:height="10.696cm" svg:x="5.8cm" svg:y="3.131cm">
          <draw:image xlink:href="Pictures/10000000000009B6000005E2A546E1F75529450F.png" xlink:type="simple" xlink:show="embed" xlink:actuate="onLoad" draw:mime-type="image/png">
            <text:p/>
          </draw:image>
        </draw:frame>
        <draw:frame draw:style-name="gr6" draw:text-style-name="P10" draw:layer="layout" svg:width="3.393cm" svg:height="1.187cm" svg:x="25.831cm" svg:y="14.66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Les données</text:p>
          </draw:text-box>
        </draw:frame>
        <draw:g draw:name="Group 1630_5">
          <draw:custom-shape draw:name="Shape 1631_7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7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7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7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7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6" draw:text-style-name="P10" draw:layer="layout" svg:width="3.393cm" svg:height="1.187cm" svg:x="25.831cm" svg:y="14.664cm">
          <draw:text-box>
            <text:p><text:page-number>&lt;numéro&gt;</text:page-number></text:p>
          </draw:text-box>
        </draw:frame>
        <draw:frame draw:style-name="gr4" draw:text-style-name="P6" draw:layer="layout" svg:width="17.2cm" svg:height="10.65cm" svg:x="5.8cm" svg:y="3.13cm">
          <draw:image xlink:href="Pictures/10000000000009B4000005DA481A117AA54EF7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Les données</text:p>
          </draw:text-box>
        </draw:frame>
        <draw:g draw:name="Group 1630_6">
          <draw:custom-shape draw:name="Shape 1631_8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8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8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8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8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6" draw:text-style-name="P10" draw:layer="layout" svg:width="3.393cm" svg:height="1.187cm" svg:x="25.831cm" svg:y="14.664cm">
          <draw:text-box>
            <text:p><text:page-number>&lt;numéro&gt;</text:page-number></text:p>
          </draw:text-box>
        </draw:frame>
        <draw:frame draw:style-name="gr4" draw:text-style-name="P6" draw:layer="layout" svg:width="17.2cm" svg:height="10.65cm" svg:x="5.8cm" svg:y="3.13cm">
          <draw:image xlink:href="Pictures/10000000000009B6000005D6E437A2F2A8DC724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Les données</text:p>
          </draw:text-box>
        </draw:frame>
        <draw:g draw:name="Group 1630_4">
          <draw:custom-shape draw:name="Shape 1631_6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6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6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6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6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23.472cm" svg:height="8.29cm" svg:x="3.054cm" svg:y="4.11cm">
          <draw:image xlink:href="Pictures/100000000000038A000001400824C94F03BE845F.png" xlink:type="simple" xlink:show="embed" xlink:actuate="onLoad" draw:mime-type="image/png">
            <text:p/>
          </draw:image>
        </draw:frame>
        <draw:frame draw:style-name="gr6" draw:text-style-name="P10" draw:layer="layout" svg:width="3.393cm" svg:height="1.187cm" svg:x="25.831cm" svg:y="14.66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Visualisations</text:p>
          </draw:text-box>
        </draw:frame>
        <draw:g draw:name="Group 1630_12">
          <draw:custom-shape draw:name="Shape 1631_14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4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4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4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4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12.7cm" svg:height="9.073cm" svg:x="0.8cm" svg:y="3.6cm">
          <draw:image xlink:href="Pictures/10000000000001EF000001813B33DC91D7CCEC9C.png" xlink:type="simple" xlink:show="embed" xlink:actuate="onLoad" draw:mime-type="image/png">
            <text:p/>
          </draw:image>
        </draw:frame>
        <draw:frame draw:style-name="gr4" draw:text-style-name="P6" draw:layer="layout" svg:width="12.5cm" svg:height="10.547cm" svg:x="14.2cm" svg:y="3.764cm">
          <draw:image xlink:href="Pictures/10000000000001EF000001C6AE158DD6E002E6E9.png" xlink:type="simple" xlink:show="embed" xlink:actuate="onLoad" draw:mime-type="image/png">
            <text:p/>
          </draw:image>
        </draw:frame>
        <draw:frame draw:style-name="gr6" draw:text-style-name="P10" draw:layer="layout" svg:width="3.393cm" svg:height="1.187cm" svg:x="25.531cm" svg:y="14.66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2">Visualisations</text:p>
          </draw:text-box>
        </draw:frame>
        <draw:frame draw:style-name="gr4" draw:text-style-name="P6" draw:layer="layout" svg:width="22cm" svg:height="12.24cm" svg:x="3cm" svg:y="2.76cm">
          <draw:image xlink:href="Pictures/100000000000049B00000290C16BF6C67D869B16.png" xlink:type="simple" xlink:show="embed" xlink:actuate="onLoad" draw:mime-type="image/png">
            <text:p/>
          </draw:image>
        </draw:frame>
        <draw:g draw:name="Group 1630_13">
          <draw:custom-shape draw:name="Shape 1631_15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5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5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5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5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2">Visualisations</text:p>
          </draw:text-box>
        </draw:frame>
        <draw:g draw:name="Group 1630_14">
          <draw:custom-shape draw:name="Shape 1631_16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6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6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6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6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13.6cm" svg:height="9.3cm" svg:x="0.3cm" svg:y="3.2cm">
          <draw:image xlink:href="Pictures/10000000000001FD00000158B650A61821EC477A.png" xlink:type="simple" xlink:show="embed" xlink:actuate="onLoad" draw:mime-type="image/png">
            <text:p/>
          </draw:image>
        </draw:frame>
        <draw:frame draw:style-name="gr4" draw:text-style-name="P6" draw:layer="layout" svg:width="13.4cm" svg:height="9.243cm" svg:x="13.9cm" svg:y="3.257cm">
          <draw:image xlink:href="Pictures/100000000000020300000157A14234AF7F2F0B16.png" xlink:type="simple" xlink:show="embed" xlink:actuate="onLoad" draw:mime-type="image/png">
            <text:p/>
          </draw:image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2">Visualisations</text:p>
          </draw:text-box>
        </draw:frame>
        <draw:g draw:name="Group 1630_16">
          <draw:custom-shape draw:name="Shape 1631_18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8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8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8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8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9cm" svg:height="9.5cm" svg:x="9cm" svg:y="3cm">
          <draw:image xlink:href="Pictures/10000000000001FD00000159B87200B9DBC16A90.png" xlink:type="simple" xlink:show="embed" xlink:actuate="onLoad" draw:mime-type="image/png">
            <text:p/>
          </draw:image>
        </draw:frame>
        <draw:frame draw:style-name="gr4" draw:text-style-name="P6" draw:layer="layout" svg:width="8.365cm" svg:height="9.365cm" svg:x="0.635cm" svg:y="3cm">
          <draw:image xlink:href="Pictures/100000000000015C0000015C093D11CDAF98931E.png" xlink:type="simple" xlink:show="embed" xlink:actuate="onLoad" draw:mime-type="image/png">
            <text:p/>
          </draw:image>
        </draw:frame>
        <draw:frame draw:style-name="gr4" draw:text-style-name="P6" draw:layer="layout" svg:width="8.5cm" svg:height="10cm" svg:x="18.5cm" svg:y="2.6cm">
          <draw:image xlink:href="Pictures/10000000000001F800000167F466A2516682443A.png" xlink:type="simple" xlink:show="embed" xlink:actuate="onLoad" draw:mime-type="image/png">
            <text:p/>
          </draw:image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Cleaning</text:p>
          </draw:text-box>
        </draw:frame>
        <draw:g draw:name="Group 1630_11">
          <draw:custom-shape draw:name="Shape 1631_13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3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3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3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3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12" draw:text-style-name="P9" draw:layer="layout" svg:width="20cm" svg:height="2cm" svg:x="3.5cm" svg:y="3.6cm" presentation:class="title" presentation:user-transformed="true">
          <draw:text-box>
            <text:list text:style-name="L2">
              <text:list-header>
                <text:p text:style-name="P8"><text:span text:style-name="T2">Commandes : statut « delivered »</text:span></text:p>
              </text:list-header>
            </text:list>
          </draw:text-box>
        </draw:frame>
        <draw:frame presentation:style-name="pr13" draw:text-style-name="P9" draw:layer="layout" svg:width="20cm" svg:height="2cm" svg:x="3.5cm" svg:y="5.4cm" presentation:class="title" presentation:user-transformed="true">
          <draw:text-box>
            <text:list text:style-name="L2">
              <text:list-header>
                <text:p text:style-name="P8"><text:span text:style-name="T2">Commandes sans lignes</text:span></text:p>
              </text:list-header>
            </text:list>
          </draw:text-box>
        </draw:frame>
        <draw:frame presentation:style-name="pr14" draw:text-style-name="P9" draw:layer="layout" svg:width="22.5cm" svg:height="2.051cm" svg:x="3.5cm" svg:y="7.175cm" presentation:class="title" presentation:user-transformed="true">
          <draw:text-box>
            <text:list text:style-name="L2">
              <text:list-header>
                <text:p text:style-name="P8"><text:span text:style-name="T2">Valeurs nulles : aucune sur les colonnes utilisées</text:span></text:p>
              </text:list-header>
            </text:list>
          </draw:text-box>
        </draw:frame>
        <draw:frame presentation:style-name="pr15" draw:text-style-name="P9" draw:layer="layout" svg:width="22.5cm" svg:height="2.051cm" svg:x="3.5cm" svg:y="8.976cm" presentation:class="title" presentation:user-transformed="true">
          <draw:text-box>
            <text:list text:style-name="L2">
              <text:list-header>
                <text:p text:style-name="P8"><text:span text:style-name="T2">Doublons : sans</text:span></text:p>
              </text:list-header>
            </text:list>
          </draw:text-box>
        </draw:frame>
        <draw:frame presentation:style-name="pr16" draw:text-style-name="P9" draw:layer="layout" svg:width="22.5cm" svg:height="2.051cm" svg:x="3.5cm" svg:y="10.877cm" presentation:class="title" presentation:user-transformed="true">
          <draw:text-box>
            <text:list text:style-name="L2">
              <text:list-header>
                <text:p text:style-name="P8"><text:span text:style-name="T2">Outliers : paiements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Feature engineering</text:p>
          </draw:text-box>
        </draw:frame>
        <draw:g draw:name="Group 1630_7">
          <draw:custom-shape draw:name="Shape 1631_9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9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9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9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9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17" draw:text-style-name="P9" draw:layer="layout" svg:width="20cm" svg:height="2cm" svg:x="3.5cm" svg:y="4.5cm" presentation:class="title" presentation:user-transformed="true">
          <draw:text-box>
            <text:list text:style-name="L2">
              <text:list-header>
                <text:p text:style-name="P8"><text:span text:style-name="T2">Recency : date plus récente – date achat</text:span></text:p>
              </text:list-header>
            </text:list>
          </draw:text-box>
        </draw:frame>
        <draw:frame presentation:style-name="pr18" draw:text-style-name="P9" draw:layer="layout" svg:width="20cm" svg:height="2cm" svg:x="3.5cm" svg:y="6.5cm" presentation:class="title" presentation:user-transformed="true">
          <draw:text-box>
            <text:list text:style-name="L2">
              <text:list-header>
                <text:p text:style-name="P8"><text:span text:style-name="T2">Frequency : nombre de produits achetés </text:span></text:p>
              </text:list-header>
            </text:list>
          </draw:text-box>
        </draw:frame>
        <draw:frame presentation:style-name="pr19" draw:text-style-name="P9" draw:layer="layout" svg:width="20cm" svg:height="2cm" svg:x="3.5cm" svg:y="8.6cm" presentation:class="title" presentation:user-transformed="true">
          <draw:text-box>
            <text:list text:style-name="L2">
              <text:list-header>
                <text:p text:style-name="P8"><text:span text:style-name="T2">Monetary value : somme des paiements</text:span></text:p>
              </text:list-header>
            </text:list>
          </draw:text-box>
        </draw:frame>
        <draw:frame presentation:style-name="pr20" draw:text-style-name="P13" draw:layer="layout" svg:width="5.9cm" svg:height="2.051cm" svg:x="12.3cm" svg:y="12.122cm" presentation:class="title" presentation:user-transformed="true">
          <draw:text-box>
            <text:list text:style-name="L2">
              <text:list-header>
                <text:p text:style-name="P8"><text:span text:style-name="T3">RFM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Feature engineering</text:p>
          </draw:text-box>
        </draw:frame>
        <draw:g draw:name="Group 1630_10">
          <draw:custom-shape draw:name="Shape 1631_12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2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2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2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2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23.045cm" svg:height="8.5cm" svg:x="2.355cm" svg:y="3.6cm">
          <draw:image xlink:href="Pictures/10000000000003840000014C4910E32BE3BBFD80.png" xlink:type="simple" xlink:show="embed" xlink:actuate="onLoad" draw:mime-type="image/png">
            <text:p/>
          </draw:image>
        </draw:frame>
        <draw:frame presentation:style-name="pr21" draw:text-style-name="P13" draw:layer="layout" svg:width="5.9cm" svg:height="2.051cm" svg:x="11.5cm" svg:y="12.5cm" presentation:class="title" presentation:user-transformed="true">
          <draw:text-box>
            <text:list text:style-name="L2">
              <text:list-header>
                <text:p text:style-name="P8"><text:span text:style-name="T3">Frequency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Feature engineering</text:p>
          </draw:text-box>
        </draw:frame>
        <draw:g draw:name="Group 1630_9">
          <draw:custom-shape draw:name="Shape 1631_11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1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1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1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1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7.114cm" svg:height="4.3cm" svg:x="10.186cm" svg:y="10.3cm">
          <draw:image xlink:href="Pictures/10000000000001D0000001579E765E59C9415A35.png" xlink:type="simple" xlink:show="embed" xlink:actuate="onLoad" draw:mime-type="image/png">
            <text:p/>
          </draw:image>
        </draw:frame>
        <draw:frame draw:style-name="gr4" draw:text-style-name="P6" draw:layer="layout" svg:width="10.535cm" svg:height="7.419cm" svg:x="7.865cm" svg:y="2.987cm">
          <draw:image xlink:href="Pictures/10000000000001E700000157ACC110ABE6339A61.png" xlink:type="simple" xlink:show="embed" xlink:actuate="onLoad" draw:mime-type="image/png">
            <text:p/>
          </draw:image>
        </draw:frame>
        <draw:frame draw:style-name="gr8" draw:text-style-name="P14" draw:layer="layout" svg:width="4.545cm" svg:height="0.963cm" svg:x="13.555cm" svg:y="10.373cm">
          <draw:text-box>
            <text:p><text:span text:style-name="T4">[-110.5, 349.5]</text:span></text:p>
          </draw:text-box>
        </draw:frame>
        <draw:frame draw:style-name="gr4" draw:text-style-name="P6" draw:layer="layout" svg:width="7.365cm" svg:height="7.365cm" svg:x="0.3cm" svg:y="4.835cm">
          <draw:image xlink:href="Pictures/100000000000015C0000015CC591DAD9B00CA183.png" xlink:type="simple" xlink:show="embed" xlink:actuate="onLoad" draw:mime-type="image/png">
            <text:p/>
          </draw:image>
        </draw:frame>
        <draw:frame draw:style-name="gr4" draw:text-style-name="P6" draw:layer="layout" svg:width="7.365cm" svg:height="7.365cm" svg:x="19.635cm" svg:y="5.1cm">
          <draw:image xlink:href="Pictures/100000000000015C0000015C48CEE529DC89ADA2.png" xlink:type="simple" xlink:show="embed" xlink:actuate="onLoad" draw:mime-type="image/png">
            <text:p/>
          </draw:image>
        </draw:frame>
        <draw:frame presentation:style-name="pr22" draw:text-style-name="P13" draw:layer="layout" svg:width="5cm" svg:height="2cm" svg:x="20.6cm" svg:y="13cm" presentation:class="title" presentation:user-transformed="true">
          <draw:text-box>
            <text:list text:style-name="L2">
              <text:list-header>
                <text:p text:style-name="P8"><text:span text:style-name="T3">Monetary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Feature engineering</text:p>
          </draw:text-box>
        </draw:frame>
        <draw:g draw:name="Group 1630_8">
          <draw:custom-shape draw:name="Shape 1631_10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0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0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0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0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23" draw:text-style-name="P9" draw:layer="layout" svg:width="23cm" svg:height="2.051cm" svg:x="3.5cm" svg:y="4.475cm" presentation:class="title" presentation:user-transformed="true">
          <draw:text-box>
            <text:list text:style-name="L2">
              <text:list-header>
                <text:p text:style-name="P8"><text:span text:style-name="T2">Review score: moyenne par commande puis client</text:span></text:p>
              </text:list-header>
            </text:list>
          </draw:text-box>
        </draw:frame>
        <draw:frame presentation:style-name="pr24" draw:text-style-name="P9" draw:layer="layout" svg:width="23cm" svg:height="3.076cm" svg:x="3.5cm" svg:y="7.163cm" presentation:class="title" presentation:user-transformed="true">
          <draw:text-box>
            <text:list text:style-name="L2">
              <text:list-header>
                <text:p text:style-name="P8"><text:span text:style-name="T2">Délai de livraison: nombre de jours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date commande / date livraison </text:span></text:p>
              </text:list-header>
            </text:list>
          </draw:text-box>
        </draw:frame>
        <draw:frame presentation:style-name="pr25" draw:text-style-name="P9" draw:layer="layout" svg:width="20cm" svg:height="2cm" svg:x="3.5cm" svg:y="10.6cm" presentation:class="title" presentation:user-transformed="true">
          <draw:text-box>
            <text:list text:style-name="L2">
              <text:list-header>
                <text:p text:style-name="P8"><text:span text:style-name="T2">Heure d’achat</text:span></text:p>
              </text:list-header>
            </text:list>
          </draw:text-box>
        </draw:frame>
        <draw:frame presentation:style-name="pr26" draw:text-style-name="P13" draw:layer="layout" svg:width="5.9cm" svg:height="2.051cm" svg:x="18.1cm" svg:y="12.449cm" presentation:class="title" presentation:user-transformed="true">
          <draw:text-box>
            <text:list text:style-name="L2">
              <text:list-header>
                <text:p text:style-name="P8"><text:span text:style-name="T3">RFM+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élisation</text:p>
          </draw:text-box>
        </draw:frame>
        <draw:g draw:name="Group 1630_15">
          <draw:custom-shape draw:name="Shape 1631_17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7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7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7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7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9" draw:text-style-name="P15" draw:layer="layout" svg:width="4cm" svg:height="4.027cm" svg:x="2cm" svg:y="7.473cm">
          <draw:text-box>
            <text:p><text:span text:style-name="T5">RFM</text:span></text:p>
            <text:p><text:span text:style-name="T5"/></text:p>
            <text:p><text:span text:style-name="T5">RFM+</text:span></text:p>
            <text:p><text:span text:style-name="T5"/></text:p>
          </draw:text-box>
        </draw:frame>
        <draw:frame draw:style-name="gr4" draw:text-style-name="P6" draw:layer="layout" svg:width="4.087cm" svg:height="2.957cm" svg:x="8.713cm" svg:y="11.543cm">
          <draw:image xlink:href="Pictures/1000000000000108000000BFF95658377D3F048A.png" xlink:type="simple" xlink:show="embed" xlink:actuate="onLoad" draw:mime-type="image/png">
            <text:p/>
          </draw:image>
        </draw:frame>
        <draw:frame draw:style-name="gr4" draw:text-style-name="P6" draw:layer="layout" svg:width="4.843cm" svg:height="3.182cm" svg:x="8.157cm" svg:y="6.618cm">
          <draw:image xlink:href="Pictures/1000000000000115000000B6DC0202E8ECF6E7FD.png" xlink:type="simple" xlink:show="embed" xlink:actuate="onLoad" draw:mime-type="image/png">
            <text:p/>
          </draw:image>
        </draw:frame>
        <draw:frame draw:style-name="gr10" draw:text-style-name="P16" draw:layer="layout" svg:width="3.5cm" svg:height="1.673cm" svg:x="8.8cm" svg:y="5.417cm">
          <draw:text-box>
            <text:p><text:span text:style-name="T6">KMeans</text:span></text:p>
          </draw:text-box>
        </draw:frame>
        <draw:frame draw:style-name="gr11" draw:text-style-name="P16" draw:layer="layout" svg:width="4cm" svg:height="1cm" svg:x="9cm" svg:y="10.2cm">
          <draw:text-box>
            <text:p><text:span text:style-name="T6">DBScan</text:span></text:p>
          </draw:text-box>
        </draw:frame>
        <draw:frame draw:style-name="gr12" draw:text-style-name="P17" draw:layer="layout" svg:width="10.903cm" svg:height="1.901cm" draw:transform="rotate (1.57638138040128) translate (14.032cm 14.408cm)">
          <draw:text-box>
            <text:p><text:span text:style-name="T7">------- Clusters -------</text:span></text:p>
          </draw:text-box>
        </draw:frame>
        <draw:frame draw:style-name="gr4" draw:text-style-name="P6" draw:layer="layout" svg:width="5.5cm" svg:height="6cm" svg:x="16.033cm" svg:y="6cm">
          <draw:image xlink:href="Pictures/100000000000010F000000BAA4975F6EDC1DA7E1.png" xlink:type="simple" xlink:show="embed" xlink:actuate="onLoad" draw:mime-type="image/png">
            <text:p/>
          </draw:image>
        </draw:frame>
        <draw:frame draw:style-name="gr4" draw:text-style-name="P6" draw:layer="layout" svg:width="4.762cm" svg:height="4.762cm" svg:x="22.238cm" svg:y="5.501cm">
          <draw:image xlink:href="Pictures/10000000000000E1000000E10F6130F9AF46E2D3.png" xlink:type="simple" xlink:show="embed" xlink:actuate="onLoad" draw:mime-type="image/png">
            <text:p/>
          </draw:image>
        </draw:frame>
        <draw:frame draw:style-name="gr10" draw:text-style-name="P16" draw:layer="layout" svg:width="3.5cm" svg:height="1.673cm" svg:x="2cm" svg:y="3.827cm">
          <draw:text-box>
            <text:p><text:span text:style-name="T6">Données</text:span></text:p>
          </draw:text-box>
        </draw:frame>
        <draw:frame draw:style-name="gr13" draw:text-style-name="P16" draw:layer="layout" svg:width="4.3cm" svg:height="0.962cm" svg:x="8.7cm" svg:y="3.828cm">
          <draw:text-box>
            <text:p><text:span text:style-name="T6">Algorithmes</text:span></text:p>
          </draw:text-box>
        </draw:frame>
        <draw:frame draw:style-name="gr10" draw:text-style-name="P16" draw:layer="layout" svg:width="3.9cm" svg:height="1.673cm" svg:x="16.9cm" svg:y="3.827cm">
          <draw:text-box>
            <text:p><text:span text:style-name="T6">Evaluation</text:span></text:p>
          </draw:text-box>
        </draw:frame>
        <draw:frame draw:style-name="gr12" draw:text-style-name="P16" draw:layer="layout" svg:width="5.606cm" svg:height="1.901cm" draw:transform="rotate (1.57638138040128) translate (5.332cm 11.308cm)">
          <draw:text-box>
            <text:p><text:span text:style-name="T6">Preprocessing</text:span></text:p>
          </draw:text-box>
        </draw:frame>
        <draw:frame draw:style-name="gr10" draw:text-style-name="P16" draw:layer="layout" svg:width="4.7cm" svg:height="1.673cm" svg:x="22.6cm" svg:y="3.828cm">
          <draw:text-box>
            <text:p><text:span text:style-name="T6">Visualisation</text:span></text:p>
          </draw:text-box>
        </draw:frame>
        <draw:frame draw:style-name="gr4" draw:text-style-name="P6" draw:layer="layout" svg:width="4cm" svg:height="4.233cm" svg:x="23cm" svg:y="10.5cm">
          <draw:image xlink:href="Pictures/10000000000001F800000157A37F36EF185BF915.png" xlink:type="simple" xlink:show="embed" xlink:actuate="onLoad" draw:mime-type="image/png">
            <text:p/>
          </draw:image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élisation</text:p>
          </draw:text-box>
        </draw:frame>
        <draw:g draw:name="Group 1630_17">
          <draw:custom-shape draw:name="Shape 1631_19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19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19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19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19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9.365cm" svg:height="10.5cm" svg:x="8.935cm" svg:y="3.5cm">
          <draw:image xlink:href="Pictures/1000000000000352000003B92F0CE8289B75CB95.png" xlink:type="simple" xlink:show="embed" xlink:actuate="onLoad" draw:mime-type="image/png">
            <text:p/>
          </draw:image>
        </draw:frame>
        <draw:frame presentation:style-name="pr27" draw:text-style-name="P13" draw:layer="layout" svg:width="5.9cm" svg:height="2.051cm" svg:x="1.7cm" svg:y="6.449cm" presentation:class="title" presentation:user-transformed="true">
          <draw:text-box>
            <text:list text:style-name="L2">
              <text:list-header>
                <text:p text:style-name="P8"><text:span text:style-name="T3">KMeans</text:span></text:p>
              </text:list-header>
            </text:list>
          </draw:text-box>
        </draw:frame>
        <draw:frame presentation:style-name="pr28" draw:text-style-name="P18" draw:layer="layout" svg:width="5.9cm" svg:height="3.936cm" svg:x="20.7cm" svg:y="5.78cm" presentation:class="title" presentation:user-transformed="true">
          <draw:text-box>
            <text:list text:style-name="L2">
              <text:list-header>
                <text:p text:style-name="P8"><text:span text:style-name="T8">Principaux paramètres :</text:span><text:span text:style-name="T8"><text:line-break/></text:span><text:span text:style-name="T8"><text:line-break/></text:span><text:span text:style-name="T8">- n_clusters</text:span><text:span text:style-name="T8"><text:line-break/></text:span><text:span text:style-name="T8">- init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élisation</text:p>
          </draw:text-box>
        </draw:frame>
        <draw:g draw:name="Group 1630_18">
          <draw:custom-shape draw:name="Shape 1631_20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0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0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0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0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29" draw:text-style-name="P13" draw:layer="layout" svg:width="5.9cm" svg:height="2.051cm" svg:x="1.7cm" svg:y="6.449cm" presentation:class="title" presentation:user-transformed="true">
          <draw:text-box>
            <text:list text:style-name="L2">
              <text:list-header>
                <text:p text:style-name="P8"><text:span text:style-name="T3">DBScan</text:span></text:p>
              </text:list-header>
            </text:list>
          </draw:text-box>
        </draw:frame>
        <draw:frame presentation:style-name="pr30" draw:text-style-name="P18" draw:layer="layout" svg:width="5.9cm" svg:height="3.936cm" svg:x="20.7cm" svg:y="5.78cm" presentation:class="title" presentation:user-transformed="true">
          <draw:text-box>
            <text:list text:style-name="L2">
              <text:list-header>
                <text:p text:style-name="P8"><text:span text:style-name="T8">Principaux paramètres :</text:span><text:span text:style-name="T8"><text:line-break/></text:span><text:span text:style-name="T8"><text:line-break/></text:span><text:span text:style-name="T8">- epsilon</text:span><text:span text:style-name="T8"><text:line-break/></text:span><text:span text:style-name="T8">- min_samples</text:span></text:p>
              </text:list-header>
            </text:list>
          </draw:text-box>
        </draw:frame>
        <draw:frame draw:style-name="gr4" draw:text-style-name="P6" draw:layer="layout" svg:width="9.143cm" svg:height="8.868cm" svg:x="9.471cm" svg:y="3.463cm">
          <draw:image xlink:href="Pictures/10000000000001B0000001A30F1FF5BFD181BDBE.png" xlink:type="simple" xlink:show="embed" xlink:actuate="onLoad" draw:mime-type="image/png">
            <text:p/>
          </draw:image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élisation</text:p>
          </draw:text-box>
        </draw:frame>
        <draw:g draw:name="Group 1630_19">
          <draw:custom-shape draw:name="Shape 1631_21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1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1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1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1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31" draw:text-style-name="P13" draw:layer="layout" svg:width="7.5cm" svg:height="2.051cm" svg:x="7.7cm" svg:y="12.149cm" presentation:class="title" presentation:user-transformed="true">
          <draw:text-box>
            <text:list text:style-name="L2">
              <text:list-header>
                <text:p text:style-name="P8"><text:span text:style-name="T3">Kmeans - RFM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draw:frame draw:style-name="gr4" draw:text-style-name="P6" draw:layer="layout" svg:width="10.434cm" svg:height="10.307cm" svg:x="15.266cm" svg:y="2.7cm">
          <draw:image xlink:href="Pictures/10000000000001ED000001E71929CC127EE813D4.png" xlink:type="simple" xlink:show="embed" xlink:actuate="onLoad" draw:mime-type="image/png">
            <text:p/>
          </draw:image>
        </draw:frame>
        <draw:frame draw:style-name="gr4" draw:text-style-name="P6" draw:layer="layout" svg:width="11.805cm" svg:height="8.273cm" svg:x="2.195cm" svg:y="3.327cm">
          <draw:image xlink:href="Pictures/100000000000025D000001A8DA8E7A56E0CFF79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élisation</text:p>
          </draw:text-box>
        </draw:frame>
        <draw:g draw:name="Group 1630_20">
          <draw:custom-shape draw:name="Shape 1631_22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2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2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2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2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32" draw:text-style-name="P13" draw:layer="layout" svg:width="7.5cm" svg:height="2.051cm" svg:x="12.5cm" svg:y="12.5cm" presentation:class="title" presentation:user-transformed="true">
          <draw:text-box>
            <text:list text:style-name="L2">
              <text:list-header>
                <text:p text:style-name="P8"><text:span text:style-name="T3">DBScan - RFM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draw:frame draw:style-name="gr4" draw:text-style-name="P6" draw:layer="layout" svg:width="17.706cm" svg:height="7.97cm" svg:x="0.976cm" svg:y="3.83cm">
          <draw:image xlink:href="Pictures/100000000000046E000001C129A2AEFDF556585C.png" xlink:type="simple" xlink:show="embed" xlink:actuate="onLoad" draw:mime-type="image/png">
            <text:p/>
          </draw:image>
        </draw:frame>
        <draw:frame draw:style-name="gr4" draw:text-style-name="P6" draw:layer="layout" svg:width="9.233cm" svg:height="7.67cm" svg:x="18.682cm" svg:y="3.83cm">
          <draw:image xlink:href="Pictures/100000000000023D000001C3F3F059BC266797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élisation</text:p>
          </draw:text-box>
        </draw:frame>
        <draw:g draw:name="Group 1630_21">
          <draw:custom-shape draw:name="Shape 1631_23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3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3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3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3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33" draw:text-style-name="P13" draw:layer="layout" svg:width="7.5cm" svg:height="2.051cm" svg:x="6.4cm" svg:y="11.722cm" presentation:class="title" presentation:user-transformed="true">
          <draw:text-box>
            <text:list text:style-name="L2">
              <text:list-header>
                <text:p text:style-name="P8"><text:span text:style-name="T3">KMeans - RFM+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draw:frame draw:style-name="gr4" draw:text-style-name="P6" draw:layer="layout" svg:width="11.544cm" svg:height="7.905cm" svg:x="2.456cm" svg:y="3.5cm">
          <draw:image xlink:href="Pictures/1000000000000271000001AC1A47438462ECCC8A.png" xlink:type="simple" xlink:show="embed" xlink:actuate="onLoad" draw:mime-type="image/png">
            <text:p/>
          </draw:image>
        </draw:frame>
        <draw:frame draw:style-name="gr4" draw:text-style-name="P6" draw:layer="layout" svg:width="10.371cm" svg:height="10.328cm" svg:x="15.1cm" svg:y="2.872cm">
          <draw:image xlink:href="Pictures/10000000000001EA000001E8BEF73FB3EF4D7B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élisation</text:p>
          </draw:text-box>
        </draw:frame>
        <draw:g draw:name="Group 1630_22">
          <draw:custom-shape draw:name="Shape 1631_24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4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4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4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4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34" draw:text-style-name="P13" draw:layer="layout" svg:width="7.5cm" svg:height="2.051cm" svg:x="16.5cm" svg:y="11.949cm" presentation:class="title" presentation:user-transformed="true">
          <draw:text-box>
            <text:list text:style-name="L2">
              <text:list-header>
                <text:p text:style-name="P8"><text:span text:style-name="T3">DBScan - RFM+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draw:frame draw:style-name="gr4" draw:text-style-name="P6" draw:layer="layout" svg:width="18.15cm" svg:height="7.48cm" svg:x="0.15cm" svg:y="3.9cm">
          <draw:image xlink:href="Pictures/1000000000000480000001C2DB0A502BDEE81761.png" xlink:type="simple" xlink:show="embed" xlink:actuate="onLoad" draw:mime-type="image/png">
            <text:p/>
          </draw:image>
        </draw:frame>
        <draw:frame draw:style-name="gr4" draw:text-style-name="P6" draw:layer="layout" svg:width="9.472cm" svg:height="7.5cm" svg:x="18.3cm" svg:y="3.9cm">
          <draw:image xlink:href="Pictures/1000000000000254000001BE0EA64233FB505FA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èle final</text:p>
          </draw:text-box>
        </draw:frame>
        <draw:g draw:name="Group 1630_24">
          <draw:custom-shape draw:name="Shape 1631_26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6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6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6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6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35" draw:text-style-name="P13" draw:layer="layout" svg:width="10cm" svg:height="2.051cm" svg:x="9.2cm" svg:y="12.973cm" presentation:class="title" presentation:user-transformed="true">
          <draw:text-box>
            <text:list text:style-name="L2">
              <text:list-header>
                <text:p text:style-name="P8"><text:span text:style-name="T3">Visualisation - tsne</text:span></text:p>
              </text:list-header>
            </text:list>
          </draw:text-box>
        </draw:frame>
        <draw:frame draw:style-name="gr14" draw:text-style-name="P19" draw:layer="layout" svg:width="3.393cm" svg:height="1.187cm" svg:x="25.531cm" svg:y="14.665cm">
          <draw:text-box>
            <text:p><text:span text:style-name="T9"><text:page-number>&lt;numéro&gt;</text:page-number></text:span></text:p>
          </draw:text-box>
        </draw:frame>
        <draw:frame draw:style-name="gr4" draw:text-style-name="P6" draw:layer="layout" svg:width="15.898cm" svg:height="10.975cm" svg:x="5.502cm" svg:y="2.6cm">
          <draw:image xlink:href="Pictures/1000000000000279000001B50E7B1A07F31FE179.png" xlink:type="simple" xlink:show="embed" xlink:actuate="onLoad" draw:mime-type="image/png">
            <text:p/>
          </draw:image>
        </draw:frame>
        <draw:frame presentation:style-name="pr36" draw:text-style-name="P13" draw:layer="layout" svg:width="7.5cm" svg:height="2.051cm" svg:x="19.2cm" svg:y="13cm" presentation:class="title" presentation:user-transformed="true">
          <draw:text-box>
            <text:list text:style-name="L2">
              <text:list-header>
                <text:p text:style-name="P8"><text:span text:style-name="T3">KMeans - RFM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odèle final</text:p>
          </draw:text-box>
        </draw:frame>
        <draw:g draw:name="Group 1630_23">
          <draw:custom-shape draw:name="Shape 1631_25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5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5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5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5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37" draw:text-style-name="P13" draw:layer="layout" svg:width="7.5cm" svg:height="2.051cm" svg:x="14.9cm" svg:y="12.549cm" presentation:class="title" presentation:user-transformed="true">
          <draw:text-box>
            <text:list text:style-name="L2">
              <text:list-header>
                <text:p text:style-name="P8"><text:span text:style-name="T3">KMeans - RFM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draw:frame presentation:style-name="pr38" draw:text-style-name="P20" draw:layer="layout" svg:width="4cm" svg:height="2.134cm" svg:x="7.3cm" svg:y="9.608cm" presentation:class="title" presentation:user-transformed="true">
          <draw:text-box>
            <text:list text:style-name="L2">
              <text:list-header>
                <text:p text:style-name="P8"><text:span text:style-name="T10">Inerte</text:span><text:span text:style-name="T10"><text:line-break/></text:span><text:span text:style-name="T10"/></text:p>
              </text:list-header>
            </text:list>
          </draw:text-box>
        </draw:frame>
        <draw:frame presentation:style-name="pr39" draw:text-style-name="P20" draw:layer="layout" svg:width="4.5cm" svg:height="2.051cm" svg:x="12.1cm" svg:y="9.649cm" presentation:class="title" presentation:user-transformed="true">
          <draw:text-box>
            <text:list text:style-name="L2">
              <text:list-header>
                <text:p text:style-name="P8"><text:span text:style-name="T10">Actifs récemment</text:span></text:p>
              </text:list-header>
            </text:list>
          </draw:text-box>
        </draw:frame>
        <draw:frame presentation:style-name="pr40" draw:text-style-name="P20" draw:layer="layout" svg:width="4.5cm" svg:height="2.051cm" svg:x="22.8cm" svg:y="9.349cm" presentation:class="title" presentation:user-transformed="true">
          <draw:text-box>
            <text:list text:style-name="L2">
              <text:list-header>
                <text:p text:style-name="P8"><text:span text:style-name="T10">Dépensier</text:span></text:p>
              </text:list-header>
            </text:list>
          </draw:text-box>
        </draw:frame>
        <draw:frame presentation:style-name="pr41" draw:text-style-name="P20" draw:layer="layout" svg:width="5.5cm" svg:height="2.134cm" svg:x="1.7cm" svg:y="9.408cm" presentation:class="title" presentation:user-transformed="true">
          <draw:text-box>
            <text:list text:style-name="L2">
              <text:list-header>
                <text:p text:style-name="P8"><text:span text:style-name="T10">Neutre</text:span></text:p>
              </text:list-header>
            </text:list>
          </draw:text-box>
        </draw:frame>
        <draw:frame presentation:style-name="pr42" draw:text-style-name="P20" draw:layer="layout" svg:width="4.5cm" svg:height="2.051cm" svg:x="17.9cm" svg:y="9.7cm" presentation:class="title" presentation:user-transformed="true">
          <draw:text-box>
            <text:list text:style-name="L2">
              <text:list-header>
                <text:p text:style-name="P8"><text:span text:style-name="T10">Anciens actifs</text:span></text:p>
              </text:list-header>
            </text:list>
          </draw:text-box>
        </draw:frame>
        <draw:frame draw:style-name="gr4" draw:text-style-name="P6" draw:layer="layout" svg:width="5.5cm" svg:height="5.5cm" svg:x="0.8cm" svg:y="3.403cm">
          <draw:image xlink:href="Pictures/10000000000001C4000001F0473B63F6D22DAA8F.png" xlink:type="simple" xlink:show="embed" xlink:actuate="onLoad" draw:mime-type="image/png">
            <text:p/>
          </draw:image>
        </draw:frame>
        <draw:frame draw:style-name="gr4" draw:text-style-name="P6" draw:layer="layout" svg:width="5.5cm" svg:height="5.5cm" svg:x="6.2cm" svg:y="3.432cm">
          <draw:image xlink:href="Pictures/10000000000001D1000001E4C0A737290E0BB9A3.png" xlink:type="simple" xlink:show="embed" xlink:actuate="onLoad" draw:mime-type="image/png">
            <text:p/>
          </draw:image>
        </draw:frame>
        <draw:frame draw:style-name="gr4" draw:text-style-name="P6" draw:layer="layout" svg:width="5.5cm" svg:height="5.5cm" svg:x="11.5cm" svg:y="3.357cm">
          <draw:image xlink:href="Pictures/10000000000001C8000001EBDAAFCB03D86CD958.png" xlink:type="simple" xlink:show="embed" xlink:actuate="onLoad" draw:mime-type="image/png">
            <text:p/>
          </draw:image>
        </draw:frame>
        <draw:frame draw:style-name="gr4" draw:text-style-name="P6" draw:layer="layout" svg:width="5.5cm" svg:height="5.5cm" svg:x="17cm" svg:y="3.5cm">
          <draw:image xlink:href="Pictures/10000000000001C7000001E5E4C82A5FB633BABA.png" xlink:type="simple" xlink:show="embed" xlink:actuate="onLoad" draw:mime-type="image/png">
            <text:p/>
          </draw:image>
        </draw:frame>
        <draw:frame draw:style-name="gr4" draw:text-style-name="P6" draw:layer="layout" svg:width="5.5cm" svg:height="5.5cm" svg:x="22.3cm" svg:y="3.4cm">
          <draw:image xlink:href="Pictures/10000000000001CC000001E0CBA411160860B1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Maintenance</text:p>
          </draw:text-box>
        </draw:frame>
        <draw:g draw:name="Group 1630_25">
          <draw:custom-shape draw:name="Shape 1631_27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7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7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7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7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presentation:style-name="pr43" draw:text-style-name="P21" draw:layer="layout" svg:width="2.8cm" svg:height="1.441cm" svg:x="9.7cm" svg:y="13.359cm" presentation:class="title" presentation:user-transformed="true">
          <draw:text-box>
            <text:list text:style-name="L2">
              <text:list-header>
                <text:p text:style-name="P8"><text:span text:style-name="T11">3 mois</text:span></text:p>
              </text:list-header>
            </text:list>
          </draw:text-box>
        </draw:frame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draw:frame draw:style-name="gr4" draw:text-style-name="P6" draw:layer="layout" svg:width="16.499cm" svg:height="10.677cm" svg:x="6.001cm" svg:y="3.092cm">
          <draw:image xlink:href="Pictures/10000000000003AA0000025F5DC767282DEA30BB.png" xlink:type="simple" xlink:show="embed" xlink:actuate="onLoad" draw:mime-type="image/png">
            <text:p/>
          </draw:image>
        </draw:frame>
        <draw:line draw:style-name="gr15" draw:text-style-name="P22" draw:layer="layout" svg:x1="10.5cm" svg:y1="5cm" svg:x2="10.5cm" svg:y2="13cm">
          <text:p/>
        </draw:lin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 text:style-name="P1">Conclusion</text:p>
          </draw:text-box>
        </draw:frame>
        <draw:g draw:name="Group 1630_26">
          <draw:custom-shape draw:name="Shape 1631_28" draw:style-name="gr1" draw:text-style-name="P3" draw:layer="layout" svg:width="13.368cm" svg:height="2.477cm" svg:x="1.632cm" svg:y="13.273cm">
            <text:p/>
            <draw:enhanced-geometry svg:viewBox="0 0 4812590 891564" draw:text-areas="?f8 ?f10 ?f9 ?f11" draw:type="non-primitive" draw:enhanced-path="M 0 0 L 4812590 891564 3551717 891564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12590"/>
              <draw:equation draw:name="f7" draw:formula="?f4 / 891564"/>
              <draw:equation draw:name="f8" draw:formula="0 / ?f6"/>
              <draw:equation draw:name="f9" draw:formula="4812590 / ?f6"/>
              <draw:equation draw:name="f10" draw:formula="0 / ?f7"/>
              <draw:equation draw:name="f11" draw:formula="891564 / ?f7"/>
            </draw:enhanced-geometry>
          </draw:custom-shape>
          <draw:custom-shape draw:name="Shape 1632_28" draw:style-name="gr1" draw:text-style-name="P3" draw:layer="layout" svg:width="0.237cm" svg:height="0.059cm" svg:x="1.394cm" svg:y="13.213cm">
            <text:p/>
            <draw:enhanced-geometry svg:viewBox="0 0 85555 21311" draw:text-areas="?f8 ?f10 ?f9 ?f11" draw:type="non-primitive" draw:enhanced-path="M 660 0 L 85555 21311 0 5461 66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55"/>
              <draw:equation draw:name="f7" draw:formula="?f4 / 21311"/>
              <draw:equation draw:name="f8" draw:formula="0 / ?f6"/>
              <draw:equation draw:name="f9" draw:formula="85555 / ?f6"/>
              <draw:equation draw:name="f10" draw:formula="0 / ?f7"/>
              <draw:equation draw:name="f11" draw:formula="21311 / ?f7"/>
            </draw:enhanced-geometry>
          </draw:custom-shape>
          <draw:custom-shape draw:name="Shape 1633_28" draw:style-name="gr2" draw:text-style-name="P4" draw:layer="layout" svg:width="10.15cm" svg:height="2.553cm" svg:x="1.355cm" svg:y="13.197cm">
            <text:p/>
            <draw:enhanced-geometry svg:viewBox="0 0 3653984 918970" draw:text-areas="?f8 ?f10 ?f9 ?f11" draw:type="non-primitive" draw:enhanced-path="M 0 0 L 3653984 918970 2870480 918970 7925 63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53984"/>
              <draw:equation draw:name="f7" draw:formula="?f4 / 918970"/>
              <draw:equation draw:name="f8" draw:formula="0 / ?f6"/>
              <draw:equation draw:name="f9" draw:formula="3653984 / ?f6"/>
              <draw:equation draw:name="f10" draw:formula="0 / ?f7"/>
              <draw:equation draw:name="f11" draw:formula="918970 / ?f7"/>
            </draw:enhanced-geometry>
          </draw:custom-shape>
          <draw:frame draw:name="Picture 1634_28" draw:style-name="gr3" draw:text-style-name="P5" draw:layer="layout" svg:width="9.434cm" svg:height="2.961cm" svg:x="0.005cm" svg:y="12.781cm">
            <draw:image xlink:href="Pictures/10000201000002E7000000EA472D2C27AC393934.png" xlink:type="simple" xlink:show="embed" xlink:actuate="onLoad" draw:mime-type="image/png">
              <text:p/>
            </draw:image>
          </draw:frame>
          <draw:frame draw:name="Picture 1635_28" draw:style-name="gr3" draw:text-style-name="P5" draw:layer="layout" svg:width="9.348cm" svg:height="2.989cm" svg:x="0.005cm" svg:y="12.756cm">
            <draw:image xlink:href="Pictures/100002010000045000000161639999C218EF2E4C.png" xlink:type="simple" xlink:show="embed" xlink:actuate="onLoad" draw:mime-type="image/png">
              <text:p/>
            </draw:image>
          </draw:frame>
        </draw:g>
        <draw:frame draw:style-name="gr6" draw:text-style-name="P10" draw:layer="layout" svg:width="3.393cm" svg:height="1.187cm" svg:x="25.531cm" svg:y="14.665cm">
          <draw:text-box>
            <text:p><text:page-number>&lt;numéro&gt;</text:page-number></text:p>
          </draw:text-box>
        </draw:frame>
        <draw:frame presentation:style-name="pr44" draw:text-style-name="P20" draw:layer="layout" svg:width="13.5cm" svg:height="8.681cm" svg:x="4.8cm" svg:y="4.1cm" presentation:class="title" presentation:user-transformed="true">
          <draw:text-box>
            <text:list text:style-name="L2">
              <text:list-header>
                <text:p text:style-name="P8"><text:span text:style-name="T12">→</text:span><text:span text:style-name="T13"> </text:span><text:span text:style-name="T13">5 groupes de clients définis</text:span><text:span text:style-name="T13"><text:line-break/></text:span><text:span text:style-name="T13"><text:line-break/></text:span><text:span text:style-name="T12">→</text:span><text:span text:style-name="T13"> Actions marketing</text:span><text:span text:style-name="T13"><text:tab/></text:span><text:span text:style-name="T13"><text:line-break/></text:span><text:span text:style-name="T13"><text:line-break/></text:span><text:span text:style-name="T12">→</text:span><text:span text:style-name="T13"> Kmeans</text:span><text:span text:style-name="T13"><text:line-break/></text:span><text:span text:style-name="T13"><text:line-break/></text:span><text:span text:style-name="T14">→</text:span><text:span text:style-name="T10"> Maintenance tous les 3 mois</text:span><text:span text:style-name="T10"><text:line-break/></text:span><text:span text:style-name="T10"/></text:p>
              </text:list-header>
            </text:list>
          </draw:text-box>
        </draw:frame>
        <draw:frame draw:style-name="gr4" draw:text-style-name="P6" draw:layer="layout" svg:width="4.775cm" svg:height="3.169cm" svg:x="18.5cm" svg:y="6.5cm">
          <draw:image xlink:href="Pictures/10000000000000770000004FED432FE34CACC5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9T11:26:29.657000000</meta:creation-date>
    <dc:date>2021-11-09T07:41:32.524000000</dc:date>
    <meta:editing-duration>PT5H35M6S</meta:editing-duration>
    <meta:editing-cycles>57</meta:editing-cycles>
    <meta:generator>LibreOffice/7.0.4.2$Windows_X86_64 LibreOffice_project/dcf040e67528d9187c66b2379df5ea4407429775</meta:generator>
    <meta:document-statistic meta:object-count="406"/>
  </office:meta>
</office:document-meta>
</file>